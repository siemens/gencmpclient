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773000003F7E3D54C9F.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automatic-styles>
    <style:style style:name="Table4" style:family="table">
      <style:table-properties style:width="6.3465in" fo:margin-left="0in" fo:margin-top="0in" fo:margin-bottom="0in" table:align="left" style:writing-mode="lr-tb"/>
    </style:style>
    <style:style style:name="Table4.A" style:family="table-column">
      <style:table-column-properties style:column-width="0.8118in"/>
    </style:style>
    <style:style style:name="Table4.B" style:family="table-column">
      <style:table-column-properties style:column-width="5.5347in"/>
    </style:style>
    <style:style style:name="Table4.1" style:family="table-row">
      <style:table-row-properties fo:keep-together="always"/>
    </style:style>
    <style:style style:name="Table4.A1" style:family="table-cell">
      <style:table-cell-properties fo:background-color="#e5e5e5" fo:padding="0in" fo:border-left="0.75pt solid #000000" fo:border-right="none" fo:border-top="0.75pt solid #000000" fo:border-bottom="0.75pt solid #000000">
        <style:background-image/>
      </style:table-cell-properties>
    </style:style>
    <style:style style:name="Table4.B1" style:family="table-cell">
      <style:table-cell-properties fo:background-color="#e5e5e5" fo:padding="0in" fo:border="0.75pt solid #000000">
        <style:background-image/>
      </style:table-cell-properties>
    </style:style>
    <style:style style:name="Table4.A2" style:family="table-cell">
      <style:table-cell-properties fo:padding="0in" fo:border-left="0.75pt solid #000000" fo:border-right="none" fo:border-top="none" fo:border-bottom="0.75pt solid #000000"/>
    </style:style>
    <style:style style:name="Table4.B2" style:family="table-cell">
      <style:table-cell-properties fo:padding="0in" fo:border-left="0.75pt solid #000000" fo:border-right="0.75pt solid #000000" fo:border-top="none" fo:border-bottom="0.75pt solid #000000"/>
    </style:style>
    <style:style style:name="Table4.A3" style:family="table-cell">
      <style:table-cell-properties fo:padding="0in" fo:border-left="0.75pt solid #000000" fo:border-right="none" fo:border-top="none" fo:border-bottom="0.75pt solid #000000"/>
    </style:style>
    <style:style style:name="Table4.B3" style:family="table-cell">
      <style:table-cell-properties fo:padding="0in" fo:border-left="0.75pt solid #000000" fo:border-right="0.75pt solid #000000" fo:border-top="none" fo:border-bottom="0.75pt solid #000000"/>
    </style:style>
    <style:style style:name="Table4.A4" style:family="table-cell">
      <style:table-cell-properties fo:padding="0in" fo:border-left="0.75pt solid #000000" fo:border-right="none" fo:border-top="none" fo:border-bottom="0.75pt solid #000000"/>
    </style:style>
    <style:style style:name="Table4.B4" style:family="table-cell">
      <style:table-cell-properties fo:padding="0in" fo:border-left="0.75pt solid #000000" fo:border-right="0.75pt solid #000000" fo:border-top="none" fo:border-bottom="0.75pt solid #000000"/>
    </style:style>
    <style:style style:name="Table4.A5" style:family="table-cell">
      <style:table-cell-properties fo:padding="0in" fo:border-left="0.75pt solid #000000" fo:border-right="none" fo:border-top="none" fo:border-bottom="0.75pt solid #000000"/>
    </style:style>
    <style:style style:name="Table4.B5" style:family="table-cell">
      <style:table-cell-properties fo:padding="0in" fo:border-left="0.75pt solid #000000" fo:border-right="0.75pt solid #000000" fo:border-top="none" fo:border-bottom="0.75pt solid #000000"/>
    </style:style>
    <style:style style:name="Table4.A6" style:family="table-cell">
      <style:table-cell-properties fo:padding="0in" fo:border-left="0.75pt solid #000000" fo:border-right="none" fo:border-top="none" fo:border-bottom="0.75pt solid #000000"/>
    </style:style>
    <style:style style:name="Table4.B6" style:family="table-cell">
      <style:table-cell-properties fo:padding="0in" fo:border-left="0.75pt solid #000000" fo:border-right="0.75pt solid #000000" fo:border-top="none" fo:border-bottom="0.75pt solid #000000"/>
    </style:style>
    <style:style style:name="Table4.A7" style:family="table-cell">
      <style:table-cell-properties fo:padding="0in" fo:border-left="0.75pt solid #000000" fo:border-right="none" fo:border-top="none" fo:border-bottom="0.75pt solid #000000"/>
    </style:style>
    <style:style style:name="Table4.B7" style:family="table-cell">
      <style:table-cell-properties fo:padding="0in" fo:border-left="0.75pt solid #000000" fo:border-right="0.75pt solid #000000" fo:border-top="none" fo:border-bottom="0.75pt solid #000000"/>
    </style:style>
    <style:style style:name="Table4.A8" style:family="table-cell">
      <style:table-cell-properties fo:padding="0in" fo:border-left="0.75pt solid #000000" fo:border-right="none" fo:border-top="none" fo:border-bottom="0.75pt solid #000000"/>
    </style:style>
    <style:style style:name="Table4.B8" style:family="table-cell">
      <style:table-cell-properties fo:padding="0in" fo:border-left="0.75pt solid #000000" fo:border-right="0.75pt solid #000000" fo:border-top="none" fo:border-bottom="0.75pt solid #000000"/>
    </style:style>
    <style:style style:name="Table4.A9" style:family="table-cell">
      <style:table-cell-properties fo:padding="0in" fo:border-left="0.75pt solid #000000" fo:border-right="none" fo:border-top="none" fo:border-bottom="0.75pt solid #000000"/>
    </style:style>
    <style:style style:name="Table4.B9" style:family="table-cell">
      <style:table-cell-properties fo:padding="0in" fo:border-left="0.75pt solid #000000" fo:border-right="0.75pt solid #000000" fo:border-top="none" fo:border-bottom="0.75pt solid #000000"/>
    </style:style>
    <style:style style:name="Table4.A10" style:family="table-cell">
      <style:table-cell-properties fo:padding="0in" fo:border-left="0.75pt solid #000000" fo:border-right="none" fo:border-top="none" fo:border-bottom="0.75pt solid #000000"/>
    </style:style>
    <style:style style:name="Table4.B10" style:family="table-cell">
      <style:table-cell-properties fo:padding="0in" fo:border-left="0.75pt solid #000000" fo:border-right="0.75pt solid #000000" fo:border-top="none" fo:border-bottom="0.75pt solid #000000"/>
    </style:style>
    <style:style style:name="Table4.A11" style:family="table-cell">
      <style:table-cell-properties fo:padding="0in" fo:border-left="0.75pt solid #000000" fo:border-right="none" fo:border-top="none" fo:border-bottom="0.75pt solid #000000"/>
    </style:style>
    <style:style style:name="Table4.B11" style:family="table-cell">
      <style:table-cell-properties fo:padding="0in" fo:border-left="0.75pt solid #000000" fo:border-right="0.75pt solid #000000" fo:border-top="none" fo:border-bottom="0.75pt solid #000000"/>
    </style:style>
    <style:style style:name="Table4.A12" style:family="table-cell">
      <style:table-cell-properties fo:padding="0in" fo:border-left="0.75pt solid #000000" fo:border-right="none" fo:border-top="none" fo:border-bottom="0.75pt solid #000000"/>
    </style:style>
    <style:style style:name="Table4.B12" style:family="table-cell">
      <style:table-cell-properties fo:padding="0in" fo:border-left="0.75pt solid #000000" fo:border-right="0.75pt solid #000000" fo:border-top="none" fo:border-bottom="0.75pt solid #000000"/>
    </style:style>
    <style:style style:name="Table4.A13" style:family="table-cell">
      <style:table-cell-properties fo:padding="0in" fo:border-left="0.75pt solid #000000" fo:border-right="none" fo:border-top="none" fo:border-bottom="0.75pt solid #000000"/>
    </style:style>
    <style:style style:name="Table4.B13" style:family="table-cell">
      <style:table-cell-properties fo:padding="0in" fo:border-left="0.75pt solid #000000" fo:border-right="0.75pt solid #000000" fo:border-top="none" fo:border-bottom="0.75pt solid #000000"/>
    </style:style>
    <style:style style:name="Table4.A14" style:family="table-cell">
      <style:table-cell-properties fo:padding="0in" fo:border-left="0.75pt solid #000000" fo:border-right="none" fo:border-top="none" fo:border-bottom="0.75pt solid #000000"/>
    </style:style>
    <style:style style:name="Table4.B14" style:family="table-cell">
      <style:table-cell-properties fo:padding="0in" fo:border-left="0.75pt solid #000000" fo:border-right="0.75pt solid #000000" fo:border-top="none" fo:border-bottom="0.75pt solid #000000"/>
    </style:style>
    <style:style style:name="Table4.A15" style:family="table-cell">
      <style:table-cell-properties fo:padding="0in" fo:border-left="0.75pt solid #000000" fo:border-right="none" fo:border-top="none" fo:border-bottom="0.75pt solid #000000"/>
    </style:style>
    <style:style style:name="Table4.B15" style:family="table-cell">
      <style:table-cell-properties fo:padding="0in" fo:border-left="0.75pt solid #000000" fo:border-right="0.75pt solid #000000" fo:border-top="none" fo:border-bottom="0.75pt solid #000000"/>
    </style:style>
    <style:style style:name="Table4.A16" style:family="table-cell">
      <style:table-cell-properties fo:padding="0in" fo:border-left="0.75pt solid #000000" fo:border-right="none" fo:border-top="none" fo:border-bottom="0.75pt solid #000000"/>
    </style:style>
    <style:style style:name="Table4.B16" style:family="table-cell">
      <style:table-cell-properties fo:padding="0in" fo:border-left="0.75pt solid #000000" fo:border-right="0.75pt solid #000000" fo:border-top="none" fo:border-bottom="0.75pt solid #000000"/>
    </style:style>
    <style:style style:name="Table4.A17" style:family="table-cell">
      <style:table-cell-properties fo:padding="0in" fo:border-left="0.75pt solid #000000" fo:border-right="none" fo:border-top="none" fo:border-bottom="0.75pt solid #000000"/>
    </style:style>
    <style:style style:name="Table4.B17" style:family="table-cell">
      <style:table-cell-properties fo:padding="0in" fo:border-left="0.75pt solid #000000" fo:border-right="0.75pt solid #000000" fo:border-top="none" fo:border-bottom="0.75pt solid #000000"/>
    </style:style>
    <style:style style:name="Table4.A18" style:family="table-cell">
      <style:table-cell-properties fo:padding="0in" fo:border-left="0.75pt solid #000000" fo:border-right="none" fo:border-top="none" fo:border-bottom="0.75pt solid #000000"/>
    </style:style>
    <style:style style:name="Table4.B18" style:family="table-cell">
      <style:table-cell-properties fo:padding="0in" fo:border-left="0.75pt solid #000000" fo:border-right="0.75pt solid #000000" fo:border-top="none" fo:border-bottom="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5.15" style:family="table-row">
      <style:table-row-properties style:min-row-height="1.1965in" fo:keep-together="auto"/>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21" style:family="table">
      <style:table-properties style:width="6.1861in" fo:margin-left="0.075in" fo:margin-top="0in" fo:margin-bottom="0in" table:align="left" style:writing-mode="lr-tb"/>
    </style:style>
    <style:style style:name="Table21.A" style:family="table-column">
      <style:table-column-properties style:column-width="0.691in"/>
    </style:style>
    <style:style style:name="Table21.B" style:family="table-column">
      <style:table-column-properties style:column-width="1.2424in"/>
    </style:style>
    <style:style style:name="Table21.C" style:family="table-column">
      <style:table-column-properties style:column-width="0.7549in"/>
    </style:style>
    <style:style style:name="Table21.D" style:family="table-column">
      <style:table-column-properties style:column-width="3.497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6.1861in" fo:margin-left="0.075in" fo:margin-top="0in" fo:margin-bottom="0in" table:align="left" style:writing-mode="lr-tb"/>
    </style:style>
    <style:style style:name="Table22.A" style:family="table-column">
      <style:table-column-properties style:column-width="0.691in"/>
    </style:style>
    <style:style style:name="Table22.B" style:family="table-column">
      <style:table-column-properties style:column-width="1.2424in"/>
    </style:style>
    <style:style style:name="Table22.C" style:family="table-column">
      <style:table-column-properties style:column-width="0.7549in"/>
    </style:style>
    <style:style style:name="Table22.D" style:family="table-column">
      <style:table-column-properties style:column-width="3.497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2.A5" style:family="table-cell">
      <style:table-cell-properties fo:padding-left="0.075in" fo:padding-right="0.075in" fo:padding-top="0in" fo:padding-bottom="0in" fo:border-left="0.5pt solid #000000" fo:border-right="0.5pt solid #000000" fo:border-top="none" fo:border-bottom="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7021in"/>
    </style:style>
    <style:style style:name="Table9.B" style:family="table-column">
      <style:table-column-properties style:column-width="1.3076in"/>
    </style:style>
    <style:style style:name="Table9.C" style:family="table-column">
      <style:table-column-properties style:column-width="0.7521in"/>
    </style:style>
    <style:style style:name="Table9.D" style:family="table-column">
      <style:table-column-properties style:column-width="3.424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9.A5" style:family="table-cell">
      <style:table-cell-properties fo:padding-left="0.075in" fo:padding-right="0.075in" fo:padding-top="0in" fo:padding-bottom="0in" fo:border-left="0.5pt solid #000000" fo:border-right="0.5pt solid #000000" fo:border-top="none" fo:border-bottom="0.5pt solid #000000"/>
    </style:style>
    <style:style style:name="Table23" style:family="table">
      <style:table-properties style:width="6.1861in" fo:margin-left="0.0799in" fo:margin-top="0in" fo:margin-bottom="0in" table:align="left" style:writing-mode="lr-tb"/>
    </style:style>
    <style:style style:name="Table23.A" style:family="table-column">
      <style:table-column-properties style:column-width="0.6569in"/>
    </style:style>
    <style:style style:name="Table23.B" style:family="table-column">
      <style:table-column-properties style:column-width="0.9903in"/>
    </style:style>
    <style:style style:name="Table23.C" style:family="table-column">
      <style:table-column-properties style:column-width="0.5903in"/>
    </style:style>
    <style:style style:name="Table23.D" style:family="table-column">
      <style:table-column-properties style:column-width="3.9486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625in"/>
    </style:style>
    <style:style style:name="Table17.B" style:family="table-column">
      <style:table-column-properties style:column-width="1.1014in"/>
    </style:style>
    <style:style style:name="Table17.C" style:family="table-column">
      <style:table-column-properties style:column-width="0.5903in"/>
    </style:style>
    <style:style style:name="Table17.D" style:family="table-column">
      <style:table-column-properties style:column-width="3.834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33in" fo:margin-left="0.0799in" fo:margin-top="0in" fo:margin-bottom="0in" table:align="left" style:writing-mode="lr-tb"/>
    </style:style>
    <style:style style:name="Table15.A" style:family="table-column">
      <style:table-column-properties style:column-width="0.7014in"/>
    </style:style>
    <style:style style:name="Table15.B" style:family="table-column">
      <style:table-column-properties style:column-width="0.9458in"/>
    </style:style>
    <style:style style:name="Table15.C" style:family="table-column">
      <style:table-column-properties style:column-width="0.6688in"/>
    </style:style>
    <style:style style:name="Table15.D" style:family="table-column">
      <style:table-column-properties style:column-width="3.8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33in" fo:margin-left="0.0799in" fo:margin-top="0in" fo:margin-bottom="0in" table:align="left" style:writing-mode="lr-tb"/>
    </style:style>
    <style:style style:name="Table13.A" style:family="table-column">
      <style:table-column-properties style:column-width="0.7014in"/>
    </style:style>
    <style:style style:name="Table13.B" style:family="table-column">
      <style:table-column-properties style:column-width="0.7375in"/>
    </style:style>
    <style:style style:name="Table13.C" style:family="table-column">
      <style:table-column-properties style:column-width="0.5889in"/>
    </style:style>
    <style:style style:name="Table13.D" style:family="table-column">
      <style:table-column-properties style:column-width="4.155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Standard" style:master-page-name="First_20_Page">
      <style:paragraph-properties style:page-number="auto"/>
    </style:style>
    <style:style style:name="P2" style:family="paragraph" style:parent-style-name="Default">
      <style:text-properties style:font-name="Arial" fo:language="en" fo:country="US" style:font-name-complex="Arial1"/>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complex="Arial1"/>
    </style:style>
    <style:style style:name="P5" style:family="paragraph" style:parent-style-name="Standard">
      <style:text-properties style:font-name-complex="Arial1"/>
    </style:style>
    <style:style style:name="P6" style:family="paragraph" style:parent-style-name="Subtitle">
      <style:paragraph-properties fo:margin-left="0.25in" fo:margin-right="0in" fo:text-indent="0in" style:auto-text-indent="false"/>
      <style:text-properties officeooo:rsid="00bd1099" officeooo:paragraph-rsid="003fa8e5"/>
    </style:style>
    <style:style style:name="P7"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8" style:family="paragraph" style:parent-style-name="Standard">
      <style:text-properties style:language-asian="de" style:country-asian="DE" style:font-name-complex="Arial1"/>
    </style:style>
    <style:style style:name="P9"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10" style:family="paragraph" style:parent-style-name="Standard">
      <style:paragraph-properties fo:text-align="center" style:justify-single-word="false"/>
      <style:text-properties fo:color="#000000" loext:opacity="100%" style:font-name-complex="Arial1"/>
    </style:style>
    <style:style style:name="P11" style:family="paragraph" style:parent-style-name="Standard">
      <style:text-properties style:language-asian="de" style:country-asian="DE"/>
    </style:style>
    <style:style style:name="P12" style:family="paragraph" style:parent-style-name="Standard">
      <style:paragraph-properties fo:text-align="center" style:justify-single-word="false"/>
    </style:style>
    <style:style style:name="P13" style:family="paragraph" style:parent-style-name="Inhalt">
      <style:paragraph-properties fo:text-align="center" style:justify-single-word="false"/>
      <style:text-properties fo:color="#000000" loext:opacity="100%" style:font-name-complex="Arial1"/>
    </style:style>
    <style:style style:name="P14"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15" style:family="paragraph" style:parent-style-name="Inhalt">
      <style:paragraph-properties fo:break-before="page"/>
      <style:text-properties fo:color="#000000" loext:opacity="100%" style:font-name-complex="Arial1"/>
    </style:style>
    <style:style style:name="P16" style:family="paragraph" style:parent-style-name="Standard">
      <style:text-properties fo:color="#000000" loext:opacity="100%" style:font-name-complex="Arial1"/>
    </style:style>
    <style:style style:name="P17" style:family="paragraph" style:parent-style-name="Contents_20_1">
      <style:paragraph-properties>
        <style:tab-stops>
          <style:tab-stop style:position="6.2984in" style:type="right" style:leader-style="dotted" style:leader-text="."/>
        </style:tab-stops>
      </style:paragraph-properties>
    </style:style>
    <style:style style:name="P18" style:family="paragraph" style:parent-style-name="Contents_20_2">
      <style:paragraph-properties>
        <style:tab-stops>
          <style:tab-stop style:position="6.2984in" style:type="right" style:leader-style="dotted" style:leader-text="."/>
        </style:tab-stops>
      </style:paragraph-properties>
    </style:style>
    <style:style style:name="P19" style:family="paragraph" style:parent-style-name="Inhalt">
      <style:text-properties style:font-name-complex="Arial1"/>
    </style:style>
    <style:style style:name="P20" style:family="paragraph" style:parent-style-name="Heading_20_1">
      <style:paragraph-properties fo:break-before="page"/>
    </style:style>
    <style:style style:name="P21" style:family="paragraph" style:parent-style-name="Heading_20_2" style:list-style-name="WWNum2">
      <style:text-properties style:font-name-complex="Arial1"/>
    </style:style>
    <style:style style:name="P22" style:family="paragraph" style:parent-style-name="Standard">
      <style:paragraph-properties fo:text-align="start" style:justify-single-word="false"/>
      <style:text-properties officeooo:paragraph-rsid="00d85bd2"/>
    </style:style>
    <style:style style:name="P23" style:family="paragraph" style:parent-style-name="Heading_20_2" style:list-style-name="WWNum2"/>
    <style:style style:name="P24" style:family="paragraph" style:parent-style-name="Standard">
      <style:paragraph-properties fo:text-align="justify" style:justify-single-word="false"/>
      <style:text-properties officeooo:paragraph-rsid="00aae9d6"/>
    </style:style>
    <style:style style:name="P25" style:family="paragraph" style:parent-style-name="Standard">
      <style:paragraph-properties fo:text-align="justify" style:justify-single-word="false"/>
    </style:style>
    <style:style style:name="P26"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7" style:family="paragraph" style:parent-style-name="Tabellenkopf">
      <style:paragraph-properties fo:margin-left="0in" fo:margin-right="0.1965in" fo:margin-top="0.0417in" fo:margin-bottom="0.0417in" style:contextual-spacing="false" fo:text-align="start" style:justify-single-word="false" fo:text-indent="0in" style:auto-text-indent="false"/>
      <style:text-properties fo:language="en" fo:country="US" officeooo:paragraph-rsid="00d85bd2"/>
    </style:style>
    <style:style style:name="P28"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9" style:family="paragraph" style:parent-style-name="Standard">
      <style:paragraph-properties fo:margin-top="0in" fo:margin-bottom="0.0835in" style:contextual-spacing="false" fo:text-align="justify" style:justify-single-word="false" fo:orphans="2" fo:widows="2" style:writing-mode="lr-tb"/>
    </style:style>
    <style:style style:name="P30" style:family="paragraph" style:parent-style-name="Standard">
      <style:paragraph-properties fo:margin-top="0in" fo:margin-bottom="0in" style:contextual-spacing="false"/>
    </style:style>
    <style:style style:name="P31"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32" style:family="paragraph" style:parent-style-name="Standard">
      <style:paragraph-properties fo:margin-top="0in" fo:margin-bottom="0.0835in" style:contextual-spacing="false"/>
      <style:text-properties fo:language="de" fo:country="DE" officeooo:rsid="00a69d28" officeooo:paragraph-rsid="00a69d28"/>
    </style:style>
    <style:style style:name="P33"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paragraph-rsid="00a69d28"/>
    </style:style>
    <style:style style:name="P34" style:family="paragraph" style:parent-style-name="Standard">
      <style:paragraph-properties fo:margin-top="0in" fo:margin-bottom="0.0835in" style:contextual-spacing="false"/>
      <style:text-properties fo:language="de" fo:country="DE"/>
    </style:style>
    <style:style style:name="P35" style:family="paragraph" style:parent-style-name="Standard">
      <style:paragraph-properties fo:margin-top="0in" fo:margin-bottom="0.0835in" style:contextual-spacing="false" fo:text-align="justify" style:justify-single-word="false" fo:orphans="2" fo:widows="2" style:writing-mode="lr-tb"/>
      <style:text-properties fo:language="zxx" fo:country="none" style:language-asian="zxx" style:country-asian="none" style:language-complex="zxx" style:country-complex="none"/>
    </style:style>
    <style:style style:name="P36" style:family="paragraph" style:parent-style-name="Standard">
      <style:paragraph-properties fo:margin-top="0in" fo:margin-bottom="0.0835in" style:contextual-spacing="false" fo:text-align="justify" style:justify-single-word="false" fo:orphans="2" fo:widows="2" style:writing-mode="lr-tb"/>
      <style:text-properties fo:language="zxx" fo:country="none" officeooo:rsid="00aae9d6" officeooo:paragraph-rsid="00aae9d6" style:language-asian="zxx" style:country-asian="none" style:language-complex="zxx" style:country-complex="none"/>
    </style:style>
    <style:style style:name="P37"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rsid="00aae9d6" officeooo:paragraph-rsid="00aae9d6"/>
    </style:style>
    <style:style style:name="P38" style:family="paragraph" style:parent-style-name="Standard">
      <style:paragraph-properties fo:margin-top="0in" fo:margin-bottom="0.0835in" style:contextual-spacing="false"/>
    </style:style>
    <style:style style:name="P39" style:family="paragraph" style:parent-style-name="Standard">
      <style:paragraph-properties fo:margin-top="0in" fo:margin-bottom="0.0835in" style:contextual-spacing="false" fo:text-align="start" style:justify-single-word="false"/>
    </style:style>
    <style:style style:name="P40" style:family="paragraph" style:parent-style-name="Heading_20_1" style:list-style-name="">
      <style:paragraph-properties fo:text-align="justify" style:justify-single-word="false" fo:orphans="2" fo:widows="2" style:punctuation-wrap="simple"/>
      <style:text-properties officeooo:paragraph-rsid="00e693d9"/>
    </style:style>
    <style:style style:name="P41" style:family="paragraph" style:parent-style-name="Heading_20_1" style:list-style-name="WWNum2">
      <style:paragraph-properties fo:break-before="page"/>
      <style:text-properties officeooo:paragraph-rsid="00e693d9"/>
    </style:style>
    <style:style style:name="P42" style:family="paragraph" style:parent-style-name="Standard">
      <style:text-properties officeooo:paragraph-rsid="00b2f49e"/>
    </style:style>
    <style:style style:name="P43" style:family="paragraph" style:parent-style-name="Standard">
      <style:paragraph-properties fo:text-align="start" style:justify-single-word="false"/>
      <style:text-properties officeooo:paragraph-rsid="00b0e91b"/>
    </style:style>
    <style:style style:name="P44" style:family="paragraph" style:parent-style-name="Standard">
      <style:text-properties officeooo:paragraph-rsid="0023bbad"/>
    </style:style>
    <style:style style:name="P4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4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4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4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rsid="0007a9f7" officeooo:paragraph-rsid="00260b7e" style:font-name-asian="Times New Roman1" style:font-size-asian="8pt" style:language-asian="en" style:country-asian="US" style:font-name-complex="Courier New1" style:font-size-complex="9pt"/>
    </style:style>
    <style:style style:name="P5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2" style:family="paragraph" style:parent-style-name="Standard">
      <style:paragraph-properties fo:text-align="start" style:justify-single-word="false"/>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3" style:family="paragraph" style:parent-style-name="Standard">
      <style:paragraph-properties fo:text-align="start" style:justify-single-word="false"/>
      <style:text-properties fo:color="#333333" loext:opacity="100%" style:font-name="Courier New" fo:font-size="8pt" officeooo:paragraph-rsid="00260b7e" style:font-name-asian="Times New Roman1" style:font-size-asian="8pt" style:language-asian="en" style:country-asian="US" style:font-name-complex="Courier New1" style:font-size-complex="9pt"/>
    </style:style>
    <style:style style:name="P54" style:family="paragraph" style:parent-style-name="Heading_20_1" style:list-style-name="WWNum2">
      <style:paragraph-properties fo:break-before="page"/>
    </style:style>
    <style:style style:name="P55" style:family="paragraph" style:parent-style-name="Standard">
      <style:paragraph-properties fo:margin-top="0in" fo:margin-bottom="0in" style:contextual-spacing="false" fo:text-align="justify" style:justify-single-word="false"/>
    </style:style>
    <style:style style:name="P56"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7"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58"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59" style:family="paragraph" style:parent-style-name="Heading_20_2" style:list-style-name="WWNum2">
      <style:paragraph-properties fo:text-align="justify" style:justify-single-word="false"/>
    </style:style>
    <style:style style:name="P60" style:family="paragraph" style:parent-style-name="Standard">
      <style:paragraph-properties fo:margin-top="0in" fo:margin-bottom="0in" style:contextual-spacing="false" fo:text-align="start" style:justify-single-word="false"/>
    </style:style>
    <style:style style:name="P6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62"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63"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 fo:font-size="8pt" fo:language="en" fo:country="US" style:font-size-asian="8pt" style:font-size-complex="8pt"/>
    </style:style>
    <style:style style:name="P64"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6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fr" fo:country="FR" officeooo:paragraph-rsid="00439396" style:font-name-asian="Times New Roman1" style:font-size-asian="8pt" style:language-asian="en" style:country-asian="US" style:font-name-complex="Courier New1" style:font-size-complex="8pt"/>
    </style:style>
    <style:style style:name="P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6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68"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69"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70"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71"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72"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73"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style>
    <style:style style:name="P74"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de" fo:country="DE" fo:font-weight="bold" style:font-size-asian="8pt" style:font-weight-asian="bold" style:font-size-complex="8pt" style:font-weight-complex="bold"/>
    </style:style>
    <style:style style:name="P75"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en" fo:country="US" fo:font-weight="bold" style:font-size-asian="8pt" style:font-weight-asian="bold" style:font-size-complex="8pt" style:font-weight-complex="bold"/>
    </style:style>
    <style:style style:name="P76"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77" style:family="paragraph" style:parent-style-name="Standard">
      <style:paragraph-properties fo:margin-top="0.0835in" fo:margin-bottom="0in" style:contextual-spacing="false" fo:text-align="start" style:justify-single-word="false"/>
    </style:style>
    <style:style style:name="P78"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79" style:family="paragraph" style:parent-style-name="Heading_20_2" style:list-style-name="WWNum2">
      <style:text-properties officeooo:paragraph-rsid="00b081ee"/>
    </style:style>
    <style:style style:name="P80" style:family="paragraph" style:parent-style-name="Standard">
      <style:text-properties officeooo:paragraph-rsid="00322cd6"/>
    </style:style>
    <style:style style:name="P8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8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84"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85" style:family="paragraph" style:parent-style-name="HTML_20_Preformatted">
      <style:paragraph-properties fo:margin-top="0in" fo:margin-bottom="0.0835in"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ca8468" style:font-size-asian="8pt" style:font-weight-asian="normal" style:font-size-complex="8pt" style:font-weight-complex="normal"/>
    </style:style>
    <style:style style:name="P87"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cdce45"/>
    </style:style>
    <style:style style:name="P8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style:font-size-asian="8pt" style:font-weight-asian="normal" style:font-size-complex="8pt" style:font-weight-complex="normal"/>
    </style:style>
    <style:style style:name="P8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ccb6b5"/>
    </style:style>
    <style:style style:name="P9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9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92" style:family="paragraph" style:parent-style-name="HTML_20_Preformatted">
      <loext:graphic-properties draw:fill="solid" draw:fill-color="#ffffff"/>
      <style:paragraph-properties fo:margin-top="0in" fo:margin-bottom="0.0835in" style:contextual-spacing="false" fo:line-height="105%" fo:text-align="justify" style:justify-single-word="false" fo:background-color="#ffffff"/>
    </style:style>
    <style:style style:name="P9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style:font-size-asian="8pt" style:language-asian="zxx" style:country-asian="none" style:font-size-complex="8pt" style:language-complex="zxx" style:country-complex="none"/>
    </style:style>
    <style:style style:name="P94"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95"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c7b5aa" style:font-name-asian="MS Mincho" style:font-size-asian="11pt" style:font-name-complex="Times New Roman1"/>
    </style:style>
    <style:style style:name="P96"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d0cd10" style:font-name-asian="MS Mincho" style:font-size-asian="11pt" style:font-name-complex="Times New Roman1"/>
    </style:style>
    <style:style style:name="P97"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8a0e2" officeooo:paragraph-rsid="00cdce45" style:font-name-asian="MS Mincho" style:font-size-asian="11pt" style:font-name-complex="Times New Roman1"/>
    </style:style>
    <style:style style:name="P98" style:family="paragraph" style:parent-style-name="HTML_20_Preformatted">
      <style:paragraph-properties fo:margin-top="0in" fo:margin-bottom="0.0835in" style:contextual-spacing="false" fo:line-height="110%" fo:text-align="start" style:justify-single-word="false">
        <style:tab-stops/>
      </style:paragraph-properties>
      <style:text-properties officeooo:paragraph-rsid="0030b3ba"/>
    </style:style>
    <style:style style:name="P99"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100"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10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font-size-complex="9pt"/>
    </style:style>
    <style:style style:name="P102" style:family="paragraph" style:parent-style-name="Standard">
      <style:paragraph-properties fo:margin-top="0.1in" fo:margin-bottom="0.0799in" style:contextual-spacing="false"/>
      <style:text-properties officeooo:paragraph-rsid="00373b2d"/>
    </style:style>
    <style:style style:name="P10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10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5" style:family="paragraph" style:parent-style-name="HTML_20_Preformatted">
      <style:paragraph-properties fo:margin-top="0in" fo:margin-bottom="0.0835in"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333ede" style:font-size-asian="8pt" style:font-size-complex="8pt"/>
    </style:style>
    <style:style style:name="P10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8" style:family="paragraph" style:parent-style-name="HTML_20_Preformatted">
      <style:paragraph-properties fo:margin-top="0in" fo:margin-bottom="0.0835in"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officeooo:paragraph-rsid="00333ede" style:font-size-asian="8pt" style:font-weight-asian="bold" style:font-size-complex="8pt" style:font-weight-complex="bold"/>
    </style:style>
    <style:style style:name="P11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11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0f71c7" officeooo:paragraph-rsid="000cf4ff" style:font-size-asian="8pt" style:language-asian="zxx" style:country-asian="none" style:font-size-complex="8pt" style:language-complex="zxx" style:country-complex="none"/>
    </style:style>
    <style:style style:name="P112"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1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333ede" style:font-size-asian="8pt" style:font-weight-asian="normal" style:font-size-complex="8pt" style:font-weight-complex="normal"/>
    </style:style>
    <style:style style:name="P114" style:family="paragraph" style:parent-style-name="HTML_20_Preformatted">
      <style:paragraph-properties fo:margin-top="0in" fo:margin-bottom="0.0835in" style:contextual-spacing="false" fo:line-height="110%" fo:text-align="justify" style:justify-single-word="false">
        <style:tab-stops/>
      </style:paragraph-properties>
      <style:text-properties officeooo:paragraph-rsid="00333ede"/>
    </style:style>
    <style:style style:name="P11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333ede" style:font-size-asian="8pt" style:font-weight-asian="bold" style:font-size-complex="8pt" style:font-weight-complex="bold"/>
    </style:style>
    <style:style style:name="P116"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officeooo:paragraph-rsid="00333ede"/>
    </style:style>
    <style:style style:name="P117" style:family="paragraph" style:parent-style-name="Heading_20_2" style:list-style-name="WWNum2">
      <style:text-properties officeooo:rsid="004493c2" officeooo:paragraph-rsid="004493c2"/>
    </style:style>
    <style:style style:name="P118" style:family="paragraph" style:parent-style-name="Standard">
      <style:text-properties officeooo:paragraph-rsid="004493c2"/>
    </style:style>
    <style:style style:name="P119"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12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4493c2" style:font-size-asian="8pt" style:font-size-complex="8pt"/>
    </style:style>
    <style:style style:name="P122"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2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493c2" style:font-size-asian="8pt" style:font-weight-asian="normal" style:font-size-complex="8pt" style:font-weight-complex="normal"/>
    </style:style>
    <style:style style:name="P124" style:family="paragraph" style:parent-style-name="Heading_20_2" style:list-style-name="WWNum2">
      <style:paragraph-properties fo:text-align="start" style:justify-single-word="false"/>
      <style:text-properties officeooo:paragraph-rsid="00b081ee"/>
    </style:style>
    <style:style style:name="P125" style:family="paragraph" style:parent-style-name="Standard">
      <style:paragraph-properties fo:margin-top="0in" fo:margin-bottom="0.1181in" style:contextual-spacing="false" fo:text-align="start" style:justify-single-word="false"/>
      <style:text-properties officeooo:paragraph-rsid="00bfeb0f"/>
    </style:style>
    <style:style style:name="P12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12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b75a9"/>
    </style:style>
    <style:style style:name="P128" style:family="paragraph" style:parent-style-name="Standard">
      <style:paragraph-properties fo:margin-top="0in" fo:margin-bottom="0in" style:contextual-spacing="false" fo:text-align="start" style:justify-single-word="false"/>
      <style:text-properties officeooo:paragraph-rsid="004e1b66"/>
    </style:style>
    <style:style style:name="P129" style:family="paragraph" style:parent-style-name="HTML_20_Preformatted">
      <loext:graphic-properties draw:fill="solid" draw:fill-color="#ffffff"/>
      <style:paragraph-properties fo:margin-left="0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130" style:family="paragraph" style:parent-style-name="Standard">
      <style:paragraph-properties fo:margin-top="0.1in" fo:margin-bottom="0in" style:contextual-spacing="false" fo:text-align="justify" style:justify-single-word="false"/>
      <style:text-properties officeooo:paragraph-rsid="00e9124b"/>
    </style:style>
    <style:style style:name="P131"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b081ee" style:font-size-asian="8pt" style:font-size-complex="8pt"/>
    </style:style>
    <style:style style:name="P13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13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081ee" style:font-size-asian="8pt" style:font-size-complex="8pt"/>
    </style:style>
    <style:style style:name="P135"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081ee"/>
    </style:style>
    <style:style style:name="P13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b081ee" style:font-size-asian="8pt" style:language-asian="zxx" style:country-asian="none" style:font-size-complex="8pt" style:language-complex="zxx" style:country-complex="none"/>
    </style:style>
    <style:style style:name="P13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de4c0" style:font-size-asian="8pt" style:font-weight-asian="normal" style:font-size-complex="8pt" style:font-weight-complex="normal"/>
    </style:style>
    <style:style style:name="P13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de4c0"/>
    </style:style>
    <style:style style:name="P139" style:family="paragraph" style:parent-style-name="Standard">
      <style:paragraph-properties fo:margin-top="0.1in" fo:margin-bottom="0in" style:contextual-spacing="false" fo:text-align="justify" style:justify-single-word="false"/>
      <style:text-properties officeooo:paragraph-rsid="00dfad1d"/>
    </style:style>
    <style:style style:name="P140" style:family="paragraph" style:parent-style-name="HTML_20_Preformatted">
      <style:paragraph-properties fo:margin-top="0in" fo:margin-bottom="0.0835in" style:contextual-spacing="false" fo:line-height="125%" fo:text-align="justify" style:justify-single-word="false" fo:orphans="2" fo:widows="2" style:punctuation-wrap="simple" style:writing-mode="lr-tb">
        <style:tab-stops/>
      </style:paragraph-properties>
      <style:text-properties fo:color="#333333" loext:opacity="100%" style:font-name="Courier New" fo:font-size="8pt" fo:language="zxx" fo:country="none" officeooo:paragraph-rsid="00b081ee" style:letter-kerning="false" style:font-size-asian="8pt" style:language-asian="zxx" style:country-asian="none" style:font-size-complex="8pt" style:language-complex="zxx" style:country-complex="none"/>
    </style:style>
    <style:style style:name="P14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fad1d" style:font-size-asian="8pt" style:font-weight-asian="normal" style:font-size-complex="8pt" style:font-weight-complex="normal"/>
    </style:style>
    <style:style style:name="P14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b081ee" style:font-size-asian="8pt" style:font-size-complex="8pt"/>
    </style:style>
    <style:style style:name="P14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4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e8179" style:font-size-asian="8pt" style:font-weight-asian="normal" style:font-size-complex="8pt" style:font-weight-complex="normal"/>
    </style:style>
    <style:style style:name="P145" style:family="paragraph" style:parent-style-name="Standard">
      <style:paragraph-properties fo:margin-top="0.1in" fo:margin-bottom="0in" style:contextual-spacing="false" fo:text-align="justify" style:justify-single-word="false"/>
      <style:text-properties officeooo:paragraph-rsid="00e969d9"/>
    </style:style>
    <style:style style:name="P146"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dfbd90" style:font-size-asian="8pt" style:font-size-complex="8pt"/>
    </style:style>
    <style:style style:name="P14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dfbd90" style:font-name-asian="MS Mincho" style:font-size-asian="11pt" style:language-asian="zxx" style:country-asian="none" style:font-name-complex="Times New Roman1" style:language-complex="zxx" style:country-complex="none"/>
    </style:style>
    <style:style style:name="P14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dfbd90" style:font-name-asian="MS Mincho" style:font-size-asian="11pt" style:font-name-complex="Times New Roman1"/>
    </style:style>
    <style:style style:name="P14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dfbd90" style:font-size-asian="8pt" style:font-size-complex="8pt"/>
    </style:style>
    <style:style style:name="P15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fbd90"/>
    </style:style>
    <style:style style:name="P15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dfbd90" style:font-size-asian="8pt" style:language-asian="zxx" style:country-asian="none" style:font-size-complex="8pt" style:language-complex="zxx" style:country-complex="none"/>
    </style:style>
    <style:style style:name="P15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officeooo:paragraph-rsid="00dfbd90" style:font-name-asian="MS Mincho" style:font-size-asian="10.5pt" style:font-name-complex="Times New Roman1" style:font-size-complex="10.5pt"/>
    </style:style>
    <style:style style:name="P15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fbd90" style:font-size-asian="8pt" style:font-weight-asian="normal" style:font-size-complex="8pt" style:font-weight-complex="normal"/>
    </style:style>
    <style:style style:name="P15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dfbd90" style:font-size-asian="8pt" style:font-size-complex="8pt"/>
    </style:style>
    <style:style style:name="P15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dfbd90" style:font-name-asian="MS Mincho" style:font-size-asian="11pt" style:font-name-complex="Times New Roman1"/>
    </style:style>
    <style:style style:name="P15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dfbd90" officeooo:paragraph-rsid="00dfbd90" style:font-size-asian="8pt" style:language-asian="zxx" style:country-asian="none" style:font-size-complex="8pt" style:language-complex="zxx" style:country-complex="none"/>
    </style:style>
    <style:style style:name="P15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e034e5" style:font-name-asian="MS Mincho" style:font-size-asian="11pt" style:font-name-complex="Times New Roman1"/>
    </style:style>
    <style:style style:name="P158" style:family="paragraph" style:parent-style-name="Standard">
      <style:paragraph-properties fo:margin-top="0.1in" fo:margin-bottom="0in" style:contextual-spacing="false" fo:text-align="start" style:justify-single-word="false"/>
      <style:text-properties officeooo:paragraph-rsid="00dfbd90"/>
    </style:style>
    <style:style style:name="P159" style:family="paragraph" style:parent-style-name="Standard">
      <style:paragraph-properties fo:margin-top="0.0799in" fo:margin-bottom="0.0799in" style:contextual-spacing="false" fo:text-align="start" style:justify-single-word="false"/>
      <style:text-properties officeooo:paragraph-rsid="00b081ee"/>
    </style:style>
    <style:style style:name="P160" style:family="paragraph" style:parent-style-name="HTML_20_Preformatted">
      <loext:graphic-properties draw:fill="solid" draw:fill-color="#ffffff"/>
      <style:paragraph-properties fo:margin-top="0in" fo:margin-bottom="0.0799in"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61"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text-properties officeooo:paragraph-rsid="00b081ee"/>
    </style:style>
    <style:style style:name="P16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16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4" style:family="paragraph" style:parent-style-name="Heading_20_2" style:list-style-name="WWNum2">
      <style:text-properties officeooo:paragraph-rsid="00b790c0"/>
    </style:style>
    <style:style style:name="P165" style:family="paragraph" style:parent-style-name="Standard">
      <style:text-properties officeooo:rsid="00b790c0" officeooo:paragraph-rsid="00ba7d78"/>
    </style:style>
    <style:style style:name="P16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16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6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895ba" style:font-size-asian="8pt" style:font-size-complex="8pt"/>
    </style:style>
    <style:style style:name="P16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895ba"/>
    </style:style>
    <style:style style:name="P17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b895ba" style:font-size-asian="8pt" style:language-asian="zxx" style:country-asian="none" style:font-size-complex="8pt" style:language-complex="zxx" style:country-complex="none"/>
    </style:style>
    <style:style style:name="P17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b895ba" style:font-size-asian="8pt" style:font-weight-asian="bold" style:font-size-complex="8pt" style:font-weight-complex="bold"/>
    </style:style>
    <style:style style:name="P172" style:family="paragraph" style:parent-style-name="Standard">
      <style:text-properties officeooo:rsid="00b790c0" officeooo:paragraph-rsid="00b895ba"/>
    </style:style>
    <style:style style:name="P173" style:family="paragraph" style:parent-style-name="Standard">
      <style:text-properties officeooo:paragraph-rsid="00b5d8fd"/>
    </style:style>
    <style:style style:name="P17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175"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7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49bf95" style:font-size-asian="8pt" style:font-size-complex="8pt"/>
    </style:style>
    <style:style style:name="P177"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1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bad87" style:font-name-asian="Times New Roman1" style:font-size-asian="8pt" style:language-asian="en" style:country-asian="US" style:font-name-complex="Courier New1" style:font-size-complex="8pt"/>
    </style:style>
    <style:style style:name="P179"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bad87" officeooo:paragraph-rsid="0049bf95" style:font-size-asian="8pt" style:font-size-complex="8pt"/>
    </style:style>
    <style:style style:name="P18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8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9bf95" style:letter-kerning="false" style:font-name-asian="Times New Roman1" style:font-size-asian="8pt" style:language-asian="en" style:country-asian="US" style:font-name-complex="Courier New1" style:font-size-complex="8pt" style:language-complex="ar" style:country-complex="SA"/>
    </style:style>
    <style:style style:name="P182" style:family="paragraph" style:parent-style-name="Heading_20_2" style:list-style-name="WWNum2">
      <style:text-properties officeooo:rsid="0022d6c9" officeooo:paragraph-rsid="0049bf95"/>
    </style:style>
    <style:style style:name="P183" style:family="paragraph" style:parent-style-name="Standard">
      <style:paragraph-properties fo:margin-top="0in" fo:margin-bottom="0in" style:contextual-spacing="false"/>
      <style:text-properties officeooo:paragraph-rsid="004e1b66"/>
    </style:style>
    <style:style style:name="P184" style:family="paragraph" style:parent-style-name="Standard">
      <style:paragraph-properties fo:margin-top="0in" fo:margin-bottom="0in" style:contextual-spacing="false" fo:text-align="justify" style:justify-single-word="false"/>
      <style:text-properties officeooo:paragraph-rsid="004e1b66"/>
    </style:style>
    <style:style style:name="P185"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86"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187"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font-size-asian="8pt" style:font-size-complex="8pt"/>
    </style:style>
    <style:style style:name="P18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f5c3c" style:font-size-asian="8pt" style:font-weight-asian="normal" style:font-size-complex="8pt" style:font-weight-complex="normal"/>
    </style:style>
    <style:style style:name="P18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f5c3c" style:font-name-asian="Times New Roman1" style:font-size-asian="8pt" style:language-asian="en" style:country-asian="US" style:font-name-complex="Courier New1" style:font-size-complex="8pt"/>
    </style:style>
    <style:style style:name="P190"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letter-kerning="false" style:font-name-asian="Arial Unicode MS1" style:font-size-asian="8pt" style:language-asian="ja" style:country-asian="JP" style:font-name-complex="Courier New1" style:font-size-complex="8pt" style:language-complex="ar" style:country-complex="SA"/>
    </style:style>
    <style:style style:name="P19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92" style:family="paragraph" style:parent-style-name="Standard">
      <style:text-properties officeooo:paragraph-rsid="0049bf95"/>
    </style:style>
    <style:style style:name="P193" style:family="paragraph" style:parent-style-name="Standard">
      <style:text-properties officeooo:rsid="00571683" officeooo:paragraph-rsid="00571683"/>
    </style:style>
    <style:style style:name="P19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6a4ad" style:font-name-asian="Times New Roman1" style:font-size-asian="8pt" style:language-asian="en" style:country-asian="US" style:font-name-complex="Courier New1" style:font-size-complex="8pt"/>
    </style:style>
    <style:style style:name="P19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c44fe" officeooo:paragraph-rsid="0056a4ad" style:font-name-asian="Times New Roman1" style:font-size-asian="8pt" style:language-asian="en" style:country-asian="US" style:font-name-complex="Courier New1" style:font-size-complex="8pt"/>
    </style:style>
    <style:style style:name="P196"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9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5212de" style:font-name-asian="Times New Roman1" style:font-size-asian="8pt" style:language-asian="en" style:country-asian="US" style:font-name-complex="Courier New1" style:font-size-complex="8pt"/>
    </style:style>
    <style:style style:name="P198"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9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212de" style:font-name-asian="Times New Roman1" style:font-size-asian="8pt" style:language-asian="en" style:country-asian="US" style:font-weight-asian="normal" style:font-name-complex="Courier New1" style:font-size-complex="8pt" style:font-weight-complex="normal"/>
    </style:style>
    <style:style style:name="P20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71683" style:font-name-asian="Times New Roman1" style:font-size-asian="8pt" style:language-asian="en" style:country-asian="US" style:font-name-complex="Courier New1" style:font-size-complex="8pt"/>
    </style:style>
    <style:style style:name="P20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6a4ad" style:font-name-asian="Times New Roman1" style:font-size-asian="8pt" style:language-asian="en" style:country-asian="US" style:font-weight-asian="normal" style:font-name-complex="Courier New1" style:font-size-complex="8pt" style:font-weight-complex="normal"/>
    </style:style>
    <style:style style:name="P202"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203" style:family="paragraph" style:parent-style-name="Standard">
      <style:text-properties officeooo:paragraph-rsid="005c7ef1"/>
    </style:style>
    <style:style style:name="P20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81fb2" style:font-name-asian="Times New Roman1" style:font-size-asian="8pt" style:language-asian="en" style:country-asian="US" style:font-weight-asian="normal" style:font-name-complex="Courier New1" style:font-size-complex="8pt" style:font-weight-complex="normal"/>
    </style:style>
    <style:style style:name="P20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581fb2" officeooo:paragraph-rsid="00581fb2" style:letter-kerning="false" style:font-name-asian="Times New Roman1" style:font-size-asian="8pt" style:language-asian="en" style:country-asian="US" style:font-name-complex="Courier New1" style:font-size-complex="8pt" style:language-complex="ar" style:country-complex="SA"/>
    </style:style>
    <style:style style:name="P2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9bf95" style:font-name-asian="Times New Roman1" style:font-size-asian="8pt" style:language-asian="en" style:country-asian="US" style:font-name-complex="Courier New1" style:font-size-complex="8pt"/>
    </style:style>
    <style:style style:name="P207" style:family="paragraph" style:parent-style-name="Heading_20_2" style:list-style-name="WWNum2">
      <style:text-properties officeooo:rsid="0022d6c9" officeooo:paragraph-rsid="0022d6c9"/>
    </style:style>
    <style:style style:name="P208" style:family="paragraph" style:parent-style-name="Standard">
      <style:text-properties officeooo:paragraph-rsid="002c41e8"/>
    </style:style>
    <style:style style:name="P209"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21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211"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2c41e8" style:font-size-asian="8pt" style:font-size-complex="8pt"/>
    </style:style>
    <style:style style:name="P212"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213"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0c44fe" officeooo:paragraph-rsid="002c41e8" style:font-size-asian="8pt" style:font-size-complex="8pt"/>
    </style:style>
    <style:style style:name="P21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215" style:family="paragraph" style:parent-style-name="Standard">
      <style:text-properties officeooo:paragraph-rsid="0022d6c9"/>
    </style:style>
    <style:style style:name="P21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21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21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font-size-complex="8pt"/>
    </style:style>
    <style:style style:name="P21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220" style:family="paragraph" style:parent-style-name="Heading_20_2">
      <style:paragraph-properties fo:margin-top="0in" fo:margin-bottom="0in" style:contextual-spacing="false" fo:line-height="0.0201in"/>
      <style:text-properties officeooo:paragraph-rsid="0022d6c9"/>
    </style:style>
    <style:style style:name="P221" style:family="paragraph" style:parent-style-name="Heading_20_2" style:list-style-name="WWNum2">
      <style:text-properties officeooo:paragraph-rsid="00468b1f"/>
    </style:style>
    <style:style style:name="P22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language-asian="ja" style:country-asian="JP" style:font-size-complex="8pt"/>
    </style:style>
    <style:style style:name="P22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24"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25"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6"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27"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228" style:family="paragraph" style:parent-style-name="HTML_20_Preformatted">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P22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0" style:family="paragraph" style:parent-style-name="HTML_20_Preformatted">
      <style:paragraph-properties fo:text-align="justify" style:justify-single-word="false"/>
    </style:style>
    <style:style style:name="P231" style:family="paragraph" style:parent-style-name="HTML_20_Preformatted">
      <style:text-properties fo:color="#333333" loext:opacity="100%" style:font-name="Courier New" fo:font-size="8pt" fo:language="en" fo:country="US" style:font-size-asian="8pt" style:language-asian="ja" style:country-asian="JP" style:font-size-complex="8pt"/>
    </style:style>
    <style:style style:name="P23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23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786d8" style:font-name-asian="Times New Roman1" style:font-size-asian="8pt" style:language-asian="en" style:country-asian="US" style:font-name-complex="Courier New1" style:font-size-complex="8pt"/>
    </style:style>
    <style:style style:name="P23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235"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36"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7"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8"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9" style:family="paragraph" style:parent-style-name="HTML_20_Preformatted">
      <loext:graphic-properties draw:fill="solid" draw:fill-color="#ffffff"/>
      <style:paragraph-properties fo:background-color="#ffffff"/>
    </style:style>
    <style:style style:name="P240" style:family="paragraph" style:parent-style-name="Heading_20_2" style:list-style-name="WWNum2">
      <style:paragraph-properties fo:break-before="page"/>
    </style:style>
    <style:style style:name="P241" style:family="paragraph" style:parent-style-name="Standard">
      <style:paragraph-properties fo:margin-top="0in" fo:margin-bottom="0in" style:contextual-spacing="false" fo:text-align="justify" style:justify-single-word="false"/>
      <style:text-properties officeooo:paragraph-rsid="00dc0237"/>
    </style:style>
    <style:style style:name="P242"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3"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4"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6" style:family="paragraph" style:parent-style-name="List_20_Paragraph">
      <style:paragraph-properties fo:margin-left="0.5in" fo:margin-right="0in" fo:margin-top="0in" fo:margin-bottom="0.0835in" style:contextual-spacing="true" fo:text-indent="0in" style:auto-text-indent="false"/>
    </style:style>
    <style:style style:name="P247" style:family="paragraph" style:parent-style-name="List_20_Paragraph">
      <style:paragraph-properties fo:margin-left="0in" fo:margin-right="0in" fo:margin-top="0in" fo:margin-bottom="0.0835in" style:contextual-spacing="true" fo:line-height="100%" fo:text-align="justify" style:justify-single-word="false" fo:text-indent="0in" style:auto-text-indent="false"/>
    </style:style>
    <style:style style:name="P248"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language="zxx" fo:country="none" style:language-asian="zxx" style:country-asian="none" style:language-complex="zxx" style:country-complex="none"/>
    </style:style>
    <style:style style:name="P249"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250"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style>
    <style:style style:name="P251"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style:font-name-asian="Times New Roman1" style:font-size-asian="8pt" style:language-asian="en" style:country-asian="US" style:font-name-complex="Courier New1"/>
    </style:style>
    <style:style style:name="P252"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P253"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officeooo:paragraph-rsid="00dc0237"/>
    </style:style>
    <style:style style:name="P254" style:family="paragraph" style:parent-style-name="List_20_Paragraph">
      <style:paragraph-properties fo:margin-left="0in" fo:margin-right="0in" fo:margin-top="0in" fo:margin-bottom="0in" style:contextual-spacing="true" fo:text-indent="0in" style:auto-text-indent="false"/>
    </style:style>
    <style:style style:name="P255"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256" style:family="paragraph" style:parent-style-name="Standard">
      <style:text-properties officeooo:paragraph-rsid="0066f2fa"/>
    </style:style>
    <style:style style:name="P257"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59"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fo:language="zxx" fo:country="none" style:font-name-asian="Times New Roman1" style:font-size-asian="9pt" style:language-asian="zxx" style:country-asian="none" style:font-name-complex="Courier New1" style:language-complex="zxx" style:country-complex="none"/>
    </style:style>
    <style:style style:name="P260" style:family="paragraph" style:parent-style-name="Standard">
      <style:paragraph-properties fo:break-before="page"/>
    </style:style>
    <style:style style:name="P261" style:family="paragraph" style:parent-style-name="HTML_20_Preformatted">
      <loext:graphic-properties draw:fill="solid" draw:fill-color="#ffffff"/>
      <style:paragraph-properties fo:margin-left="0.25in" fo:margin-right="0in"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2" style:family="paragraph" style:parent-style-name="HTML_20_Preformatted">
      <loext:graphic-properties draw:fill="solid" draw:fill-color="#ffffff"/>
      <style:paragraph-properties fo:margin-left="0.25in" fo:margin-right="0in" fo:margin-top="0in" fo:margin-bottom="0.0835in" style:contextual-spacing="false"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3" style:family="paragraph" style:parent-style-name="HTML_20_Preformatted">
      <style:text-properties officeooo:paragraph-rsid="00468b1f"/>
    </style:style>
    <style:style style:name="P264"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style>
    <style:style style:name="P265"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1"/>
    </style:style>
    <style:style style:name="P266" style:family="paragraph" style:parent-style-name="Standard">
      <style:text-properties officeooo:paragraph-rsid="00bd1099"/>
    </style:style>
    <style:style style:name="P267"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68" style:family="paragraph" style:parent-style-name="Standard">
      <loext:graphic-properties draw:fill="solid" draw:fill-color="#ffffff"/>
      <style:paragraph-properties fo:margin-top="0in" fo:margin-bottom="0in" style:contextual-spacing="false"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9" style:family="paragraph" style:parent-style-name="Standard">
      <loext:graphic-properties draw:fill="solid" draw:fill-color="#ffffff"/>
      <style:paragraph-properties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0"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71"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72" style:family="paragraph" style:parent-style-name="Default">
      <style:paragraph-properties fo:text-align="justify" style:justify-single-word="false"/>
    </style:style>
    <style:style style:name="P273" style:family="paragraph" style:parent-style-name="HTML_20_Preformatted">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P274" style:family="paragraph" style:parent-style-name="HTML_20_Preformatted">
      <style:text-properties fo:font-size="8pt" style:font-size-asian="8pt" style:font-size-complex="8pt"/>
    </style:style>
    <style:style style:name="P275"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276"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277"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79"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0"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1" style:family="paragraph" style:parent-style-name="Standard">
      <style:paragraph-properties fo:margin-top="0.0835in" fo:margin-bottom="0.0835in" style:contextual-spacing="false"/>
    </style:style>
    <style:style style:name="P282"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283" style:family="paragraph" style:parent-style-name="Standard">
      <style:paragraph-properties fo:margin-top="0in" fo:margin-bottom="0.0835in" style:contextual-spacing="false" fo:text-align="justify" style:justify-single-word="false" fo:orphans="2" fo:widows="2" style:punctuation-wrap="simple" style:writing-mode="lr-tb"/>
    </style:style>
    <style:style style:name="P284"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285" style:family="paragraph" style:parent-style-name="Standard">
      <style:paragraph-properties fo:line-height="105%"/>
    </style:style>
    <style:style style:name="P286" style:family="paragraph" style:parent-style-name="HTML_20_Preformatted">
      <style:paragraph-properties fo:margin-top="0in" fo:margin-bottom="0in" style:contextual-spacing="false" fo:line-height="90%" fo:text-align="start" style:justify-single-word="false" fo:orphans="2" fo:widows="2"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87" style:family="paragraph" style:parent-style-name="HTML_20_Preformatted">
      <style:paragraph-properties fo:margin-left="0in" fo:margin-right="0in" fo:margin-top="0in" fo:margin-bottom="0.0598in" style:contextual-spacing="false" fo:text-indent="0in" style:auto-text-indent="false"/>
    </style:style>
    <style:style style:name="P288"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289" style:family="paragraph" style:parent-style-name="Default">
      <style:paragraph-properties fo:line-height="105%" fo:text-align="justify" style:justify-single-word="false"/>
      <style:text-properties officeooo:paragraph-rsid="00d0cd10"/>
    </style:style>
    <style:style style:name="P290" style:family="paragraph" style:parent-style-name="Default">
      <style:text-properties style:font-name="Arial" fo:font-size="11pt" fo:language="en" fo:country="US" style:font-size-asian="11pt" style:language-asian="ja" style:country-asian="JP"/>
    </style:style>
    <style:style style:name="P291" style:family="paragraph" style:parent-style-name="HTML_20_Preformatted">
      <style:text-properties officeooo:paragraph-rsid="00c68768"/>
    </style:style>
    <style:style style:name="P292" style:family="paragraph" style:parent-style-name="Standard">
      <style:paragraph-properties fo:text-align="start" style:justify-single-word="false"/>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93" style:family="paragraph" style:parent-style-name="Standard">
      <style:paragraph-properties fo:line-height="105%" fo:text-align="start" style:justify-single-word="false"/>
    </style:style>
    <style:style style:name="P29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95"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96" style:family="paragraph" style:parent-style-name="Heading_20_2" style:list-style-name="WWNum2">
      <style:text-properties fo:color="#333333" loext:opacity="100%"/>
    </style:style>
    <style:style style:name="P297" style:family="paragraph" style:parent-style-name="Standard">
      <style:text-properties officeooo:paragraph-rsid="00f5e2b0"/>
    </style:style>
    <style:style style:name="P298" style:family="paragraph" style:parent-style-name="Standard">
      <style:paragraph-properties fo:text-align="start" style:justify-single-word="false"/>
      <style:text-properties officeooo:paragraph-rsid="010051e3"/>
    </style:style>
    <style:style style:name="P29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US" officeooo:paragraph-rsid="00f63a25" style:script-type="latin"/>
    </style:style>
    <style:style style:name="P300" style:family="paragraph" style:parent-style-name="HTML_20_Preformatted">
      <style:paragraph-properties fo:margin-top="0in" fo:margin-bottom="0.1201in" style:contextual-spacing="false" fo:line-height="100%" fo:orphans="2" fo:widows="2" style:punctuation-wrap="simple" style:writing-mode="lr-tb"/>
      <style:text-properties officeooo:paragraph-rsid="010051e3"/>
    </style:style>
    <style:style style:name="P301" style:family="paragraph" style:parent-style-name="Standard">
      <style:paragraph-properties fo:margin-top="0in" fo:margin-bottom="0.0835in" style:contextual-spacing="false" fo:text-align="justify" style:justify-single-word="false" fo:orphans="2" fo:widows="2" style:punctuation-wrap="simple" style:writing-mode="lr-tb"/>
      <style:text-properties officeooo:paragraph-rsid="00f752c5"/>
    </style:style>
    <style:style style:name="P302" style:family="paragraph" style:parent-style-name="HTML_20_Preformatted">
      <loext:graphic-properties draw:fill="solid" draw:fill-color="#ffffff"/>
      <style:paragraph-properties fo:line-height="100%" fo:text-align="start" style:justify-single-word="false" fo:background-color="#ffffff"/>
      <style:text-properties officeooo:paragraph-rsid="00f63a25"/>
    </style:style>
    <style:style style:name="P303" style:family="paragraph" style:parent-style-name="HTML_20_Preformatted">
      <loext:graphic-properties draw:fill="solid" draw:fill-color="#ffffff"/>
      <style:paragraph-properties fo:line-height="100%" fo:text-align="start" style:justify-single-word="false" fo:background-color="#ffffff"/>
      <style:text-properties fo:color="#333399" loext:opacity="100%" style:font-name="Courier New" fo:font-size="8pt" fo:language="en" fo:country="US" fo:font-weight="bold" officeooo:paragraph-rsid="00f63a25" style:font-size-asian="8pt" style:font-weight-asian="bold" style:font-size-complex="8pt" style:font-weight-complex="bold"/>
    </style:style>
    <style:style style:name="P304" style:family="paragraph" style:parent-style-name="Heading_20_2" style:list-style-name="">
      <style:paragraph-properties fo:text-align="justify" style:justify-single-word="false" fo:orphans="2" fo:widows="2" style:punctuation-wrap="simple"/>
      <style:text-properties fo:color="#333333" loext:opacity="100%"/>
    </style:style>
    <style:style style:name="P305" style:family="paragraph" style:parent-style-name="Heading_20_2" style:list-style-name="WWNum2">
      <style:paragraph-properties fo:break-before="page"/>
      <style:text-properties fo:color="#333333" loext:opacity="100%"/>
    </style:style>
    <style:style style:name="P306" style:family="paragraph" style:parent-style-name="HTML_20_Preformatted">
      <loext:graphic-properties draw:fill="solid" draw:fill-color="#ffffff"/>
      <style:paragraph-properties fo:line-height="100%" fo:text-align="justify" style:justify-single-word="false" fo:background-color="#ffffff"/>
    </style:style>
    <style:style style:name="P307"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308" style:family="paragraph" style:parent-style-name="HTML_20_Preformatted">
      <loext:graphic-properties draw:fill="solid" draw:fill-color="#ffffff"/>
      <style:paragraph-properties fo:line-height="125%" fo:background-color="#ffffff"/>
    </style:style>
    <style:style style:name="P309" style:family="paragraph" style:parent-style-name="HTML_20_Preformatted">
      <loext:graphic-properties draw:fill="solid" draw:fill-color="#ffffff"/>
      <style:paragraph-properties fo:text-align="justify" style:justify-single-word="false" fo:background-color="#ffffff"/>
    </style:style>
    <style:style style:name="P310"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1"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312"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fr" fo:country="FR" style:font-name-asian="Times New Roman1" style:font-size-asian="8pt" style:language-asian="en" style:country-asian="US" style:font-name-complex="Courier New1" style:font-size-complex="8pt"/>
    </style:style>
    <style:style style:name="P314"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31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31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size-asian="8pt"/>
    </style:style>
    <style:style style:name="P31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1" style:font-size-complex="8pt"/>
    </style:style>
    <style:style style:name="P31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1" style:font-size-complex="8pt"/>
    </style:style>
    <style:style style:name="P31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8cc23" style:font-name-asian="Times New Roman1" style:font-size-asian="8pt" style:language-asian="en" style:country-asian="US" style:font-name-complex="Courier New1" style:font-size-complex="8pt"/>
    </style:style>
    <style:style style:name="P32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321"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2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32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32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32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32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ca8468"/>
    </style:style>
    <style:style style:name="P32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373b2d" style:font-name-asian="Times New Roman1" style:font-size-asian="8pt" style:language-asian="en" style:country-asian="US" style:font-name-complex="Courier New1" style:font-size-complex="8pt"/>
    </style:style>
    <style:style style:name="P32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34aa8"/>
    </style:style>
    <style:style style:name="P32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33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439396" style:font-name-asian="Times New Roman1" style:font-size-asian="8pt" style:language-asian="en" style:country-asian="US" style:font-name-complex="Courier New1" style:font-size-complex="8pt"/>
    </style:style>
    <style:style style:name="P33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39396" style:letter-kerning="false" style:font-name-asian="Times New Roman1" style:font-size-asian="8pt" style:language-asian="en" style:country-asian="US" style:font-name-complex="Courier New1" style:font-size-complex="8pt" style:language-complex="ar" style:country-complex="SA"/>
    </style:style>
    <style:style style:name="P33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e0da2f"/>
    </style:style>
    <style:style style:name="P33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081ee"/>
    </style:style>
    <style:style style:name="P33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de8179" style:font-name-asian="Times New Roman1" style:font-size-asian="8pt" style:language-asian="en" style:country-asian="US" style:font-name-complex="Courier New1" style:font-size-complex="8pt"/>
    </style:style>
    <style:style style:name="P33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e034e5"/>
    </style:style>
    <style:style style:name="P33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e034e5" style:font-name-asian="Times New Roman1" style:font-size-asian="8pt" style:language-asian="en" style:country-asian="US" style:font-name-complex="Courier New1" style:font-size-complex="8pt"/>
    </style:style>
    <style:style style:name="P33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e034e5" style:font-name-asian="Times New Roman1" style:font-size-asian="8pt" style:language-asian="en" style:country-asian="US" style:font-name-complex="Courier New1" style:font-size-complex="8pt"/>
    </style:style>
    <style:style style:name="P33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b0e91b" style:font-name-asian="Times New Roman1" style:font-size-asian="8pt" style:language-asian="en" style:country-asian="US" style:font-name-complex="Courier New1" style:font-size-complex="8pt"/>
    </style:style>
    <style:style style:name="P33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style:letter-kerning="false" style:font-name-asian="Times New Roman1" style:font-size-asian="8pt" style:language-asian="en" style:country-asian="US" style:font-name-complex="Courier New1" style:font-size-complex="8pt" style:language-complex="ar" style:country-complex="SA"/>
    </style:style>
    <style:style style:name="P34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212de" style:font-name-asian="Times New Roman1" style:font-size-asian="8pt" style:language-asian="en" style:country-asian="US" style:font-name-complex="Courier New1" style:font-size-complex="8pt"/>
    </style:style>
    <style:style style:name="P34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34099" style:letter-kerning="false" style:font-name-asian="Times New Roman1" style:font-size-asian="8pt" style:language-asian="en" style:country-asian="US" style:font-name-complex="Courier New1" style:font-size-complex="8pt" style:language-complex="ar" style:country-complex="SA"/>
    </style:style>
    <style:style style:name="P34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c190f" style:font-name-asian="Times New Roman1" style:font-size-asian="8pt" style:language-asian="en" style:country-asian="US" style:font-name-complex="Courier New1" style:font-size-complex="8pt"/>
    </style:style>
    <style:style style:name="P34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c7ef1" style:letter-kerning="false" style:font-name-asian="Times New Roman1" style:font-size-asian="8pt" style:language-asian="en" style:country-asian="US" style:font-name-complex="Courier New1" style:font-size-complex="8pt" style:language-complex="ar" style:country-complex="SA"/>
    </style:style>
    <style:style style:name="P34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bf3f7" style:font-name-asian="Times New Roman1" style:font-size-asian="8pt" style:language-asian="en" style:country-asian="US" style:font-name-complex="Courier New1" style:font-size-complex="8pt"/>
    </style:style>
    <style:style style:name="P34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4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4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95d0c" style:font-name-asian="Times New Roman1" style:font-size-asian="8pt" style:language-asian="en" style:country-asian="US" style:font-name-complex="Courier New1" style:font-size-complex="8pt"/>
    </style:style>
    <style:style style:name="P34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34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35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20a0b" style:font-name-asian="Times New Roman1" style:font-size-asian="8pt" style:language-asian="en" style:country-asian="US" style:font-name-complex="Courier New1" style:font-size-complex="8pt"/>
    </style:style>
    <style:style style:name="P35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352" style:family="paragraph" style:parent-style-name="Standard">
      <style:paragraph-properties fo:text-align="start" style:justify-single-word="false"/>
    </style:style>
    <style:style style:name="P35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35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style>
    <style:style style:name="P355"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56"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357"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358"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5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60"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0cd10"/>
    </style:style>
    <style:style style:name="P36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efde63"/>
    </style:style>
    <style:style style:name="P362" style:family="paragraph" style:parent-style-name="HTML_20_Preformatted">
      <style:paragraph-properties fo:line-height="125%" fo:orphans="2" fo:widows="2" style:punctuation-wrap="simple" style:writing-mode="lr-tb"/>
      <style:text-properties officeooo:paragraph-rsid="010051e3"/>
    </style:style>
    <style:style style:name="P363"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officeooo:rsid="00f0c0a5"/>
    </style:style>
    <style:style style:name="T2" style:family="text">
      <style:text-properties officeooo:rsid="00c43282"/>
    </style:style>
    <style:style style:name="T3" style:family="text">
      <style:text-properties officeooo:rsid="00e856b4"/>
    </style:style>
    <style:style style:name="T4" style:family="text">
      <style:text-properties officeooo:rsid="003a3f7c"/>
    </style:style>
    <style:style style:name="T5" style:family="text">
      <style:text-properties officeooo:rsid="005e92a2"/>
    </style:style>
    <style:style style:name="T6" style:family="text">
      <style:text-properties officeooo:rsid="00ea1e24"/>
    </style:style>
    <style:style style:name="T7" style:family="text">
      <style:text-properties officeooo:rsid="00a9de02"/>
    </style:style>
    <style:style style:name="T8" style:family="text">
      <style:text-properties style:language-asian="de" style:country-asian="DE" style:font-name-complex="Arial1"/>
    </style:style>
    <style:style style:name="T9" style:family="text">
      <style:text-properties style:language-asian="de" style:country-asian="DE" style:font-name-complex="Arial1" style:font-size-complex="11pt"/>
    </style:style>
    <style:style style:name="T10" style:family="text">
      <style:text-properties style:font-name-complex="Arial1"/>
    </style:style>
    <style:style style:name="T11" style:family="text">
      <style:text-properties officeooo:rsid="004045f5" style:font-name-complex="Arial1"/>
    </style:style>
    <style:style style:name="T12" style:family="text">
      <style:text-properties fo:font-weight="bold" style:font-weight-asian="bold" style:font-name-complex="Arial1"/>
    </style:style>
    <style:style style:name="T13" style:family="text">
      <style:text-properties officeooo:rsid="00e693d9" style:font-name-complex="Arial1"/>
    </style:style>
    <style:style style:name="T14" style:family="text">
      <style:text-properties officeooo:rsid="00d85bd2"/>
    </style:style>
    <style:style style:name="T15" style:family="text">
      <style:text-properties style:use-window-font-color="true" loext:opacity="0%" style:font-name="Arial" fo:font-size="11pt" fo:language="zxx" fo:country="none" officeooo:rsid="00dc49ef" style:letter-kerning="false" style:font-name-asian="MS Mincho" style:font-size-asian="11pt" style:language-asian="zxx" style:country-asian="none" style:font-name-complex="Times New Roman1" style:font-size-complex="10pt" style:language-complex="zxx" style:country-complex="none"/>
    </style:style>
    <style:style style:name="T16" style:family="text">
      <style:text-properties fo:language="zxx" fo:country="none" officeooo:rsid="00dc49ef" style:language-asian="zxx" style:country-asian="none" style:language-complex="zxx" style:country-complex="none"/>
    </style:style>
    <style:style style:name="T17" style:family="text">
      <style:text-properties officeooo:rsid="00dc49ef"/>
    </style:style>
    <style:style style:name="T18" style:family="text">
      <style:text-properties officeooo:rsid="0042285f"/>
    </style:style>
    <style:style style:name="T19" style:family="text">
      <style:text-properties officeooo:rsid="00c01f80"/>
    </style:style>
    <style:style style:name="T20" style:family="text">
      <style:text-properties officeooo:rsid="006609e3"/>
    </style:style>
    <style:style style:name="T21" style:family="text">
      <style:text-properties officeooo:rsid="00ac9bb8"/>
    </style:style>
    <style:style style:name="T22" style:family="text">
      <style:text-properties fo:language="zxx" fo:country="none" style:language-asian="zxx" style:country-asian="none" style:language-complex="zxx" style:country-complex="none"/>
    </style:style>
    <style:style style:name="T23" style:family="text">
      <style:text-properties officeooo:rsid="00aae9d6"/>
    </style:style>
    <style:style style:name="T24" style:family="text">
      <style:text-properties fo:language="zxx" fo:country="none" officeooo:rsid="00aae9d6" style:language-asian="zxx" style:country-asian="none" style:language-complex="zxx" style:country-complex="none"/>
    </style:style>
    <style:style style:name="T25" style:family="text">
      <style:text-properties officeooo:rsid="00da44cf"/>
    </style:style>
    <style:style style:name="T26" style:family="text">
      <style:text-properties officeooo:rsid="00db05cd"/>
    </style:style>
    <style:style style:name="T27" style:family="text">
      <style:text-properties fo:language="zxx" fo:country="none" fo:font-weight="normal" style:language-asian="zxx" style:country-asian="none" style:font-weight-asian="normal" style:language-complex="zxx" style:country-complex="none" style:font-weight-complex="normal"/>
    </style:style>
    <style:style style:name="T28" style:family="text">
      <style:text-properties fo:language="zxx" fo:country="none" officeooo:rsid="0069282b" style:language-asian="zxx" style:country-asian="none" style:language-complex="zxx" style:country-complex="none"/>
    </style:style>
    <style:style style:name="T29" style:family="text">
      <style:text-properties officeooo:rsid="00a69d28"/>
    </style:style>
    <style:style style:name="T30" style:family="text">
      <style:text-properties fo:language="en" fo:country="US" fo:font-weight="normal" style:language-asian="ja" style:country-asian="JP" style:font-weight-asian="normal" style:language-complex="ar" style:country-complex="SA" style:font-weight-complex="normal"/>
    </style:style>
    <style:style style:name="T31" style:family="text">
      <style:text-properties fo:font-size="10pt" style:font-size-asian="10pt"/>
    </style:style>
    <style:style style:name="T32" style:family="text">
      <style:text-properties fo:font-size="10pt" fo:language="zxx" fo:country="none" style:font-size-asian="10pt" style:language-asian="zxx" style:country-asian="none" style:language-complex="zxx" style:country-complex="none"/>
    </style:style>
    <style:style style:name="T33" style:family="text">
      <style:text-properties style:use-window-font-color="true" loext:opacity="0%" style:font-name="Arial" fo:font-size="11pt" style:letter-kerning="false" style:font-name-asian="MS Mincho" style:font-size-asian="11pt" style:font-name-complex="Times New Roman1" style:font-size-complex="10pt"/>
    </style:style>
    <style:style style:name="T34" style:family="text">
      <style:text-properties officeooo:rsid="0069282b"/>
    </style:style>
    <style:style style:name="T35"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36" style:family="text">
      <style:text-properties officeooo:rsid="00bfeb0f"/>
    </style:style>
    <style:style style:name="T37" style:family="text">
      <style:text-properties officeooo:rsid="00607a25"/>
    </style:style>
    <style:style style:name="T38" style:family="text">
      <style:text-properties fo:color="#333399" loext:opacity="100%" style:font-name="Courier New" fo:font-size="9pt" fo:font-weight="bold" style:font-name-asian="Arial Unicode MS1" style:font-size-asian="9pt" style:font-weight-asian="bold" style:font-name-complex="Courier New1" style:font-size-complex="9pt" style:font-weight-complex="bold"/>
    </style:style>
    <style:style style:name="T39" style:family="text">
      <style:text-properties fo:color="#0066bb" loext:opacity="100%" style:font-name="Courier New" fo:font-size="9pt" fo:language="zxx" fo:country="none" fo:font-weight="bold" style:font-size-asian="9pt" style:language-asian="zxx" style:country-asian="none" style:font-weight-asian="bold" style:language-complex="zxx" style:country-complex="none"/>
    </style:style>
    <style:style style:name="T40" style:family="text">
      <style:text-properties fo:color="#0066bb" loext:opacity="100%" style:font-name="Courier New" fo:font-size="9pt" fo:font-weight="bold" style:font-size-asian="9pt" style:font-weight-asian="bold"/>
    </style:style>
    <style:style style:name="T41" style:family="text">
      <style:text-properties fo:font-size="12pt" style:font-size-asian="12pt"/>
    </style:style>
    <style:style style:name="T42" style:family="text">
      <style:text-properties fo:color="#333333" loext:opacity="100%" style:font-name="Courier New" fo:font-size="9pt" style:font-size-asian="9pt"/>
    </style:style>
    <style:style style:name="T43" style:family="text">
      <style:text-properties officeooo:rsid="00b2f49e"/>
    </style:style>
    <style:style style:name="T44" style:family="text">
      <style:text-properties fo:color="#557799" loext:opacity="100%" style:font-name="Courier New" fo:font-size="9pt" style:font-size-asian="9pt"/>
    </style:style>
    <style:style style:name="T45" style:family="text">
      <style:text-properties fo:color="#0066bb" loext:opacity="100%" style:font-name="Courier New"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46" style:family="text">
      <style:text-properties fo:color="#0066bb" loext:opacity="100%" style:font-name="Courier New" fo:font-size="8pt" fo:font-weight="bold" officeooo:rsid="00b2f49e" style:font-size-asian="8pt" style:font-weight-asian="bold" style:font-size-complex="8pt" style:font-weight-complex="bold"/>
    </style:style>
    <style:style style:name="T47" style:family="text">
      <style:text-properties fo:color="#0066bb" loext:opacity="100%" style:font-name="Courier New" fo:font-size="8pt" fo:font-weight="bold" officeooo:rsid="000f71c7" style:font-size-asian="8pt" style:font-weight-asian="bold" style:font-size-complex="8pt" style:font-weight-complex="bold"/>
    </style:style>
    <style:style style:name="T48"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49" style:family="text">
      <style:text-properties officeooo:rsid="006304ed"/>
    </style:style>
    <style:style style:name="T50" style:family="text">
      <style:text-properties officeooo:rsid="00b0e91b"/>
    </style:style>
    <style:style style:name="T51" style:family="text">
      <style:text-properties fo:color="#0066bb" loext:opacity="100%" style:font-name="Courier New" fo:font-size="9pt" fo:font-weight="bold" officeooo:rsid="0004ca2f" style:font-size-asian="9pt" style:font-weight-asian="bold"/>
    </style:style>
    <style:style style:name="T52" style:family="text">
      <style:text-properties fo:color="#0066bb" loext:opacity="100%" style:font-name="Courier New" fo:font-size="9pt" fo:font-weight="bold" officeooo:rsid="00b0e91b" style:font-size-asian="9pt" style:font-weight-asian="bold"/>
    </style:style>
    <style:style style:name="T53" style:family="text">
      <style:text-properties officeooo:rsid="00b1d4c2"/>
    </style:style>
    <style:style style:name="T54" style:family="text">
      <style:text-properties fo:color="#0066bb" loext:opacity="100%" style:font-name="Courier New" fo:font-size="8pt" fo:font-weight="bold" officeooo:rsid="0001435d" style:font-size-asian="8pt" style:font-weight-asian="bold" style:font-size-complex="8pt" style:font-weight-complex="bold"/>
    </style:style>
    <style:style style:name="T55" style:family="text">
      <style:text-properties fo:color="#0066bb" loext:opacity="100%" style:font-name="Courier New" fo:font-size="8pt" fo:language="en" fo:country="US" fo:font-weight="bold" officeooo:rsid="0001435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56" style:family="text">
      <style:text-properties fo:color="#0066bb" loext:opacity="100%" style:font-name="Courier New" fo:font-size="8pt" fo:font-weight="bold" officeooo:rsid="00b0e91b" style:font-size-asian="8pt" style:font-weight-asian="bold" style:font-size-complex="8pt" style:font-weight-complex="bold"/>
    </style:style>
    <style:style style:name="T57" style:family="text">
      <style:text-properties fo:color="#0066bb" loext:opacity="100%" style:font-name="Courier New" fo:font-size="8pt" fo:font-weight="bold" officeooo:rsid="00b1d4c2" style:font-size-asian="8pt" style:font-weight-asian="bold" style:font-size-complex="8pt" style:font-weight-complex="bold"/>
    </style:style>
    <style:style style:name="T58" style:family="text">
      <style:text-properties officeooo:rsid="0004ca2f"/>
    </style:style>
    <style:style style:name="T59" style:family="text">
      <style:text-properties fo:color="#0066bb" loext:opacity="100%" style:font-name="Courier New" fo:font-size="8pt" fo:font-weight="bold" officeooo:rsid="0004ca2f" style:font-size-asian="8pt" style:font-weight-asian="bold" style:font-size-complex="8pt" style:font-weight-complex="bold"/>
    </style:style>
    <style:style style:name="T60" style:family="text">
      <style:text-properties fo:color="#0066bb" loext:opacity="100%" style:font-name="Courier New" fo:font-size="8pt" fo:font-weight="bold" style:font-size-asian="8pt" style:font-weight-asian="bold" style:font-size-complex="8pt" style:font-weight-complex="bold"/>
    </style:style>
    <style:style style:name="T61" style:family="text">
      <style:text-properties fo:color="#333333" loext:opacity="100%" style:font-name="Courier New" fo:font-size="8pt" style:font-name-asian="Times New Roman1" style:font-size-asian="8pt" style:language-asian="en" style:country-asian="US" style:font-name-complex="Courier New1" style:font-size-complex="9pt"/>
    </style:style>
    <style:style style:name="T62" style:family="text">
      <style:text-properties fo:color="#333399" loext:opacity="100%" style:font-name="Courier New" fo:font-size="8pt" fo:font-weight="bold" style:font-size-asian="8pt" style:font-weight-asian="bold"/>
    </style:style>
    <style:style style:name="T63" style:family="text">
      <style:text-properties fo:color="#333333" loext:opacity="100%" style:font-name="Courier New" fo:font-size="8pt" style:font-size-asian="8pt"/>
    </style:style>
    <style:style style:name="T64" style:family="text">
      <style:text-properties fo:color="#333333" loext:opacity="100%" style:font-name="Courier New" fo:font-size="9pt" fo:language="en" fo:country="US" style:font-name-asian="Times New Roman1" style:font-size-asian="9pt" style:language-asian="en" style:country-asian="US" style:font-size-complex="9pt"/>
    </style:style>
    <style:style style:name="T65" style:family="text">
      <style:text-properties fo:color="#333333" loext:opacity="100%" style:font-name="Courier New" fo:font-size="8pt" officeooo:rsid="0011241e" style:font-size-asian="8pt"/>
    </style:style>
    <style:style style:name="T66" style:family="text">
      <style:text-properties fo:color="#333333" loext:opacity="100%" style:font-name="Courier New" fo:font-size="9pt" fo:language="en" fo:country="US" officeooo:rsid="0011241e" style:font-name-asian="Times New Roman1" style:font-size-asian="9pt" style:language-asian="en" style:country-asian="US" style:font-size-complex="9pt"/>
    </style:style>
    <style:style style:name="T67" style:family="text">
      <style:text-properties fo:color="#007020" loext:opacity="100%" style:font-name="Courier New" fo:font-size="8pt" style:font-size-asian="8pt"/>
    </style:style>
    <style:style style:name="T68" style:family="text">
      <style:text-properties fo:color="#333333" loext:opacity="100%" style:font-name="Courier New" fo:font-size="8pt" officeooo:rsid="0007a9f7" style:font-name-asian="Times New Roman1" style:font-size-asian="8pt" style:language-asian="en" style:country-asian="US" style:font-name-complex="Courier New1" style:font-size-complex="9pt"/>
    </style:style>
    <style:style style:name="T69" style:family="text">
      <style:text-properties fo:color="#333333" loext:opacity="100%" style:font-name="Courier New" fo:font-size="8pt" officeooo:rsid="00260b7e" style:font-name-asian="Times New Roman1" style:font-size-asian="8pt" style:language-asian="en" style:country-asian="US" style:font-name-complex="Courier New1" style:font-size-complex="9pt"/>
    </style:style>
    <style:style style:name="T70" style:family="text">
      <style:text-properties officeooo:rsid="0007a9f7"/>
    </style:style>
    <style:style style:name="T71" style:family="text">
      <style:text-properties fo:language="en" fo:country="US" style:letter-kerning="false" style:language-complex="ar" style:country-complex="SA"/>
    </style:style>
    <style:style style:name="T72" style:family="text">
      <style:text-properties fo:color="#333399" loext:opacity="100%" style:font-name="Courier New" fo:font-size="9pt" fo:font-weight="bold" style:font-size-asian="9pt" style:font-weight-asian="bold"/>
    </style:style>
    <style:style style:name="T73" style:family="text">
      <style:text-properties style:font-name="Calibri"/>
    </style:style>
    <style:style style:name="T74" style:family="text">
      <style:text-properties fo:color="#0066bb"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5" style:family="text">
      <style:text-properties officeooo:rsid="0011241e"/>
    </style:style>
    <style:style style:name="T76" style:family="text">
      <style:text-properties fo:color="#333333" loext:opacity="100%"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77" style:family="text">
      <style:text-properties fo:color="#333333" loext:opacity="100%" style:font-name="Courier New" fo:font-size="8pt" style:font-name-asian="Times New Roman1" style:font-size-asian="8pt" style:language-asian="en" style:country-asian="US" style:font-name-complex="Courier New1" style:font-size-complex="8pt"/>
    </style:style>
    <style:style style:name="T78"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9" style:family="text">
      <style:text-properties fo:color="#333399"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80"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81" style:family="text">
      <style:text-properties fo:color="#333333" loext:opacity="100%" style:font-name="Courier New" fo:font-size="9pt" style:font-name-asian="Times New Roman1" style:font-size-asian="9pt" style:language-asian="en" style:country-asian="US" style:font-name-complex="Courier New1" style:font-size-complex="9pt"/>
    </style:style>
    <style:style style:name="T82"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83" style:family="text">
      <style:text-properties fo:color="#333333" loext:opacity="100%" style:font-name="Courier New" fo:font-size="9pt" officeooo:rsid="00392a6f" style:font-name-asian="Times New Roman1" style:font-size-asian="9pt" style:language-asian="en" style:country-asian="US" style:font-name-complex="Courier New1" style:font-size-complex="9pt"/>
    </style:style>
    <style:style style:name="T84" style:family="text">
      <style:text-properties fo:color="#008800" loext:opacity="100%" style:font-name="Courier New" fo:font-size="9pt" fo:font-weight="bold" style:font-size-asian="9pt" style:font-weight-asian="bold"/>
    </style:style>
    <style:style style:name="T85" style:family="text">
      <style:text-properties fo:color="#333399" loext:opacity="100%" style:font-name="Courier New" fo:font-size="8pt" fo:language="en" fo:country="US" fo:font-weight="bold" style:font-size-asian="8pt" style:font-weight-asian="bold" style:font-size-complex="8pt" style:font-weight-complex="bold"/>
    </style:style>
    <style:style style:name="T86" style:family="text">
      <style:text-properties fo:color="#333333" loext:opacity="100%" style:font-name="Courier New" fo:font-size="8pt" fo:language="en" fo:country="US" style:font-size-asian="8pt" style:font-size-complex="8pt"/>
    </style:style>
    <style:style style:name="T87" style:family="text">
      <style:text-properties fo:color="#333399" loext:opacity="100%" style:font-name="Courier New" fo:font-size="8pt"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88"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8pt"/>
    </style:style>
    <style:style style:name="T89" style:family="text">
      <style:text-properties fo:color="#333333" loext:opacity="100%" style:font-name="Courier New" fo:font-size="8pt" style:letter-kerning="false" style:font-name-asian="Arial Unicode MS1" style:font-size-asian="8pt" style:language-asian="ja" style:country-asian="JP" style:font-name-complex="Courier New1" style:font-size-complex="8pt" style:language-complex="ar" style:country-complex="SA"/>
    </style:style>
    <style:style style:name="T90" style:family="text">
      <style:text-properties fo:color="#008800"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91" style:family="text">
      <style:text-properties style:font-name="Arial" fo:font-size="11pt" fo:language="en" fo:country="US" style:font-name-asian="MS Mincho" style:font-size-asian="11pt" style:font-name-complex="Times New Roman1"/>
    </style:style>
    <style:style style:name="T92" style:family="text">
      <style:text-properties fo:color="#333333" loext:opacity="100%" style:font-name="Courier New" fo:font-size="8pt" fo:language="en" fo:country="US" style:font-name-asian="MS Mincho" style:font-size-asian="8pt" style:font-name-complex="Times New Roman1" style:font-size-complex="8pt"/>
    </style:style>
    <style:style style:name="T93" style:family="text">
      <style:text-properties fo:color="#0066bb" loext:opacity="100%" style:font-name="Courier New" fo:font-size="9pt" fo:language="en" fo:country="US" fo:font-weight="bold" style:font-name-asian="MS Mincho" style:font-size-asian="9pt" style:font-weight-asian="bold" style:font-name-complex="Times New Roman1"/>
    </style:style>
    <style:style style:name="T94" style:family="text">
      <style:text-properties style:font-name="Arial" fo:font-size="11pt" style:font-name-asian="MS Mincho" style:font-size-asian="11pt" style:font-name-complex="Times New Roman1"/>
    </style:style>
    <style:style style:name="T95" style:family="text">
      <style:text-properties fo:color="#008800"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6" style:family="text">
      <style:text-properties fo:color="#333333"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7" style:family="text">
      <style:text-properties fo:color="#008800"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98" style:family="text">
      <style:text-properties fo:color="#333333" loext:opacity="100%" style:font-name="Courier New" fo:font-size="8pt" style:font-size-asian="8pt" style:font-size-complex="8pt"/>
    </style:style>
    <style:style style:name="T99" style:family="text">
      <style:text-properties fo:color="#333333" loext:opacity="100%" style:font-name="Courier New" fo:font-size="8pt" fo:language="en" fo:country="US" style:letter-kerning="false" style:font-name-asian="Arial Unicode MS1" style:font-size-asian="8pt" style:language-asian="ja" style:country-asian="JP" style:font-name-complex="Courier New1" style:font-size-complex="8pt" style:language-complex="ar" style:country-complex="SA"/>
    </style:style>
    <style:style style:name="T100"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101" style:family="text">
      <style:text-properties fo:color="#333333" loext:opacity="100%" style:font-name="Courier New" fo:font-size="9pt" fo:language="en" fo:country="US" style:font-size-asian="9pt" style:font-size-complex="8pt"/>
    </style:style>
    <style:style style:name="T102" style:family="text">
      <style:text-properties fo:color="#008800" loext:opacity="100%" style:font-name="Courier New" fo:font-size="8pt" fo:language="en" fo:country="US" fo:font-weight="bold" style:font-size-asian="8pt" style:font-weight-asian="bold" style:font-size-complex="8pt" style:font-weight-complex="bold"/>
    </style:style>
    <style:style style:name="T103" style:family="text">
      <style:text-properties style:font-name="Arial" fo:font-size="11pt" fo:language="en" fo:country="US" officeooo:rsid="00ad4cc7" style:font-name-asian="MS Mincho" style:font-size-asian="11pt" style:font-name-complex="Times New Roman1"/>
    </style:style>
    <style:style style:name="T104" style:family="text">
      <style:text-properties style:font-name="Arial" fo:font-size="11pt" fo:language="en" fo:country="US" officeooo:rsid="00ade12d" style:font-name-asian="MS Mincho" style:font-size-asian="11pt" style:font-name-complex="Times New Roman1"/>
    </style:style>
    <style:style style:name="T105" style:family="text">
      <style:text-properties fo:color="#333333" loext:opacity="100%" style:font-name="Courier New" fo:font-size="8pt" style:font-name-asian="Times New Roman1" style:font-size-asian="8pt" style:language-asian="en" style:country-asian="US" style:font-size-complex="8pt"/>
    </style:style>
    <style:style style:name="T106" style:family="text">
      <style:text-properties fo:color="#333399" loext:opacity="100%" style:font-name="Courier New" fo:font-size="8pt" fo:language="en" fo:country="US" fo:font-weight="bold" style:font-size-asian="8pt" style:font-weight-asian="bold"/>
    </style:style>
    <style:style style:name="T107" style:family="text">
      <style:text-properties fo:color="#333333" loext:opacity="100%" style:font-name="Courier New" fo:font-size="9pt" style:font-name-asian="Times New Roman1" style:font-size-asian="9pt" style:language-asian="en" style:country-asian="US" style:font-name-complex="Courier New1"/>
    </style:style>
    <style:style style:name="T108" style:family="text">
      <style:text-properties fo:color="#333399" loext:opacity="100%" style:font-name="Courier New" fo:font-size="8pt" fo:font-weight="bold" style:font-name-asian="Arial Unicode MS1" style:font-size-asian="8pt" style:font-weight-asian="bold" style:font-name-complex="Courier New1" style:font-size-complex="9pt" style:font-weight-complex="bold"/>
    </style:style>
    <style:style style:name="T109" style:family="text">
      <style:text-properties fo:color="#007020" loext:opacity="100%" style:font-name="Courier New" fo:font-size="8pt" style:font-name-asian="Times New Roman1" style:font-size-asian="8pt" style:language-asian="en" style:country-asian="US" style:font-name-complex="Courier New1" style:font-size-complex="9pt"/>
    </style:style>
    <style:style style:name="T110"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9pt" style:font-weight-complex="bold"/>
    </style:style>
    <style:style style:name="T111"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9pt"/>
    </style:style>
    <style:style style:name="T112" style:family="text">
      <style:text-properties fo:color="#007020" loext:opacity="100%" style:font-name="Courier New" fo:font-size="8pt" fo:language="fr" fo:country="FR" style:font-name-asian="Times New Roman1" style:font-size-asian="8pt" style:language-asian="en" style:country-asian="US" style:font-name-complex="Courier New1" style:font-size-complex="9pt"/>
    </style:style>
    <style:style style:name="T113"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4"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9pt" style:font-weight-complex="bold"/>
    </style:style>
    <style:style style:name="T115"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6" style:family="text">
      <style:text-properties fo:color="#0000dd"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7" style:family="text">
      <style:text-properties fo:color="#333333" loext:opacity="100%" style:font-name="Courier New" fo:font-size="8pt" style:font-name-asian="Times New Roman1" style:font-size-asian="8pt" style:language-asian="en" style:country-asian="US" style:font-name-complex="Courier New1"/>
    </style:style>
    <style:style style:name="T118" style:family="text">
      <style:text-properties officeooo:rsid="00b081ee"/>
    </style:style>
    <style:style style:name="T119" style:family="text">
      <style:text-properties officeooo:rsid="00364074"/>
    </style:style>
    <style:style style:name="T120" style:family="text">
      <style:text-properties officeooo:rsid="000cf4ff"/>
    </style:style>
    <style:style style:name="T121"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22" style:family="text">
      <style:text-properties style:font-name="Arial" fo:font-size="11pt" fo:language="en" fo:country="US" officeooo:rsid="00cdce45" style:font-name-asian="MS Mincho" style:font-size-asian="11pt" style:font-name-complex="Times New Roman1"/>
    </style:style>
    <style:style style:name="T123" style:family="text">
      <style:text-properties fo:color="#333333" loext:opacity="100%" style:font-name="Courier New" fo:font-size="8pt" fo:language="en" fo:country="US" officeooo:rsid="00ccb6b5" style:letter-kerning="false" style:font-name-asian="Arial Unicode MS1" style:font-size-asian="8pt" style:language-asian="ja" style:country-asian="JP" style:font-name-complex="Courier New1" style:font-size-complex="8pt" style:language-complex="ar" style:country-complex="SA"/>
    </style:style>
    <style:style style:name="T124" style:family="text">
      <style:text-properties fo:color="#008800" loext:opacity="100%" style:font-name="Courier New" fo:font-size="8pt" fo:font-weight="bold" style:font-size-asian="8pt" style:font-weight-asian="bold" style:font-size-complex="8pt" style:font-weight-complex="bold"/>
    </style:style>
    <style:style style:name="T125" style:family="text">
      <style:text-properties officeooo:rsid="00cb12d9"/>
    </style:style>
    <style:style style:name="T126" style:family="text">
      <style:text-properties fo:color="#333333" loext:opacity="100%" style:font-name="Courier New" fo:font-size="8pt" officeooo:rsid="00cb12d9" style:font-size-asian="8pt" style:font-size-complex="8pt"/>
    </style:style>
    <style:style style:name="T127" style:family="text">
      <style:text-properties fo:color="#333333" loext:opacity="100%" style:font-name="Courier New" fo:font-size="8pt" style:letter-kerning="false" style:font-size-asian="8pt" style:language-asian="ja" style:country-asian="JP" style:font-size-complex="8pt" style:language-complex="ar" style:country-complex="SA"/>
    </style:style>
    <style:style style:name="T128" style:family="text">
      <style:text-properties fo:color="#333333" loext:opacity="100%" style:font-name="Courier New" fo:font-size="8pt" officeooo:rsid="00cb12d9" style:letter-kerning="false" style:font-size-asian="8pt" style:language-asian="ja" style:country-asian="JP" style:font-size-complex="8pt" style:language-complex="ar" style:country-complex="SA"/>
    </style:style>
    <style:style style:name="T129" style:family="text">
      <style:text-properties fo:color="#333333" loext:opacity="100%" style:font-name="Courier New" fo:font-size="8pt" fo:language="zxx" fo:country="none" style:font-size-asian="8pt" style:language-asian="zxx" style:country-asian="none" style:font-size-complex="8pt" style:language-complex="zxx" style:country-complex="none"/>
    </style:style>
    <style:style style:name="T130" style:family="text">
      <style:text-properties officeooo:rsid="00c8a0e2"/>
    </style:style>
    <style:style style:name="T131" style:family="text">
      <style:text-properties officeooo:rsid="00d0cd10"/>
    </style:style>
    <style:style style:name="T132" style:family="text">
      <style:text-properties fo:color="#0066bb" loext:opacity="100%" style:font-name="Courier New" fo:font-size="8pt" fo:font-weight="bold" officeooo:rsid="00d0cd10" style:font-name-asian="Arial Unicode MS1" style:font-size-asian="8pt" style:language-asian="ja" style:country-asian="JP" style:font-weight-asian="bold" style:font-name-complex="Courier New1" style:font-size-complex="8pt" style:font-weight-complex="bold"/>
    </style:style>
    <style:style style:name="T133" style:family="text">
      <style:text-properties fo:color="#333333" loext:opacity="100%" style:font-name="Courier New" fo:font-size="8pt" officeooo:rsid="00c7b5aa" style:font-size-asian="8pt" style:font-size-complex="8pt"/>
    </style:style>
    <style:style style:name="T134" style:family="text">
      <style:text-properties officeooo:rsid="00cdce45"/>
    </style:style>
    <style:style style:name="T135" style:family="text">
      <style:text-properties fo:color="#008800"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136"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137"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38" style:family="text">
      <style:text-properties style:font-name="Arial" fo:font-size="11pt" fo:language="en" fo:country="US" officeooo:rsid="000c44fe" style:font-name-asian="MS Mincho" style:font-size-asian="11pt" style:font-name-complex="Times New Roman1"/>
    </style:style>
    <style:style style:name="T139" style:family="text">
      <style:text-properties fo:color="#333399" loext:opacity="100%" style:font-name="Courier New" fo:font-size="8pt" fo:language="en" fo:country="US" fo:font-weight="bold" style:font-name-asian="MS Mincho" style:font-size-asian="8pt" style:font-weight-asian="bold" style:font-name-complex="Times New Roman1" style:font-size-complex="8pt" style:font-weight-complex="bold"/>
    </style:style>
    <style:style style:name="T140" style:family="text">
      <style:text-properties fo:color="#333333" loext:opacity="100%" style:font-name="Courier New" fo:font-size="9pt" style:font-name-asian="Times New Roman1" style:font-size-asian="9pt" style:language-asian="en" style:country-asian="US"/>
    </style:style>
    <style:style style:name="T141" style:family="text">
      <style:text-properties fo:color="#333333" loext:opacity="100%" style:font-name="Courier New" fo:font-size="9pt" fo:language="en" fo:country="US" style:font-name-asian="Times New Roman1" style:font-size-asian="9pt" style:language-asian="en" style:country-asian="US"/>
    </style:style>
    <style:style style:name="T142" style:family="text">
      <style:text-properties fo:color="#333333" loext:opacity="100%" style:font-name="Courier New" fo:font-size="9pt" fo:language="zxx" fo:country="none" style:font-name-asian="Times New Roman1" style:font-size-asian="9pt" style:language-asian="zxx" style:country-asian="none" style:font-name-complex="Courier New1" style:font-size-complex="9pt" style:language-complex="zxx" style:country-complex="none"/>
    </style:style>
    <style:style style:name="T143" style:family="text">
      <style:text-properties fo:color="#333333"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44" style:family="text">
      <style:text-properties fo:color="#0000dd"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45" style:family="text">
      <style:text-properties fo:color="#008800" loext:opacity="100%" style:font-name="Courier New" fo:font-size="9pt" fo:font-weight="bold" style:font-name-asian="Times New Roman1" style:font-size-asian="9pt" style:language-asian="en" style:country-asian="US" style:font-weight-asian="bold" style:font-size-complex="9pt" style:font-weight-complex="bold"/>
    </style:style>
    <style:style style:name="T146" style:family="text">
      <style:text-properties fo:color="#333333" loext:opacity="100%" style:font-name="Courier New" fo:font-size="9pt" style:font-name-asian="Times New Roman1" style:font-size-asian="9pt" style:language-asian="en" style:country-asian="US" style:font-size-complex="9pt"/>
    </style:style>
    <style:style style:name="T147" style:family="text">
      <style:text-properties fo:color="#333333" loext:opacity="100%" style:font-name="Courier New" fo:font-size="9pt" style:font-size-asian="9pt" style:font-size-complex="9pt"/>
    </style:style>
    <style:style style:name="T148" style:family="text">
      <style:text-properties officeooo:rsid="00ade12d"/>
    </style:style>
    <style:style style:name="T149" style:family="text">
      <style:text-properties fo:color="#0066bb" loext:opacity="100%" style:font-name="Courier New" fo:font-size="8pt" fo:font-weight="bold" officeooo:rsid="000cf4ff" style:font-size-asian="8pt" style:font-weight-asian="bold" style:font-size-complex="8pt" style:font-weight-complex="bold"/>
    </style:style>
    <style:style style:name="T150" style:family="text">
      <style:text-properties fo:color="#333399" loext:opacity="100%" style:font-name="Courier New" fo:font-size="8pt" fo:language="en" fo:country="US" fo:font-weight="bold" officeooo:rsid="000f71c7" style:font-size-asian="8pt" style:font-weight-asian="bold" style:font-size-complex="8pt" style:font-weight-complex="bold"/>
    </style:style>
    <style:style style:name="T151" style:family="text">
      <style:text-properties style:font-name="Arial" fo:font-size="11pt" fo:language="en" fo:country="US" officeooo:rsid="000f71c7" style:font-name-asian="MS Mincho" style:font-size-asian="11pt" style:font-name-complex="Times New Roman1"/>
    </style:style>
    <style:style style:name="T152" style:family="text">
      <style:text-properties style:font-name="Arial" fo:font-size="11pt" fo:language="en" fo:country="US" officeooo:rsid="000da6e4" style:font-name-asian="MS Mincho" style:font-size-asian="11pt" style:font-name-complex="Times New Roman1"/>
    </style:style>
    <style:style style:name="T153" style:family="text">
      <style:text-properties fo:color="#333333" loext:opacity="100%" style:font-name="Courier New" fo:font-size="8pt" fo:language="en" fo:country="US" officeooo:rsid="000da6e4" style:font-size-asian="8pt" style:font-size-complex="8pt"/>
    </style:style>
    <style:style style:name="T154"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55" style:family="text">
      <style:text-properties fo:color="#0066bb" loext:opacity="100%" style:font-name="Courier New" fo:font-size="8pt" fo:font-weight="bold" officeooo:rsid="004493c2" style:font-size-asian="8pt" style:font-weight-asian="bold" style:font-size-complex="8pt" style:font-weight-complex="bold"/>
    </style:style>
    <style:style style:name="T156" style:family="text">
      <style:text-properties officeooo:rsid="004493c2"/>
    </style:style>
    <style:style style:name="T157" style:family="text">
      <style:text-properties fo:color="#333333" loext:opacity="100%" style:font-name="Courier New" fo:font-size="9pt" officeooo:rsid="004493c2" style:font-name-asian="Times New Roman1" style:font-size-asian="9pt" style:language-asian="en" style:country-asian="US" style:font-name-complex="Courier New1" style:font-size-complex="9pt"/>
    </style:style>
    <style:style style:name="T158" style:family="text">
      <style:text-properties fo:color="#0066bb" loext:opacity="100%" style:font-name="Courier New"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59"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160" style:family="text">
      <style:text-properties style:font-name="Arial" fo:font-size="11pt" fo:language="en" fo:country="US" officeooo:rsid="004493c2" style:font-name-asian="MS Mincho" style:font-size-asian="11pt" style:font-name-complex="Times New Roman1"/>
    </style:style>
    <style:style style:name="T161" style:family="text">
      <style:text-properties style:font-name="Arial" fo:font-size="11pt" fo:language="en" fo:country="US" officeooo:rsid="0056a4ad" style:font-name-asian="MS Mincho" style:font-size-asian="11pt" style:font-name-complex="Times New Roman1"/>
    </style:style>
    <style:style style:name="T162" style:family="text">
      <style:text-properties fo:language="zxx" fo:country="none" officeooo:rsid="00e9124b" style:language-asian="zxx" style:country-asian="none" style:language-complex="zxx" style:country-complex="none"/>
    </style:style>
    <style:style style:name="T163" style:family="text">
      <style:text-properties fo:language="zxx" fo:country="none" officeooo:rsid="00dfbd90" style:language-asian="zxx" style:country-asian="none" style:language-complex="zxx" style:country-complex="none"/>
    </style:style>
    <style:style style:name="T164" style:family="text">
      <style:text-properties fo:color="#0066bb"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65" style:family="text">
      <style:text-properties officeooo:rsid="00c27334"/>
    </style:style>
    <style:style style:name="T166" style:family="text">
      <style:text-properties fo:color="#0066bb"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167" style:family="text">
      <style:text-properties officeooo:rsid="004f5c3c"/>
    </style:style>
    <style:style style:name="T168" style:family="text">
      <style:text-properties officeooo:rsid="004da601"/>
    </style:style>
    <style:style style:name="T169" style:family="text">
      <style:text-properties style:use-window-font-color="true" loext:opacity="0%" officeooo:rsid="004da601" style:letter-kerning="false" style:language-asian="ja" style:country-asian="JP" style:language-complex="ar" style:country-complex="SA"/>
    </style:style>
    <style:style style:name="T170" style:family="text">
      <style:text-properties officeooo:rsid="00644895"/>
    </style:style>
    <style:style style:name="T171" style:family="text">
      <style:text-properties officeooo:rsid="00e1a953"/>
    </style:style>
    <style:style style:name="T172" style:family="text">
      <style:text-properties style:font-name="Arial" fo:font-size="10.5pt" fo:language="en" fo:country="US" style:font-name-asian="MS Mincho" style:font-size-asian="10.5pt" style:font-name-complex="Times New Roman1" style:font-size-complex="10.5pt"/>
    </style:style>
    <style:style style:name="T173" style:family="text">
      <style:text-properties style:font-name="Arial" fo:font-size="10.5pt" fo:language="en" fo:country="US" officeooo:rsid="00a69d28" style:font-name-asian="MS Mincho" style:font-size-asian="10.5pt" style:font-name-complex="Times New Roman1" style:font-size-complex="10.5pt"/>
    </style:style>
    <style:style style:name="T174" style:family="text">
      <style:text-properties style:font-name="Arial" fo:font-size="10.5pt" fo:language="en" fo:country="US" officeooo:rsid="00db75a9" style:font-name-asian="MS Mincho" style:font-size-asian="10.5pt" style:font-name-complex="Times New Roman1" style:font-size-complex="10.5pt"/>
    </style:style>
    <style:style style:name="T175" style:family="text">
      <style:text-properties fo:color="#333333" loext:opacity="100%" style:font-name="Courier New" fo:font-size="10.5pt" fo:language="en" fo:country="US" style:font-size-asian="10.5pt" style:font-size-complex="10.5pt"/>
    </style:style>
    <style:style style:name="T176" style:family="text">
      <style:text-properties fo:color="#333333" loext:opacity="100%" style:font-name="Courier New" fo:font-size="8pt" fo:language="zxx" fo:country="none" style:letter-kerning="false" style:font-name-asian="Arial Unicode MS1" style:font-size-asian="8pt" style:language-asian="zxx" style:country-asian="none" style:font-name-complex="Courier New1" style:font-size-complex="8pt" style:language-complex="zxx" style:country-complex="none"/>
    </style:style>
    <style:style style:name="T177" style:family="text">
      <style:text-properties officeooo:rsid="00e034e5"/>
    </style:style>
    <style:style style:name="T178" style:family="text">
      <style:text-properties officeooo:rsid="00e9124b"/>
    </style:style>
    <style:style style:name="T179" style:family="text">
      <style:text-properties officeooo:rsid="00dfbd90"/>
    </style:style>
    <style:style style:name="T180" style:family="text">
      <style:text-properties officeooo:rsid="00dfad1d"/>
    </style:style>
    <style:style style:name="T181" style:family="text">
      <style:text-properties officeooo:rsid="00dde4c0"/>
    </style:style>
    <style:style style:name="T182" style:family="text">
      <style:text-properties fo:color="#333333" loext:opacity="100%" style:font-name="Courier New" fo:font-size="8pt" fo:language="en" fo:country="US" officeooo:rsid="00dde4c0" style:font-size-asian="8pt" style:font-size-complex="8pt"/>
    </style:style>
    <style:style style:name="T183" style:family="text">
      <style:text-properties fo:color="#333333" loext:opacity="100%" style:font-name="Courier New" fo:font-size="8pt" officeooo:rsid="00dde4c0" style:font-size-asian="8pt" style:font-size-complex="8pt"/>
    </style:style>
    <style:style style:name="T184" style:family="text">
      <style:text-properties fo:color="#333333" loext:opacity="100%" style:font-name="Courier New" fo:font-size="8pt" fo:language="zxx" fo:country="none" officeooo:rsid="00dde4c0" style:font-size-asian="8pt" style:language-asian="zxx" style:country-asian="none" style:font-size-complex="8pt" style:language-complex="zxx" style:country-complex="none"/>
    </style:style>
    <style:style style:name="T185" style:family="text">
      <style:text-properties fo:color="#0066bb" loext:opacity="100%" style:font-name="Courier New" fo:font-size="8pt" fo:font-weight="bold" officeooo:rsid="00dde4c0" style:font-size-asian="8pt" style:font-weight-asian="bold" style:font-size-complex="8pt" style:font-weight-complex="bold"/>
    </style:style>
    <style:style style:name="T186" style:family="text">
      <style:text-properties style:font-name="Arial" fo:font-size="11pt" fo:language="en" fo:country="US" officeooo:rsid="00dde4c0" style:font-name-asian="MS Mincho" style:font-size-asian="11pt" style:font-name-complex="Times New Roman1"/>
    </style:style>
    <style:style style:name="T187" style:family="text">
      <style:text-properties fo:color="#0066bb" loext:opacity="100%" style:font-name="Courier New" fo:font-size="8pt" fo:language="en" fo:country="US" fo:font-weight="bold" officeooo:rsid="00dde4c0"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88" style:family="text">
      <style:text-properties fo:color="#0066bb" loext:opacity="100%" style:font-name="Courier New" fo:font-size="8pt" fo:language="en" fo:country="US" fo:font-weight="bold" officeooo:rsid="00dde4c0" style:font-name-asian="MS Mincho" style:font-size-asian="8pt" style:font-weight-asian="bold" style:font-name-complex="Times New Roman1" style:font-size-complex="8pt" style:font-weight-complex="bold"/>
    </style:style>
    <style:style style:name="T189" style:family="text">
      <style:text-properties fo:color="#0066bb" loext:opacity="100%" style:font-name="Courier New" fo:font-size="8pt" fo:font-weight="bold" officeooo:rsid="00b081ee" style:font-size-asian="8pt" style:font-weight-asian="bold" style:font-size-complex="8pt" style:font-weight-complex="bold"/>
    </style:style>
    <style:style style:name="T190" style:family="text">
      <style:text-properties officeooo:rsid="00b44acc"/>
    </style:style>
    <style:style style:name="T191"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192" style:family="text">
      <style:text-properties fo:color="#0066bb" loext:opacity="100%" style:font-name="Courier New" fo:font-size="8pt" fo:font-weight="bold" officeooo:rsid="00b44acc" style:font-size-asian="8pt" style:font-weight-asian="bold" style:font-size-complex="8pt" style:font-weight-complex="bold"/>
    </style:style>
    <style:style style:name="T193" style:family="text">
      <style:text-properties fo:color="#333333" loext:opacity="100%" style:font-name="Courier New" fo:font-size="8pt" officeooo:rsid="00b44acc" style:font-size-asian="8pt" style:font-size-complex="8pt"/>
    </style:style>
    <style:style style:name="T194" style:family="text">
      <style:text-properties fo:color="#333333" loext:opacity="100%" style:font-name="Courier New" fo:font-size="8pt" officeooo:rsid="00dfad1d" style:font-size-asian="8pt" style:font-size-complex="8pt"/>
    </style:style>
    <style:style style:name="T195" style:family="text">
      <style:text-properties fo:color="#0066bb" loext:opacity="100%" style:font-name="Courier New" fo:font-size="8pt" fo:font-weight="bold" officeooo:rsid="00dfad1d" style:font-size-asian="8pt" style:font-weight-asian="bold" style:font-size-complex="8pt" style:font-weight-complex="bold"/>
    </style:style>
    <style:style style:name="T196" style:family="text">
      <style:text-properties fo:color="#333399" loext:opacity="100%" style:font-name="Courier New" fo:font-size="8pt" fo:language="en" fo:country="US" fo:font-weight="bold" officeooo:rsid="00b44acc" style:font-size-asian="8pt" style:font-weight-asian="bold" style:font-size-complex="8pt" style:font-weight-complex="bold"/>
    </style:style>
    <style:style style:name="T197" style:family="text">
      <style:text-properties fo:color="#0066bb" loext:opacity="100%" style:font-name="Courier New" fo:font-size="8pt" fo:language="zxx" fo:country="none" fo:font-weight="bold" officeooo:rsid="00dfbd90" style:font-size-asian="8pt" style:language-asian="zxx" style:country-asian="none" style:font-weight-asian="bold" style:font-size-complex="8pt" style:language-complex="zxx" style:country-complex="none" style:font-weight-complex="bold"/>
    </style:style>
    <style:style style:name="T198" style:family="text">
      <style:text-properties officeooo:rsid="00e969d9"/>
    </style:style>
    <style:style style:name="T199" style:family="text">
      <style:text-properties fo:color="#333333" loext:opacity="100%" style:font-name="Courier New" fo:font-size="8pt" fo:language="zxx" fo:country="none" officeooo:rsid="00dfbd90" style:font-size-asian="8pt" style:language-asian="zxx" style:country-asian="none" style:font-size-complex="8pt" style:language-complex="zxx" style:country-complex="none"/>
    </style:style>
    <style:style style:name="T200" style:family="text">
      <style:text-properties fo:color="#333399" loext:opacity="100%" style:font-name="Courier New" fo:font-size="8pt" fo:language="en" fo:country="US" fo:font-weight="bold" style:letter-kerning="false" style:font-name-asian="Arial Unicode MS1" style:font-size-asian="8pt" style:language-asian="ja" style:country-asian="JP" style:font-weight-asian="bold" style:font-name-complex="Courier New1" style:font-size-complex="8pt" style:language-complex="ar" style:country-complex="SA" style:font-weight-complex="bold"/>
    </style:style>
    <style:style style:name="T201" style:family="text">
      <style:text-properties officeooo:rsid="004e1b66"/>
    </style:style>
    <style:style style:name="T202" style:family="text">
      <style:text-properties officeooo:rsid="00de8179"/>
    </style:style>
    <style:style style:name="T203"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04" style:family="text">
      <style:text-properties officeooo:rsid="00af3c3c"/>
    </style:style>
    <style:style style:name="T205" style:family="text">
      <style:text-properties fo:color="#0066bb" loext:opacity="100%" style:font-name="Courier New" fo:font-size="8pt" fo:font-weight="bold" officeooo:rsid="004e1b66" style:font-size-asian="8pt" style:font-weight-asian="bold" style:font-size-complex="8pt" style:font-weight-complex="bold"/>
    </style:style>
    <style:style style:name="T206" style:family="text">
      <style:text-properties fo:color="#333333" loext:opacity="100%" style:font-name="Courier New" fo:font-size="8pt" fo:language="en" fo:country="US" fo:font-weight="normal" officeooo:rsid="004da601" style:letter-kerning="false" style:font-name-asian="Arial Unicode MS1" style:font-size-asian="8pt" style:language-asian="ja" style:country-asian="JP" style:font-weight-asian="normal" style:font-name-complex="Courier New1" style:font-size-complex="8pt" style:language-complex="ar" style:country-complex="SA" style:font-weight-complex="normal"/>
    </style:style>
    <style:style style:name="T207" style:family="text">
      <style:text-properties fo:color="#333333" loext:opacity="100%" style:font-name="Courier New" fo:font-size="8pt" fo:language="en" fo:country="US" officeooo:rsid="004da601" style:letter-kerning="false" style:font-name-asian="Arial Unicode MS1" style:font-size-asian="8pt" style:language-asian="ja" style:country-asian="JP" style:font-name-complex="Courier New1" style:font-size-complex="8pt" style:language-complex="ar" style:country-complex="SA"/>
    </style:style>
    <style:style style:name="T208" style:family="text">
      <style:text-properties fo:color="#333333" loext:opacity="100%" style:font-name="Arial" fo:font-size="11pt" fo:language="en" fo:country="US" officeooo:rsid="00ad4cc7" style:font-name-asian="MS Mincho" style:font-size-asian="11pt" style:font-name-complex="Times New Roman1"/>
    </style:style>
    <style:style style:name="T209" style:family="text">
      <style:text-properties fo:color="#333333" loext:opacity="100%" style:font-name="Arial" fo:font-size="11pt" fo:language="en" fo:country="US" officeooo:rsid="00af3c3c" style:font-name-asian="MS Mincho" style:font-size-asian="11pt" style:font-name-complex="Times New Roman1"/>
    </style:style>
    <style:style style:name="T210"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11" style:family="text">
      <style:text-properties fo:color="#007020" loext:opacity="100%" style:font-name="Courier New" fo:font-size="8pt" style:font-name-asian="Times New Roman1" style:font-size-asian="8pt" style:language-asian="en" style:country-asian="US" style:font-name-complex="Courier New1" style:font-size-complex="8pt"/>
    </style:style>
    <style:style style:name="T212"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13" style:family="text">
      <style:text-properties fo:color="#333333" loext:opacity="100%" style:font-name="Courier New" fo:font-size="8pt" fo:language="zxx" fo:country="none" style:font-name-asian="Times New Roman1" style:font-size-asian="8pt" style:language-asian="zxx" style:country-asian="none" style:font-name-complex="Courier New1" style:font-size-complex="8pt" style:language-complex="zxx" style:country-complex="none"/>
    </style:style>
    <style:style style:name="T214" style:family="text">
      <style:text-properties officeooo:rsid="00ad4cc7"/>
    </style:style>
    <style:style style:name="T215" style:family="text">
      <style:text-properties officeooo:rsid="0022d6c9"/>
    </style:style>
    <style:style style:name="T216"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17"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18" style:family="text">
      <style:text-properties fo:color="#0066bb" loext:opacity="100%" style:font-name="Courier New"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219" style:family="text">
      <style:text-properties fo:color="#0066bb" loext:opacity="100%" style:font-name="Courier New" fo:font-size="8pt" fo:language="zxx" fo:country="none" fo:font-style="normal" fo:font-weight="normal" style:letter-kerning="false" style:font-name-asian="MS Mincho" style:font-size-asian="8pt" style:language-asian="zxx" style:country-asian="none" style:font-style-asian="normal" style:font-weight-asian="normal" style:font-name-complex="Times New Roman1" style:font-size-complex="8pt" style:language-complex="zxx" style:country-complex="none" style:font-style-complex="normal" style:font-weight-complex="normal"/>
    </style:style>
    <style:style style:name="T220" style:family="text">
      <style:text-properties style:use-window-font-color="true" loext:opacity="0%" style:font-name="Arial" fo:font-size="12pt" fo:language="en" fo:country="US" fo:font-style="normal" fo:font-weight="normal" officeooo:rsid="00c01f80"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1"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2"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3" style:family="text">
      <style:text-properties fo:color="#888888" loext:opacity="100%" style:font-name="Courier New" fo:font-size="8pt" fo:language="en" fo:country="US" style:font-size-asian="8pt" style:font-size-complex="8pt"/>
    </style:style>
    <style:style style:name="T224"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5"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6"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7" style:family="text">
      <style:text-properties officeooo:rsid="0001435d"/>
    </style:style>
    <style:style style:name="T228"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29" style:family="text">
      <style:text-properties officeooo:rsid="0049cb2e"/>
    </style:style>
    <style:style style:name="T230" style:family="text">
      <style:text-properties officeooo:rsid="004c190f"/>
    </style:style>
    <style:style style:name="T231" style:family="text">
      <style:text-properties officeooo:rsid="00b5d8fd"/>
    </style:style>
    <style:style style:name="T232"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33" style:family="text">
      <style:text-properties fo:color="#0066bb" loext:opacity="100%" style:font-name="Courier New" fo:font-size="8pt" fo:language="zxx" fo:country="none" fo:font-weight="bold" officeooo:rsid="00b5d8fd" style:letter-kerning="false" style:font-name-asian="MS Mincho" style:font-size-asian="8pt" style:language-asian="zxx" style:country-asian="none" style:font-weight-asian="bold" style:font-name-complex="Times New Roman1" style:font-size-complex="8pt" style:language-complex="zxx" style:country-complex="none" style:font-weight-complex="bold"/>
    </style:style>
    <style:style style:name="T234" style:family="text">
      <style:text-properties officeooo:rsid="00ba7d78"/>
    </style:style>
    <style:style style:name="T235" style:family="text">
      <style:text-properties fo:color="#0066bb" loext:opacity="100%" style:font-name="Courier New" fo:font-size="9pt" fo:font-weight="bold" officeooo:rsid="0049cb2e" style:font-size-asian="9pt" style:font-weight-asian="bold"/>
    </style:style>
    <style:style style:name="T236" style:family="text">
      <style:text-properties officeooo:rsid="004bad87"/>
    </style:style>
    <style:style style:name="T237" style:family="text">
      <style:text-properties fo:color="#0066bb" loext:opacity="100%" style:font-name="Courier New" fo:font-size="8pt" fo:font-weight="bold" officeooo:rsid="004bad87" style:font-size-asian="8pt" style:font-weight-asian="bold" style:font-size-complex="8pt" style:font-weight-complex="bold"/>
    </style:style>
    <style:style style:name="T238" style:family="text">
      <style:text-properties fo:color="#0066bb" loext:opacity="100%" style:font-name="Courier New"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239" style:family="text">
      <style:text-properties fo:color="#333399" loext:opacity="100%" fo:language="en" fo:country="US" fo:font-weight="bold" style:letter-kerning="false" style:font-weight-asian="bold" style:language-complex="ar" style:country-complex="SA" style:font-weight-complex="bold"/>
    </style:style>
    <style:style style:name="T240" style:family="text">
      <style:text-properties fo:language="en" fo:country="US"/>
    </style:style>
    <style:style style:name="T241" style:family="text">
      <style:text-properties style:use-window-font-color="true" loext:opacity="0%" officeooo:rsid="004c190f" style:letter-kerning="false" style:language-asian="ja" style:country-asian="JP" style:font-size-complex="10pt" style:language-complex="ar" style:country-complex="SA"/>
    </style:style>
    <style:style style:name="T242"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43"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44" style:family="text">
      <style:text-properties fo:color="#333333" loext:opacity="100%" style:font-name="Courier New" fo:font-size="9pt" fo:language="en" fo:country="US" officeooo:rsid="0001435d" style:letter-kerning="false" style:font-name-asian="Times New Roman1" style:font-size-asian="9pt" style:language-asian="en" style:country-asian="US" style:font-name-complex="Courier New1" style:font-size-complex="9pt" style:language-complex="ar" style:country-complex="SA"/>
    </style:style>
    <style:style style:name="T245" style:family="text">
      <style:text-properties fo:color="#0066bb" loext:opacity="100%" style:font-name="Courier New"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46" style:family="text">
      <style:text-properties fo:color="#333399" loext:opacity="100%" style:font-name="Courier New" fo:font-size="8pt" fo:language="en" fo:country="US" fo:font-weight="bold" officeooo:rsid="000c44fe"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247" style:family="text">
      <style:text-properties style:use-window-font-color="true" loext:opacity="0%" officeooo:rsid="0052257d" style:letter-kerning="false" style:language-asian="ja" style:country-asian="JP" style:font-size-complex="10pt" style:language-complex="ar" style:country-complex="SA"/>
    </style:style>
    <style:style style:name="T248" style:family="text">
      <style:text-properties fo:color="#333399" loext:opacity="100%" fo:language="en" fo:country="US" fo:font-weight="bold" style:font-weight-asian="bold" style:font-weight-complex="bold"/>
    </style:style>
    <style:style style:name="T249" style:family="text">
      <style:text-properties style:use-window-font-color="true" loext:opacity="0%" officeooo:rsid="004f5c3c" style:letter-kerning="false" style:language-asian="ja" style:country-asian="JP" style:font-size-complex="10pt" style:language-complex="ar" style:country-complex="SA"/>
    </style:style>
    <style:style style:name="T250" style:family="text">
      <style:text-properties officeooo:rsid="0049bf95"/>
    </style:style>
    <style:style style:name="T251" style:family="text">
      <style:text-properties officeooo:rsid="0052257d"/>
    </style:style>
    <style:style style:name="T252" style:family="text">
      <style:text-properties officeooo:rsid="00534099"/>
    </style:style>
    <style:style style:name="T253" style:family="text">
      <style:text-properties officeooo:rsid="00571683"/>
    </style:style>
    <style:style style:name="T254" style:family="text">
      <style:text-properties fo:color="#008800" loext:opacity="100%" fo:language="en" fo:country="US" fo:font-weight="bold" style:letter-kerning="false" style:font-weight-asian="bold" style:language-complex="ar" style:country-complex="SA" style:font-weight-complex="bold"/>
    </style:style>
    <style:style style:name="T255" style:family="text">
      <style:text-properties officeooo:rsid="0056a4ad"/>
    </style:style>
    <style:style style:name="T256" style:family="text">
      <style:text-properties fo:language="en" fo:country="US" fo:font-weight="bold" style:font-weight-asian="bold" style:font-weight-complex="bold"/>
    </style:style>
    <style:style style:name="T257"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58"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59"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60"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61"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62" style:family="text">
      <style:text-properties officeooo:rsid="005c7ef1"/>
    </style:style>
    <style:style style:name="T263"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264" style:family="text">
      <style:text-properties officeooo:rsid="005be578"/>
    </style:style>
    <style:style style:name="T265" style:family="text">
      <style:text-properties fo:color="#333399" loext:opacity="100%" style:font-name="Courier New" fo:font-size="8pt" fo:language="en" fo:country="US" fo:font-weight="bold" officeooo:rsid="000c44fe" style:font-size-asian="8pt" style:font-weight-asian="bold" style:font-size-complex="8pt" style:font-weight-complex="bold"/>
    </style:style>
    <style:style style:name="T266" style:family="text">
      <style:text-properties officeooo:rsid="0001eb18"/>
    </style:style>
    <style:style style:name="T267" style:family="text">
      <style:text-properties fo:color="#888888" loext:opacity="100%" style:font-name="Courier New" fo:font-size="8pt" fo:language="zxx" fo:country="none" officeooo:rsid="0001eb18" style:font-size-asian="8pt" style:language-asian="zxx" style:country-asian="none" style:font-size-complex="8pt" style:language-complex="zxx" style:country-complex="none"/>
    </style:style>
    <style:style style:name="T268" style:family="text">
      <style:text-properties style:use-window-font-color="true" loext:opacity="0%" style:font-name="Arial" fo:font-size="11pt" fo:language="zxx" fo:country="none" officeooo:rsid="0001eb18" style:letter-kerning="false" style:font-name-asian="MS Mincho" style:font-size-asian="11pt" style:language-asian="zxx" style:country-asian="none" style:font-name-complex="Times New Roman1" style:font-size-complex="10pt" style:language-complex="zxx" style:country-complex="none"/>
    </style:style>
    <style:style style:name="T269" style:family="text">
      <style:text-properties fo:color="#888888" loext:opacity="100%" style:font-name="Courier New" fo:font-size="8pt" fo:language="zxx" fo:country="none" style:font-size-asian="8pt" style:language-asian="zxx" style:country-asian="none" style:font-size-complex="8pt" style:language-complex="zxx" style:country-complex="none"/>
    </style:style>
    <style:style style:name="T270" style:family="text">
      <style:text-properties fo:color="#888888" loext:opacity="100%" style:font-name="Courier New" fo:font-size="8pt" fo:language="zxx" fo:country="none" officeooo:rsid="00038220" style:font-size-asian="8pt" style:language-asian="zxx" style:country-asian="none" style:font-size-complex="8pt" style:language-complex="zxx" style:country-complex="none"/>
    </style:style>
    <style:style style:name="T271" style:family="text">
      <style:text-properties fo:color="#888888" loext:opacity="100%" style:font-name="Courier New" fo:font-size="8pt" style:font-size-asian="8pt" style:font-size-complex="8pt"/>
    </style:style>
    <style:style style:name="T272" style:family="text">
      <style:text-properties officeooo:rsid="00038220"/>
    </style:style>
    <style:style style:name="T273" style:family="text">
      <style:text-properties style:font-name="Arial" fo:font-size="11pt" fo:language="en" fo:country="US" officeooo:rsid="0001435d" style:font-name-asian="MS Mincho" style:font-size-asian="11pt" style:font-name-complex="Times New Roman1"/>
    </style:style>
    <style:style style:name="T274" style:family="text">
      <style:text-properties fo:color="#888888" loext:opacity="100%" style:font-name="Courier New" fo:font-size="8pt" fo:language="zxx" fo:country="none" officeooo:rsid="0001eb18" style:letter-kerning="false" style:font-name-asian="MS Mincho" style:font-size-asian="8pt" style:language-asian="zxx" style:country-asian="none" style:font-name-complex="Times New Roman1" style:font-size-complex="8pt" style:language-complex="zxx" style:country-complex="none"/>
    </style:style>
    <style:style style:name="T275" style:family="text">
      <style:text-properties fo:color="#888888" loext:opacity="100%"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76" style:family="text">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T277" style:family="text">
      <style:text-properties fo:color="#5577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78" style:family="text">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79"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80"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81"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weight-complex="bold"/>
    </style:style>
    <style:style style:name="T282" style:family="text">
      <style:text-properties fo:color="#333399"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83" style:family="text">
      <style:text-properties fo:color="#557799" loext:opacity="100%" style:font-name="Courier New" fo:font-size="8pt" style:font-name-asian="Times New Roman1" style:font-size-asian="8pt" style:font-name-complex="Courier New1" style:font-size-complex="8pt"/>
    </style:style>
    <style:style style:name="T284" style:family="text">
      <style:text-properties fo:color="#333333" loext:opacity="100%" style:font-name="Courier New" fo:font-size="8pt" style:font-name-asian="Times New Roman1" style:font-size-asian="8pt" style:font-name-complex="Courier New1"/>
    </style:style>
    <style:style style:name="T285" style:family="text">
      <style:text-properties fo:color="#008800"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86"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8pt" style:font-weight-complex="bold"/>
    </style:style>
    <style:style style:name="T287" style:family="text">
      <style:text-properties fo:color="#333399" loext:opacity="100%" style:font-name="Courier New" fo:font-size="8pt" fo:font-weight="bold" style:font-name-asian="Arial Unicode MS1" style:font-size-asian="8pt" style:font-weight-asian="bold" style:font-name-complex="Courier New1" style:font-size-complex="8pt" style:font-weight-complex="bold"/>
    </style:style>
    <style:style style:name="T288" style:family="text">
      <style:text-properties style:font-name="Arial" fo:font-size="11pt" fo:language="en" fo:country="US" style:font-name-asian="MS Mincho" style:font-size-asian="11pt" style:language-asian="ja" style:country-asian="JP" style:font-name-complex="Times New Roman1"/>
    </style:style>
    <style:style style:name="T289" style:family="text">
      <style:text-properties fo:color="#333333" loext:opacity="100%" style:font-name="Courier New" fo:font-size="8pt" fo:language="en" fo:country="US" style:font-size-asian="8pt" style:language-asian="ja" style:country-asian="JP" style:font-size-complex="8pt"/>
    </style:style>
    <style:style style:name="T290" style:family="text">
      <style:text-properties fo:color="#333333"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291"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92" style:family="text">
      <style:text-properties fo:color="#0066bb" loext:opacity="100%" style:font-name="Courier New" fo:font-size="8pt" fo:language="en" fo:country="US" fo:font-weight="bold" style:font-size-asian="8pt" style:language-asian="ja" style:country-asian="JP" style:font-weight-asian="bold" style:font-size-complex="8pt" style:font-weight-complex="bold"/>
    </style:style>
    <style:style style:name="T293"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94" style:family="text">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T295" style:family="text">
      <style:text-properties style:font-name="Arial" fo:font-size="11pt" fo:language="en" fo:country="US" style:font-size-asian="11pt" style:language-asian="ja" style:country-asian="JP"/>
    </style:style>
    <style:style style:name="T296" style:family="text">
      <style:text-properties fo:color="#333333" loext:opacity="100%" style:font-name="Courier New" fo:font-size="8pt" fo:language="en" fo:country="US" style:font-name-asian="Arial Unicode MS1" style:font-size-asian="8pt" style:language-asian="ja" style:country-asian="JP" style:font-name-complex="Courier New1" style:font-size-complex="8pt"/>
    </style:style>
    <style:style style:name="T297" style:family="text">
      <style:text-properties fo:color="#333333" loext:opacity="100%" style:font-name="Arial" fo:font-size="11pt" fo:language="en" fo:country="US" style:font-size-asian="11pt" style:language-asian="ja" style:country-asian="JP" style:font-size-complex="8pt"/>
    </style:style>
    <style:style style:name="T298"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style>
    <style:style style:name="T299" style:family="text">
      <style:text-properties fo:color="#333333" loext:opacity="100%" style:font-name="Arial" fo:font-size="11pt" fo:language="en" fo:country="US" style:font-name-asian="Arial Unicode MS1" style:font-size-asian="11pt" style:language-asian="ja" style:country-asian="JP" style:font-name-complex="Courier New1" style:font-size-complex="8pt"/>
    </style:style>
    <style:style style:name="T300"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01" style:family="text">
      <style:text-properties fo:color="#333333" loext:opacity="100%" style:font-name="Courier New" fo:font-size="8pt" fo:language="zxx" fo:country="none" style:font-name-asian="Arial Unicode MS1" style:font-size-asian="8pt" style:language-asian="zxx" style:country-asian="none" style:font-name-complex="Courier New1" style:font-size-complex="8pt" style:language-complex="zxx" style:country-complex="none"/>
    </style:style>
    <style:style style:name="T302" style:family="text">
      <style:text-properties fo:color="#557799" loext:opacity="100%" style:font-name="Courier New" fo:font-size="8pt" fo:language="en" fo:country="US" style:font-name-asian="Times New Roman1" style:font-size-asian="8pt" style:language-asian="en" style:country-asian="US" style:font-name-complex="Courier New1" style:font-size-complex="8pt"/>
    </style:style>
    <style:style style:name="T303" style:family="text">
      <style:text-properties fo:color="#333333" loext:opacity="100%" style:font-name="Arial" fo:font-size="11pt" fo:language="en" fo:country="US" officeooo:rsid="00a910aa" style:font-name-asian="Arial Unicode MS1" style:font-size-asian="11pt" style:language-asian="ja" style:country-asian="JP" style:font-name-complex="Courier New1" style:font-size-complex="8pt"/>
    </style:style>
    <style:style style:name="T304" style:family="text">
      <style:text-properties fo:color="#333399" loext:opacity="100%" style:font-name="Courier New" fo:font-size="8pt" fo:language="fr" fo:country="FR" fo:font-weight="bold" style:font-name-asian="Arial Unicode MS1" style:font-size-asian="8pt" style:language-asian="en" style:country-asian="US" style:font-weight-asian="bold" style:font-name-complex="Courier New1" style:font-size-complex="9pt" style:font-weight-complex="bold"/>
    </style:style>
    <style:style style:name="T305" style:family="text">
      <style:text-properties fo:color="#333333" loext:opacity="100%" style:font-name="Courier New" fo:font-size="9pt" style:font-name-asian="Arial Unicode MS1" style:font-size-asian="9pt" style:font-name-complex="Courier New1" style:font-size-complex="9pt"/>
    </style:style>
    <style:style style:name="T306" style:family="text">
      <style:text-properties fo:color="#333333" loext:opacity="100%" style:font-name="Courier New" fo:font-size="9pt" fo:language="zxx" fo:country="none" style:font-name-asian="Arial Unicode MS1" style:font-size-asian="9pt" style:language-asian="zxx" style:country-asian="none" style:font-name-complex="Courier New1" style:font-size-complex="9pt" style:language-complex="zxx" style:country-complex="none"/>
    </style:style>
    <style:style style:name="T307" style:family="text">
      <style:text-properties style:text-position="sub 58%"/>
    </style:style>
    <style:style style:name="T308" style:family="text">
      <style:text-properties fo:color="#008800" loext:opacity="100%" style:font-name="Courier New" fo:font-size="9pt" fo:language="en" fo:country="US" fo:font-weight="bold" style:font-size-asian="9pt" style:font-weight-asian="bold" style:font-size-complex="9pt" style:font-weight-complex="bold"/>
    </style:style>
    <style:style style:name="T309" style:family="text">
      <style:text-properties fo:color="#333333" loext:opacity="100%" style:font-name="Courier New" fo:font-size="9pt" fo:language="en" fo:country="US" style:font-size-asian="9pt" style:font-size-complex="9pt"/>
    </style:style>
    <style:style style:name="T310" style:family="text">
      <style:text-properties fo:color="#333399" loext:opacity="100%" style:font-name="Courier New" fo:font-size="9pt" fo:language="en" fo:country="US" fo:font-weight="bold" style:font-size-asian="9pt" style:font-weight-asian="bold" style:font-size-complex="9pt" style:font-weight-complex="bold"/>
    </style:style>
    <style:style style:name="T311" style:family="text">
      <style:text-properties fo:color="#333399" loext:opacity="100%" style:font-name="Courier New" fo:font-size="8pt" fo:language="fr" fo:country="FR" fo:font-weight="bold" style:font-size-asian="8pt" style:font-weight-asian="bold" style:font-size-complex="9pt" style:font-weight-complex="bold"/>
    </style:style>
    <style:style style:name="T312" style:family="text">
      <style:text-properties fo:color="#333333" loext:opacity="100%" style:font-name="Courier New" fo:font-size="9pt" fo:language="zxx" fo:country="none" style:font-size-asian="9pt" style:language-asian="zxx" style:country-asian="none" style:font-size-complex="9pt" style:language-complex="zxx" style:country-complex="none"/>
    </style:style>
    <style:style style:name="T313" style:family="text">
      <style:text-properties fo:color="#333333" loext:opacity="100%" style:font-name="Courier New" fo:font-size="9pt" fo:language="en" fo:country="US" fo:font-weight="bold" style:font-size-asian="9pt" style:font-weight-asian="bold" style:font-size-complex="9pt" style:font-weight-complex="bold"/>
    </style:style>
    <style:style style:name="T314" style:family="text">
      <style:text-properties officeooo:rsid="00dc0237"/>
    </style:style>
    <style:style style:name="T315" style:family="text">
      <style:text-properties officeooo:rsid="00db75a9"/>
    </style:style>
    <style:style style:name="T316" style:family="text">
      <style:text-properties fo:color="#557799" loext:opacity="100%" style:font-name="Courier New" fo:font-size="8pt" style:font-name-asian="Times New Roman1" style:font-size-asian="8pt" style:language-asian="en" style:country-asian="US" style:font-name-complex="Courier New1"/>
    </style:style>
    <style:style style:name="T317"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318" style:family="text">
      <style:text-properties fo:color="#0066bb" loext:opacity="100%" style:font-name="Courier New" fo:font-size="8pt" fo:font-weight="bold" style:font-name-asian="Times New Roman1" style:font-size-asian="8pt" style:font-weight-asian="bold" style:font-name-complex="Courier New1" style:font-weight-complex="bold"/>
    </style:style>
    <style:style style:name="T319" style:family="text">
      <style:text-properties style:font-name-asian="MS Mincho" style:font-name-complex="Times New Roman1"/>
    </style:style>
    <style:style style:name="T320" style:family="text">
      <style:text-properties fo:color="#333333" loext:opacity="100%" style:font-name="Courier New" fo:font-size="8pt" style:font-name-asian="Times New Roman1" style:font-size-asian="8pt" style:font-name-complex="Courier New1" style:font-size-complex="10pt"/>
    </style:style>
    <style:style style:name="T321" style:family="text">
      <style:text-properties style:font-name-asian="MS Mincho" style:language-asian="ja" style:country-asian="JP" style:font-name-complex="Times New Roman1" style:font-size-complex="10pt"/>
    </style:style>
    <style:style style:name="T322" style:family="text">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323"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24"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325" style:family="text">
      <style:text-properties fo:color="#333333" loext:opacity="100%" style:font-name="Courier New" fo:font-size="8pt" fo:language="en" fo:country="US" style:font-name-asian="MS Mincho" style:font-size-asian="8pt" style:language-asian="ja" style:country-asian="JP" style:font-name-complex="Times New Roman1" style:font-size-complex="10pt"/>
    </style:style>
    <style:style style:name="T326"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0pt"/>
    </style:style>
    <style:style style:name="T327"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328" style:family="text">
      <style:text-properties fo:color="#333333" loext:opacity="100%" style:font-name="Courier New" fo:font-size="8pt" fo:language="en" fo:country="US" style:font-name-asian="Times New Roman1" style:font-size-asian="8pt" style:language-asian="en" style:country-asian="US" style:font-name-complex="Courier New1"/>
    </style:style>
    <style:style style:name="T329"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11pt" style:font-weight-complex="bold"/>
    </style:style>
    <style:style style:name="T330" style:family="text">
      <style:text-properties fo:color="#008800"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331" style:family="text">
      <style:text-properties fo:color="#333333" loext:opacity="100%"/>
    </style:style>
    <style:style style:name="T332" style:family="text">
      <style:text-properties fo:color="#333333" loext:opacity="100%" style:font-name="Courier New" fo:font-size="8pt" style:font-name-asian="Arial Unicode MS1" style:font-size-asian="8pt" style:font-name-complex="Courier New1" style:font-size-complex="8pt"/>
    </style:style>
    <style:style style:name="T333" style:family="text">
      <style:text-properties fo:color="#000000" loext:opacity="100%" style:text-underline-style="none"/>
    </style:style>
    <style:style style:name="T334" style:family="text">
      <style:text-properties fo:language="de" fo:country="DE"/>
    </style:style>
    <style:style style:name="T335" style:family="text">
      <style:text-properties fo:language="en" fo:country="US" style:language-asian="ja" style:country-asian="JP" style:language-complex="ar" style:country-complex="SA"/>
    </style:style>
    <style:style style:name="T336" style:family="text">
      <style:text-properties fo:language="de" fo:country="DE" officeooo:rsid="00db75a9"/>
    </style:style>
    <style:style style:name="T337" style:family="text">
      <style:text-properties fo:language="en" fo:country="US" officeooo:rsid="00db75a9" style:language-asian="ja" style:country-asian="JP" style:language-complex="ar" style:country-complex="SA"/>
    </style:style>
    <style:style style:name="T338" style:family="text">
      <style:text-properties style:text-underline-style="none"/>
    </style:style>
    <style:style style:name="T339" style:family="text">
      <style:text-properties fo:color="#333333" loext:opacity="100%" style:font-name="Courier New" fo:font-size="8pt" style:font-name-asian="Times New Roman1" style:font-size-asian="8pt" style:language-asian="en" style:country-asian="US" style:font-name-complex="Courier New1" style:font-size-complex="11pt"/>
    </style:style>
    <style:style style:name="T340" style:family="text">
      <style:text-properties fo:color="#0066bb" loext:opacity="100%" style:font-name="Courier New" fo:font-size="8pt" fo:language="en" fo:country="US" fo:font-weight="bold" style:font-size-asian="8pt" style:font-weight-asian="bold" style:font-size-complex="8pt" style:font-weight-complex="bold"/>
    </style:style>
    <style:style style:name="T341" style:family="text">
      <style:text-properties fo:color="#333333" loext:opacity="100%" style:font-name="Courier New" fo:font-size="8pt" style:font-name-asian="Times New Roman1" style:font-size-asian="8pt" style:language-asian="en" style:country-asian="US"/>
    </style:style>
    <style:style style:name="T342"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43"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44" style:family="text">
      <style:text-properties fo:color="#333333" loext:opacity="100%" style:font-name="Courier New" fo:font-size="9pt" fo:language="fr" fo:country="FR" style:font-name-asian="Times New Roman1" style:font-size-asian="9pt" style:language-asian="en" style:country-asian="US" style:font-name-complex="Courier New1"/>
    </style:style>
    <style:style style:name="T345" style:family="text">
      <style:text-properties fo:color="#333333" loext:opacity="100%" style:font-name="Courier New" fo:font-size="9pt" style:font-name-asian="Times New Roman1" style:font-size-asian="9pt" style:font-name-complex="Courier New1"/>
    </style:style>
    <style:style style:name="T346" style:family="text">
      <style:text-properties fo:color="#008800" loext:opacity="100%" style:font-name="Courier New" fo:font-size="9pt" fo:font-weight="bold" style:font-name-asian="Times New Roman1" style:font-size-asian="9pt" style:font-weight-asian="bold" style:font-name-complex="Courier New1" style:font-weight-complex="bold"/>
    </style:style>
    <style:style style:name="T347" style:family="text">
      <style:text-properties fo:color="#333399" loext:opacity="100%" style:font-name="Courier New" fo:font-size="9pt" fo:font-weight="bold" style:font-name-asian="Times New Roman1" style:font-size-asian="9pt" style:font-weight-asian="bold" style:font-name-complex="Courier New1" style:font-weight-complex="bold"/>
    </style:style>
    <style:style style:name="T348" style:family="text">
      <style:text-properties officeooo:rsid="00c7b5aa"/>
    </style:style>
    <style:style style:name="T349" style:family="text">
      <style:text-properties officeooo:rsid="00bd1099"/>
    </style:style>
    <style:style style:name="T350" style:family="text">
      <style:text-properties officeooo:rsid="00468b1f"/>
    </style:style>
    <style:style style:name="T351"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style>
    <style:style style:name="T352" style:family="text">
      <style:text-properties fo:color="#333333" loext:opacity="100%" style:font-name="Courier New" fo:font-size="8pt" fo:language="en" fo:country="GB" style:font-name-asian="Times New Roman1" style:font-size-asian="8pt" style:language-asian="en" style:country-asian="US" style:font-name-complex="Courier New1"/>
    </style:style>
    <style:style style:name="T353" style:family="text">
      <style:text-properties fo:color="#333399" loext:opacity="100%" style:font-name="Courier New" fo:font-size="8pt" fo:language="en" fo:country="US" fo:font-weight="bold" officeooo:rsid="00468b1f" style:font-name-asian="Times New Roman1" style:font-size-asian="8pt" style:language-asian="en" style:country-asian="US" style:font-weight-asian="bold" style:font-name-complex="Courier New1" style:font-size-complex="8pt" style:font-weight-complex="bold"/>
    </style:style>
    <style:style style:name="T354" style:family="text">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T355" style:family="text">
      <style:text-properties fo:color="#0066bb" loext:opacity="100%" style:font-name="Courier New" fo:font-size="8pt" fo:language="en" fo:country="US" fo:font-weight="bold" officeooo:rsid="00468b1f" style:font-name-asian="Arial Unicode MS1" style:font-size-asian="8pt" style:language-asian="ja" style:country-asian="JP" style:font-weight-asian="bold" style:font-name-complex="Courier New1" style:font-size-complex="8pt" style:font-weight-complex="bold"/>
    </style:style>
    <style:style style:name="T356"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T357" style:family="text">
      <style:text-properties fo:color="#333399"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358" style:family="text">
      <style:text-properties fo:color="#333333" loext:opacity="100%" fo:font-size="11pt" fo:language="en" fo:country="US" style:font-name-asian="Times New Roman1" style:font-size-asian="11pt" style:language-asian="ja" style:country-asian="JP" style:font-name-complex="Courier New1" style:language-complex="ne" style:country-complex="NP"/>
    </style:style>
    <style:style style:name="T359"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language-complex="ne" style:country-complex="NP" style:font-weight-complex="normal"/>
    </style:style>
    <style:style style:name="T360"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1"/>
    </style:style>
    <style:style style:name="T361"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362" style:family="text">
      <style:text-properties fo:color="#333333" loext:opacity="100%" style:font-name="Courier New" fo:font-size="8pt" fo:language="zxx" fo:country="none" officeooo:rsid="00bd1099" style:font-size-asian="8pt" style:language-asian="zxx" style:country-asian="none" style:font-size-complex="8pt" style:language-complex="zxx" style:country-complex="none"/>
    </style:style>
    <style:style style:name="T363" style:family="text">
      <style:text-properties fo:color="#008800"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64" style:family="text">
      <style:text-properties fo:color="#333333" loext:opacity="100%" style:font-name="Courier New" fo:font-size="9pt" officeooo:rsid="005ecd15" style:font-name-asian="Times New Roman1" style:font-size-asian="9pt" style:language-asian="en" style:country-asian="US" style:font-name-complex="Courier New1" style:font-size-complex="9pt"/>
    </style:style>
    <style:style style:name="T365" style:family="text">
      <style:text-properties fo:color="#333333" loext:opacity="100%" style:font-name="Courier New" fo:font-size="9pt" officeooo:rsid="00bd1099" style:font-name-asian="Times New Roman1" style:font-size-asian="9pt" style:language-asian="en" style:country-asian="US" style:font-name-complex="Courier New1" style:font-size-complex="9pt"/>
    </style:style>
    <style:style style:name="T366" style:family="text">
      <style:text-properties fo:color="#333399" loext:opacity="100%" style:font-name="Courier New" fo:font-size="8pt" fo:font-weight="bold" style:font-size-asian="8pt" style:font-weight-asian="bold" style:font-size-complex="8pt" style:font-weight-complex="bold"/>
    </style:style>
    <style:style style:name="T367" style:family="text">
      <style:text-properties fo:color="#888888" loext:opacity="100%" style:font-name="Courier New" fo:font-size="8pt" fo:language="en" fo:country="US" fo:font-weight="normal" officeooo:rsid="00bd1099" style:font-name-asian="Times New Roman1" style:font-size-asian="8pt" style:language-asian="en" style:country-asian="US" style:font-weight-asian="normal" style:font-name-complex="Courier New1" style:font-size-complex="8pt" style:font-weight-complex="normal"/>
    </style:style>
    <style:style style:name="T368" style:family="text">
      <style:text-properties fo:color="#333333" loext:opacity="100%" style:font-name="Courier New" fo:font-size="8pt" fo:language="en" fo:country="US" style:letter-kerning="false" style:font-name-asian="Times New Roman1" style:font-size-asian="8pt" style:language-asian="en" style:country-asian="US" style:font-name-complex="Courier New1" style:font-size-complex="11pt" style:language-complex="ar" style:country-complex="SA"/>
    </style:style>
    <style:style style:name="T369" style:family="text">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T370" style:family="text">
      <style:text-properties fo:color="#888888" loext:opacity="100%" style:font-name="Courier New" fo:font-size="8pt" style:font-name-asian="Times New Roman1" style:font-size-asian="8pt" style:language-asian="en" style:country-asian="US" style:font-name-complex="Courier New1" style:font-size-complex="8pt"/>
    </style:style>
    <style:style style:name="T371" style:family="text">
      <style:text-properties fo:color="#888888"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2" style:family="text">
      <style:text-properties fo:color="#333399"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73" style:family="text">
      <style:text-properties style:font-name="Arial" fo:font-size="11pt" fo:language="en" fo:country="US" style:font-size-asian="11pt" style:language-asian="ja" style:country-asian="JP" style:language-complex="ne" style:country-complex="NP"/>
    </style:style>
    <style:style style:name="T374"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language-complex="ne" style:country-complex="NP" style:font-weight-complex="bold"/>
    </style:style>
    <style:style style:name="T375"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6" style:family="text">
      <style:text-properties fo:color="#888888" loext:opacity="100%" style:font-name="Courier New" fo:font-size="8pt" style:text-underline-style="none" style:font-name-asian="Times New Roman1" style:font-size-asian="8pt" style:language-asian="en" style:country-asian="US" style:font-name-complex="Courier New1" style:font-size-complex="8pt"/>
    </style:style>
    <style:style style:name="T377" style:family="text">
      <style:text-properties fo:color="#333399" loext:opacity="100%" style:font-name="Courier New" fo:font-size="8pt" style:text-underline-style="none" fo:font-weight="bold" style:font-name-asian="Times New Roman1" style:font-size-asian="8pt" style:language-asian="en" style:country-asian="US" style:font-weight-asian="bold" style:font-name-complex="Courier New1" style:font-size-complex="8pt" style:font-weight-complex="bold"/>
    </style:style>
    <style:style style:name="T378" style:family="text">
      <style:text-properties fo:color="#0066bb" loext:opacity="100%" style:font-name="Courier New" fo:font-size="8pt" fo:language="zxx" fo:country="none" fo:font-weight="bold" style:font-name-asian="Times New Roman1" style:font-size-asian="8pt" style:language-asian="zxx" style:country-asian="none" style:font-weight-asian="bold" style:font-size-complex="8pt" style:language-complex="zxx" style:country-complex="none" style:font-weight-complex="bold"/>
    </style:style>
    <style:style style:name="T379" style:family="text">
      <style:text-properties fo:color="#0066bb" loext:opacity="100%" style:font-name="Courier New" fo:font-size="8pt" fo:language="zxx" fo:country="none" fo:font-weight="bold" style:letter-kerning="false"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380" style:family="text">
      <style:text-properties fo:color="#333399"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81" style:family="text">
      <style:text-properties fo:color="#333333" loext:opacity="100%" style:font-name="Courier New" fo:font-size="9pt" style:font-size-asian="9pt" style:font-size-complex="8pt"/>
    </style:style>
    <style:style style:name="T382" style:family="text">
      <style:text-properties fo:color="#333333" loext:opacity="100%" style:font-name="Courier New" fo:font-size="8pt" fo:language="en" fo:country="US" style:font-name-asian="Calibri1" style:font-size-asian="8pt" style:language-asian="en" style:country-asian="US" style:font-name-complex="Times New Roman1" style:font-size-complex="8pt"/>
    </style:style>
    <style:style style:name="T383" style:family="text">
      <style:text-properties fo:language="en" fo:country="US" style:language-asian="ja" style:country-asian="JP"/>
    </style:style>
    <style:style style:name="T384"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1pt"/>
    </style:style>
    <style:style style:name="T385"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9pt" style:font-weight-complex="bold"/>
    </style:style>
    <style:style style:name="T386" style:family="text">
      <style:text-properties fo:color="#333333" loext:opacity="100%" fo:language="en" fo:country="GB" style:font-name-asian="Times New Roman1" style:language-asian="en" style:country-asian="US"/>
    </style:style>
    <style:style style:name="T387" style:family="text">
      <style:text-properties fo:color="#333333" loext:opacity="100%" fo:language="zxx" fo:country="none" style:language-asian="zxx" style:country-asian="none" style:language-complex="zxx" style:country-complex="none"/>
    </style:style>
    <style:style style:name="T388" style:family="text">
      <style:text-properties style:font-name="Arial" fo:font-size="11pt" fo:language="en" fo:country="US" officeooo:rsid="00d0cd10" style:font-size-asian="11pt" style:language-asian="ja" style:country-asian="JP"/>
    </style:style>
    <style:style style:name="T389" style:family="text">
      <style:text-properties fo:color="#0066bb" loext:opacity="100%" style:font-name="Courier New" fo:font-size="8pt" fo:language="en" fo:country="US" fo:font-weight="bold" officeooo:rsid="00d0cd10" style:font-size-asian="8pt" style:language-asian="ja" style:country-asian="JP" style:font-weight-asian="bold" style:font-size-complex="8pt" style:font-weight-complex="bold"/>
    </style:style>
    <style:style style:name="T390" style:family="text">
      <style:text-properties style:font-name="Arial" fo:font-size="11pt" fo:language="en" fo:country="US" officeooo:rsid="00c660b0" style:font-size-asian="11pt" style:language-asian="ja" style:country-asian="JP"/>
    </style:style>
    <style:style style:name="T391" style:family="text">
      <style:text-properties style:font-name="Arial" fo:font-size="11pt" fo:language="en" fo:country="US" officeooo:rsid="00c53130" style:font-size-asian="11pt" style:language-asian="ja" style:country-asian="JP"/>
    </style:style>
    <style:style style:name="T392" style:family="text">
      <style:text-properties style:font-name="Arial" fo:font-size="11pt" fo:language="en" fo:country="US" officeooo:rsid="00ff60ae" style:font-size-asian="11pt" style:language-asian="ja" style:country-asian="JP"/>
    </style:style>
    <style:style style:name="T393" style:family="text">
      <style:text-properties style:font-name="Arial" fo:font-size="11pt" fo:language="en" fo:country="US" style:text-underline-style="none" style:font-size-asian="11pt" style:language-asian="ja" style:country-asian="JP"/>
    </style:style>
    <style:style style:name="T394" style:family="text">
      <style:text-properties style:font-name="Arial" fo:font-size="11pt" fo:language="en" fo:country="US" officeooo:rsid="00c57f2f" style:font-size-asian="11pt" style:language-asian="ja" style:country-asian="JP"/>
    </style:style>
    <style:style style:name="T395" style:family="text">
      <style:text-properties style:font-name="Arial" fo:font-size="11pt" fo:language="en" fo:country="US" officeooo:rsid="00c61fcf" style:font-size-asian="11pt" style:language-asian="ja" style:country-asian="JP"/>
    </style:style>
    <style:style style:name="T396" style:family="text">
      <style:text-properties fo:color="#000000" loext:opacity="100%" style:font-name="Courier New" fo:font-size="8pt" fo:language="en" fo:country="US" style:font-name-asian="Times New Roman1" style:font-size-asian="8pt" style:language-asian="en" style:country-asian="US" style:font-name-complex="Courier New1" style:font-size-complex="9pt"/>
    </style:style>
    <style:style style:name="T397" style:family="text">
      <style:text-properties style:font-name="Arial" fo:font-size="11pt" fo:language="en" fo:country="US" officeooo:rsid="00c49252" style:font-size-asian="11pt" style:language-asian="ja" style:country-asian="JP"/>
    </style:style>
    <style:style style:name="T398" style:family="text">
      <style:text-properties fo:color="#333333" loext:opacity="100%" style:font-name="Courier New" fo:font-size="8pt" fo:language="en" fo:country="GB" officeooo:rsid="00e8d275" style:font-name-asian="Times New Roman1" style:font-size-asian="8pt" style:language-asian="en" style:country-asian="US" style:font-name-complex="Courier New1" style:font-size-complex="8pt"/>
    </style:style>
    <style:style style:name="T399" style:family="text">
      <style:text-properties fo:color="#333399" loext:opacity="100%" style:font-name="Courier New" fo:font-size="7pt" fo:font-weight="bold" style:font-name-asian="Arial Unicode MS1" style:font-size-asian="7pt" style:font-weight-asian="bold" style:font-name-complex="Courier New1" style:font-size-complex="8pt" style:font-weight-complex="bold"/>
    </style:style>
    <style:style style:name="T400" style:family="text">
      <style:text-properties fo:color="#333333" loext:opacity="100%" style:font-name="Courier New" fo:font-size="8pt" style:font-name-asian="Times New Roman1" style:font-size-asian="8pt" style:language-asian="en" style:country-asian="US" style:font-size-complex="9pt"/>
    </style:style>
    <style:style style:name="T401" style:family="text">
      <style:text-properties fo:language="en" fo:country="US" style:script-type="latin"/>
    </style:style>
    <style:style style:name="T402" style:family="text">
      <style:text-properties fo:color="#0066bb" loext:opacity="100%" style:font-name="Courier New" fo:font-size="8pt" fo:language="en" fo:country="US" fo:font-weight="bold" style:font-size-asian="8pt" style:font-weight-asian="bold" style:font-size-complex="8pt" style:font-weight-complex="bold" style:script-type="latin"/>
    </style:style>
    <style:style style:name="T403" style:family="text">
      <style:text-properties fo:color="#333399" loext:opacity="100%" style:font-name="Courier New" fo:font-size="8pt" fo:language="en" fo:country="US" fo:font-weight="bold" style:font-size-asian="8pt" style:font-weight-asian="bold" style:font-size-complex="8pt" style:font-weight-complex="bold" style:script-type="latin"/>
    </style:style>
    <style:style style:name="T404" style:family="text">
      <style:text-properties fo:color="#333333" loext:opacity="100%" style:font-name="Courier New" fo:font-size="8pt" fo:language="en" fo:country="US" style:font-size-asian="8pt" style:font-size-complex="8pt" style:script-type="latin"/>
    </style:style>
    <style:style style:name="T405" style:family="text">
      <style:text-properties fo:color="#008800" loext:opacity="100%" style:font-name="Courier New" fo:font-size="8pt" fo:language="en" fo:country="US" fo:font-weight="bold" style:font-size-asian="8pt" style:font-weight-asian="bold" style:font-size-complex="8pt" style:font-weight-complex="bold" style:script-type="latin"/>
    </style:style>
    <style:style style:name="T406" style:family="text">
      <style:text-properties fo:color="#008800" loext:opacity="100%" style:font-name="Courier New" fo:font-size="8pt" fo:language="en" fo:country="US" fo:font-weight="bold" style:letter-kerning="false" style:font-name-asian="Arial Unicode MS1" style:font-size-asian="8pt" style:language-asian="ja" style:country-asian="JP" style:font-weight-asian="bold" style:font-name-complex="Courier New1" style:font-size-complex="8pt" style:language-complex="ar" style:country-complex="SA" style:font-weight-complex="bold" style:script-type="latin"/>
    </style:style>
    <style:style style:name="T407"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cript-type="latin"/>
    </style:style>
    <style:style style:name="T408" style:family="text">
      <style:text-properties fo:color="#008800"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cript-type="latin"/>
    </style:style>
    <style:style style:name="T409" style:family="text">
      <style:text-properties fo:color="#008800" loext:opacity="100%" style:font-name="Courier New" fo:font-size="8pt" fo:language="en" fo:country="US" fo:font-weight="bold" officeooo:rsid="00ed9c33"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cript-type="latin"/>
    </style:style>
    <style:style style:name="T410" style:family="text">
      <style:text-properties fo:color="#008800" loext:opacity="100%" style:font-name="Courier New" fo:font-size="8pt" fo:language="en" fo:country="US" fo:font-weight="normal" style:letter-kerning="false" style:font-name-asian="MS Mincho" style:font-size-asian="8pt" style:language-asian="ja" style:country-asian="JP" style:font-weight-asian="normal" style:font-name-complex="Times New Roman1" style:font-size-complex="8pt" style:language-complex="ar" style:country-complex="SA" style:font-weight-complex="normal" style:script-type="latin"/>
    </style:style>
    <style:style style:name="T411" style:family="text">
      <style:text-properties style:use-window-font-color="true" loext:opacity="0%" style:font-name="Arial" fo:font-size="11pt" fo:language="en" fo:country="US" fo:font-weight="normal" officeooo:rsid="00ed9c33"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cript-type="latin"/>
    </style:style>
    <style:style style:name="T412" style:family="text">
      <style:text-properties fo:language="en" fo:country="US" officeooo:rsid="00f9b076" style:script-type="latin"/>
    </style:style>
    <style:style style:name="T413" style:family="text">
      <style:text-properties fo:language="en" fo:country="US" officeooo:rsid="00eed27f" style:script-type="latin"/>
    </style:style>
    <style:style style:name="T414" style:family="text">
      <style:text-properties fo:color="#008800" loext:opacity="100%" style:font-name="Courier New" fo:font-size="8pt" fo:language="en" fo:country="US" fo:font-weight="normal" officeooo:rsid="00eed27f" style:letter-kerning="false" style:font-name-asian="MS Mincho" style:font-size-asian="8pt" style:language-asian="ja" style:country-asian="JP" style:font-weight-asian="normal" style:font-name-complex="Times New Roman1" style:font-size-complex="8pt" style:language-complex="ar" style:country-complex="SA" style:font-weight-complex="normal" style:script-type="latin"/>
    </style:style>
    <style:style style:name="T415" style:family="text">
      <style:text-properties fo:color="#008800" loext:opacity="100%" style:font-name="Courier New" fo:font-size="8pt" fo:language="en" fo:country="US" fo:font-weight="bold" officeooo:rsid="00eed27f"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cript-type="latin"/>
    </style:style>
    <style:style style:name="T416" style:family="text">
      <style:text-properties fo:language="en" fo:country="US" officeooo:rsid="00f5e2b0" style:script-type="latin"/>
    </style:style>
    <style:style style:name="T417" style:family="text">
      <style:text-properties fo:language="en" fo:country="US" officeooo:rsid="00f0c0a5" style:script-type="latin"/>
    </style:style>
    <style:style style:name="T418" style:family="text">
      <style:text-properties fo:language="en" fo:country="US" fo:font-weight="normal" officeooo:rsid="00f0c0a5" style:font-weight-asian="normal" style:font-weight-complex="normal" style:script-type="latin"/>
    </style:style>
    <style:style style:name="T419" style:family="text">
      <style:text-properties fo:color="#333333" loext:opacity="100%" style:font-name="Courier New" fo:font-size="9pt" fo:language="en" fo:country="US" officeooo:rsid="00f5e2b0" style:letter-kerning="false" style:font-name-asian="Arial Unicode MS1" style:font-size-asian="9pt" style:language-asian="zxx" style:country-asian="none" style:font-name-complex="Courier New1" style:font-size-complex="8pt" style:language-complex="zxx" style:country-complex="none" style:script-type="latin"/>
    </style:style>
    <style:style style:name="T420" style:family="text">
      <style:text-properties style:use-window-font-color="true" loext:opacity="0%" style:font-name="Arial Unicode MS" fo:font-size="10pt" fo:language="en" fo:country="US" style:letter-kerning="false" style:font-name-asian="Arial Unicode MS1" style:font-size-asian="10pt" style:language-asian="ja" style:country-asian="JP" style:font-name-complex="Courier New1" style:font-size-complex="10pt" style:language-complex="ar" style:country-complex="SA" style:script-type="latin"/>
    </style:style>
    <style:style style:name="T421" style:family="text">
      <style:text-properties fo:color="#333333" loext:opacity="100%" style:font-name="Courier New" fo:font-size="9pt" fo:language="en" fo:country="US" style:font-name-asian="Arial Unicode MS1" style:font-size-asian="9pt" style:font-name-complex="Courier New1" style:font-size-complex="8pt" style:script-type="latin"/>
    </style:style>
    <style:style style:name="T422" style:family="text">
      <style:text-properties fo:color="#333333" loext:opacity="100%" style:font-name="Courier New" fo:font-size="9pt" fo:language="zxx" fo:country="none" style:font-name-asian="Arial Unicode MS1" style:font-size-asian="9pt" style:language-asian="zxx" style:country-asian="none" style:font-name-complex="Courier New1" style:font-size-complex="8pt" style:language-complex="zxx" style:country-complex="none" style:script-type="latin"/>
    </style:style>
    <style:style style:name="T423" style:family="text">
      <style:text-properties fo:color="#333333" loext:opacity="100%" style:font-name="Courier New" fo:font-size="8pt" fo:language="en" fo:country="US" style:font-name-asian="Arial Unicode MS1" style:font-size-asian="8pt" style:font-name-complex="Courier New1" style:font-size-complex="8pt" style:script-type="latin"/>
    </style:style>
    <style:style style:name="T424" style:family="text">
      <style:text-properties fo:color="#0066bb" loext:opacity="100%" style:font-name="Courier New" fo:font-size="8pt" fo:language="en" fo:country="US" fo:font-weight="bold" officeooo:rsid="00efde63" style:font-size-asian="8pt" style:font-weight-asian="bold" style:font-size-complex="8pt" style:font-weight-complex="bold" style:script-type="latin"/>
    </style:style>
    <style:style style:name="T425" style:family="text">
      <style:text-properties fo:language="en" fo:country="US" officeooo:rsid="00efde63" style:script-type="latin"/>
    </style:style>
    <style:style style:name="T426" style:family="text">
      <style:text-properties fo:language="en" fo:country="US" officeooo:rsid="00fc7c50" style:script-type="latin"/>
    </style:style>
    <style:style style:name="T427" style:family="text">
      <style:text-properties fo:color="#333333" loext:opacity="100%" style:font-name="Courier New" fo:font-size="8pt" fo:language="en" fo:country="US" officeooo:rsid="00fc7c50" style:font-size-asian="8pt" style:font-size-complex="8pt" style:script-type="latin"/>
    </style:style>
    <style:style style:name="T428" style:family="text">
      <style:text-properties fo:color="#333333" loext:opacity="100%" style:font-name="Courier New" fo:font-size="8pt" fo:language="zxx" fo:country="none" officeooo:rsid="00efde63" style:letter-kerning="false" style:font-name-asian="Times New Roman1" style:font-size-asian="8pt" style:language-asian="zxx" style:country-asian="none" style:font-size-complex="8pt" style:language-complex="zxx" style:country-complex="none" style:script-type="latin"/>
    </style:style>
    <style:style style:name="T429" style:family="text">
      <style:text-properties fo:language="en" fo:country="US" officeooo:rsid="00f15a78" style:script-type="latin"/>
    </style:style>
    <style:style style:name="T430" style:family="text">
      <style:text-properties fo:color="#333333" loext:opacity="100%" style:font-name="Courier New" fo:font-size="8pt" fo:language="en" fo:country="US" officeooo:rsid="010051e3" style:font-name-asian="Times New Roman1" style:font-size-asian="8pt" style:language-asian="en" style:country-asian="US" style:font-name-complex="Courier New1" style:font-size-complex="8pt" style:language-complex="zxx" style:country-complex="none" style:script-type="latin"/>
    </style:style>
    <style:style style:name="T431" style:family="text">
      <style:text-properties style:use-window-font-color="true" loext:opacity="0%" style:font-name="Arial" fo:font-size="11pt" fo:language="en" fo:country="US" officeooo:rsid="010051e3" style:letter-kerning="false" style:font-name-asian="MS Mincho" style:font-size-asian="11pt" style:language-asian="ja" style:country-asian="JP" style:font-name-complex="Times New Roman1" style:font-size-complex="10pt" style:language-complex="ar" style:country-complex="SA" style:script-type="latin"/>
    </style:style>
    <style:style style:name="T432" style:family="text">
      <style:text-properties style:use-window-font-color="true" loext:opacity="0%" style:font-name="Arial" fo:font-size="11pt" fo:language="en" fo:country="US" officeooo:rsid="00439396" style:letter-kerning="false" style:font-name-asian="MS Mincho" style:font-size-asian="11pt" style:language-asian="ja" style:country-asian="JP" style:font-name-complex="Times New Roman1" style:font-size-complex="10pt" style:language-complex="ar" style:country-complex="SA" style:script-type="latin"/>
    </style:style>
    <style:style style:name="T433" style:family="text">
      <style:text-properties fo:color="#333333"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34" style:family="text">
      <style:text-properties fo:color="#0066bb"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35" style:family="text">
      <style:text-properties fo:color="#0066bb" loext:opacity="100%" style:font-name="Courier New" fo:font-size="8pt" fo:font-weight="bold" officeooo:rsid="00eed27f" style:font-name-asian="Times New Roman1" style:font-size-asian="8pt" style:language-asian="en" style:country-asian="US" style:font-weight-asian="bold" style:font-name-complex="Courier New1" style:font-size-complex="8pt" style:font-weight-complex="bold"/>
    </style:style>
    <style:style style:name="T436"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script-type="latin"/>
    </style:style>
    <style:style style:name="T437" style:family="text">
      <style:text-properties fo:color="#333399" loext:opacity="100%" style:font-name="Courier New" fo:font-size="8pt" fo:language="en" fo:country="US" fo:font-weight="bold" style:letter-kerning="false" style:font-name-asian="Times New Roman1" style:font-size-asian="8pt" style:language-asian="ja" style:country-asian="JP" style:font-weight-asian="bold" style:font-name-complex="Courier New1" style:font-size-complex="8pt" style:language-complex="ar" style:country-complex="SA" style:font-weight-complex="bold" style:script-type="latin"/>
    </style:style>
    <style:style style:name="T438" style:family="text">
      <style:text-properties fo:color="#333333" loext:opacity="100%" style:font-name="Courier New" fo:font-size="8pt" fo:language="zxx" fo:country="none" style:font-name-asian="Times New Roman1" style:font-size-asian="8pt" style:language-asian="zxx" style:country-asian="none" style:font-name-complex="Courier New1" style:font-size-complex="8pt" style:language-complex="zxx" style:country-complex="none" style:script-type="latin"/>
    </style:style>
    <style:style style:name="T439" style:family="text">
      <style:text-properties fo:color="#333333" loext:opacity="100%" style:font-name="Courier New" fo:font-size="8pt" fo:language="zxx" fo:country="none" officeooo:rsid="00efde63" style:font-name-asian="Times New Roman1" style:font-size-asian="8pt" style:language-asian="zxx" style:country-asian="none" style:font-name-complex="Courier New1" style:font-size-complex="8pt" style:language-complex="zxx" style:country-complex="none" style:script-type="latin"/>
    </style:style>
    <style:style style:name="T440" style:family="text">
      <style:text-properties fo:color="#333333" loext:opacity="100%" style:font-name="Courier New" fo:font-size="8pt" fo:language="en" fo:country="US" officeooo:rsid="00efde63" style:font-name-asian="Times New Roman1" style:font-size-asian="8pt" style:language-asian="en" style:country-asian="US" style:font-name-complex="Courier New1" style:font-size-complex="8pt" style:language-complex="zxx" style:country-complex="none" style:script-type="latin"/>
    </style:style>
    <style:style style:name="T441" style:family="text">
      <style:text-properties fo:color="#008800" loext:opacity="100%" style:font-name="Courier New" fo:font-size="8pt" fo:language="en" fo:country="US" fo:font-weight="bold" officeooo:rsid="00efde63" style:font-name-asian="Times New Roman1" style:font-size-asian="8pt" style:language-asian="en" style:country-asian="US" style:font-weight-asian="bold" style:font-name-complex="Courier New1" style:font-size-complex="8pt" style:language-complex="zxx" style:country-complex="none" style:font-weight-complex="bold" style:script-type="latin"/>
    </style:style>
    <style:style style:name="T442" style:family="text">
      <style:text-properties fo:color="#333399" loext:opacity="100%" style:font-name="Courier New" fo:font-size="8pt" fo:language="en" fo:country="US" fo:font-weight="bold" officeooo:rsid="00efde63" style:letter-kerning="false" style:font-name-asian="Times New Roman1" style:font-size-asian="8pt" style:language-asian="ja" style:country-asian="JP" style:font-weight-asian="bold" style:font-name-complex="Courier New1" style:font-size-complex="8pt" style:language-complex="ar" style:country-complex="SA" style:font-weight-complex="bold" style:script-type="latin"/>
    </style:style>
    <style:style style:name="T443" style:family="text">
      <style:text-properties fo:color="#333333" loext:opacity="100%" style:font-name="Courier New" fo:font-size="8pt" fo:language="zxx" fo:country="none" officeooo:rsid="010051e3" style:font-name-asian="Times New Roman1" style:font-size-asian="8pt" style:language-asian="zxx" style:country-asian="none" style:font-name-complex="Courier New1" style:font-size-complex="8pt" style:language-complex="zxx" style:country-complex="none" style:script-type="latin"/>
    </style:style>
    <style:style style:name="T444" style:family="text">
      <style:text-properties officeooo:rsid="00f1634a"/>
    </style:style>
    <style:style style:name="T445" style:family="text">
      <style:text-properties fo:font-size="11pt" fo:language="en" fo:country="US" style:font-size-asian="11pt" style:language-asian="ja" style:country-asian="JP" style:language-complex="ne" style:country-complex="NP"/>
    </style:style>
    <style:style style:name="T446" style:family="text">
      <style:text-properties fo:color="#333333" loext:opacity="100%" style:font-name="Courier New" fo:font-size="8pt" fo:language="zxx" fo:country="none" style:font-size-asian="8pt" style:language-asian="zxx" style:country-asian="none" style:language-complex="zxx" style:country-complex="none"/>
    </style:style>
    <style:style style:name="T447" style:family="text">
      <style:text-properties fo:font-size="11pt" style:font-name-asian="MS Mincho" style:font-size-asian="11pt" style:font-name-complex="Times New Roman1"/>
    </style:style>
    <style:style style:name="T448" style:family="text">
      <style:text-properties fo:color="#333333" loext:opacity="100%" style:font-name="Courier New" fo:font-size="8pt" fo:language="en" fo:country="US" style:font-size-asian="8pt"/>
    </style:style>
    <style:style style:name="T449" style:family="text">
      <style:text-properties fo:color="#333333" loext:opacity="100%" style:font-name="Courier New" fo:font-size="11pt" fo:language="en" fo:country="US" style:font-size-asian="11pt" style:font-size-complex="11pt"/>
    </style:style>
    <style:style style:name="T450" style:family="text">
      <style:text-properties fo:color="#333333" loext:opacity="100%" style:font-name="Courier New" fo:font-size="7pt" fo:language="en" fo:country="US" style:font-size-asian="7pt" style:font-size-complex="8pt"/>
    </style:style>
    <style:style style:name="T451" style:family="text">
      <style:text-properties fo:color="#0066bb" loext:opacity="100%" style:font-name="Courier New" fo:font-size="8pt" fo:font-weight="bold" style:font-name-asian="Times New Roman1" style:font-size-asian="8pt" style:language-asian="en" style:country-asian="US" style:font-weight-asian="bold" style:font-size-complex="8pt" style:font-weight-complex="bold"/>
    </style:style>
    <style:style style:name="T452"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8pt" style:font-weight-complex="bold"/>
    </style:style>
    <style:style style:name="T453" style:family="text">
      <style:text-properties fo:color="#333333" loext:opacity="100%" style:font-name="Courier New" fo:font-size="8pt" fo:language="zxx" fo:country="none" style:font-name-asian="Times New Roman1" style:font-size-asian="8pt" style:language-asian="zxx" style:country-asian="none" style:font-size-complex="8pt" style:language-complex="zxx" style:country-complex="none"/>
    </style:style>
    <style:style style:name="T454" style:family="text">
      <style:text-properties fo:color="#333333" loext:opacity="100%" style:font-name="Courier New" fo:font-size="8pt" fo:language="en" fo:country="US" style:font-name-asian="Times New Roman1" style:font-size-asian="8pt" style:language-asian="en" style:country-asian="US" style:font-size-complex="8pt"/>
    </style:style>
    <style:style style:name="T455" style:family="text">
      <style:text-properties fo:color="#333333" loext:opacity="100%" style:font-name="Courier New" fo:font-size="8pt" fo:language="en" fo:country="US" officeooo:rsid="00dc761f" style:font-name-asian="Times New Roman1" style:font-size-asian="8pt" style:language-asian="en" style:country-asian="US" style:font-size-complex="8pt"/>
    </style:style>
    <style:style style:name="T456"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457"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458"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459" style:family="text">
      <style:text-properties fo:color="#333333" loext:opacity="100%" style:font-name="Courier New" fo:font-size="9pt" fo:language="en" fo:country="US" style:font-name-asian="Times New Roman1" style:font-size-asian="9pt" style:language-asian="en" style:country-asian="US" style:font-size-complex="11pt"/>
    </style:style>
    <style:style style:name="T460" style:family="text">
      <style:text-properties fo:color="#333333" loext:opacity="100%" style:font-name="Courier New" fo:font-size="9pt" fo:language="fr" fo:country="FR" style:font-name-asian="Times New Roman1" style:font-size-asian="9pt" style:language-asian="en" style:country-asian="US" style:font-name-complex="Courier New1" style:font-size-complex="9pt"/>
    </style:style>
    <style:style style:name="T461" style:family="text">
      <style:text-properties fo:color="#333333" loext:opacity="100%" style:font-name="Courier New" fo:font-size="9pt" fo:language="zxx" fo:country="none" style:font-name-asian="Times New Roman1" style:font-size-asian="9pt" style:language-asian="zxx" style:country-asian="none" style:font-name-complex="Courier New1" style:font-size-complex="9pt" style:language-complex="zxx" style:country-complex="none" style:script-type="latin"/>
    </style:style>
    <style:style style:name="T462" style:family="text">
      <style:text-properties fo:color="#333333" loext:opacity="100%" style:font-name="Courier New" fo:font-size="8pt" fo:language="de" fo:country="DE" style:font-size-asian="8pt"/>
    </style:style>
    <style:style style:name="T463" style:family="text">
      <style:text-properties officeooo:rsid="00427c2c"/>
    </style:style>
    <style:style style:name="T464" style:family="text">
      <style:text-properties fo:color="#888888" loext:opacity="100%" style:font-name="Courier New" fo:font-size="8pt" style:font-name-asian="Times New Roman1" style:font-size-asian="8pt" style:font-name-complex="Courier New1" style:font-size-complex="8pt"/>
    </style:style>
    <style:style style:name="T465" style:family="text">
      <style:text-properties fo:color="#557799" loext:opacity="100%" style:font-name="Courier New" fo:font-size="8pt" style:font-name-asian="Times New Roman1" style:font-size-asian="8pt" style:language-asian="en" style:country-asian="US" style:font-name-complex="Courier New1" style:font-size-complex="8pt"/>
    </style:style>
    <style:style style:name="T466" style:family="text">
      <style:text-properties fo:color="#888888" loext:opacity="100%" style:font-name="Courier New" fo:font-size="8pt" officeooo:rsid="00dc0237" style:font-name-asian="Times New Roman1" style:font-size-asian="8pt" style:language-asian="en" style:country-asian="US" style:font-name-complex="Courier New1" style:font-size-complex="8pt"/>
    </style:style>
    <style:style style:name="T467" style:family="text">
      <style:text-properties fo:color="#557799"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468" style:family="text">
      <style:text-properties fo:color="#557799"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69"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language-complex="ar" style:country-complex="SA" style:script-type="latin"/>
    </style:style>
    <style:style style:name="T470" style:family="text">
      <style:text-properties fo:color="#888888" loext:opacity="100%" style:font-name="Courier New" fo:font-size="8pt" officeooo:rsid="000dee38" style:font-name-asian="Times New Roman1" style:font-size-asian="8pt" style:language-asian="en" style:country-asian="US" style:font-name-complex="Courier New1" style:font-size-complex="8pt"/>
    </style:style>
    <style:style style:name="T471" style:family="text">
      <style:text-properties fo:color="#333333" loext:opacity="100%" style:font-name="Courier New" fo:font-size="8pt" officeooo:rsid="000dee38" style:font-name-asian="Times New Roman1" style:font-size-asian="8pt" style:language-asian="en" style:country-asian="US" style:font-name-complex="Courier New1" style:font-size-complex="8pt"/>
    </style:style>
    <style:style style:name="T472" style:family="text">
      <style:text-properties fo:color="#0066bb"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473" style:family="text">
      <style:text-properties fo:color="#333399"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474" style:family="text">
      <style:text-properties fo:color="#333333" loext:opacity="100%" style:font-name="Courier New" fo:font-size="8pt" fo:language="zxx" fo:country="none" officeooo:rsid="0011241e" style:font-name-asian="Times New Roman1" style:font-size-asian="8pt" style:language-asian="zxx" style:country-asian="none" style:font-name-complex="Courier New1" style:font-size-complex="8pt" style:language-complex="zxx" style:country-complex="none"/>
    </style:style>
    <style:style style:name="T475" style:family="text">
      <style:text-properties fo:color="#0066bb" loext:opacity="100%" fo:language="en" fo:country="US" fo:font-weight="bold" style:letter-kerning="false" style:font-weight-asian="bold" style:language-complex="ar" style:country-complex="SA" style:font-weight-complex="bold"/>
    </style:style>
    <style:style style:name="T476" style:family="text">
      <style:text-properties fo:color="#0066bb" loext:opacity="100%" style:font-name="Courier New" fo:font-size="8pt" fo:font-weight="bold" officeooo:rsid="00b081ee" style:font-name-asian="Times New Roman1" style:font-size-asian="8pt" style:language-asian="en" style:country-asian="US" style:font-weight-asian="bold" style:font-name-complex="Courier New1" style:font-size-complex="8pt" style:font-weight-complex="bold"/>
    </style:style>
    <style:style style:name="T477" style:family="text">
      <style:text-properties fo:color="#333333" loext:opacity="100%" style:font-name="Courier New" fo:font-size="8pt" fo:language="en" fo:country="US" officeooo:rsid="00b081ee" style:font-name-asian="Times New Roman1" style:font-size-asian="8pt" style:language-asian="en" style:country-asian="US" style:font-name-complex="Courier New1" style:font-size-complex="8pt" style:language-complex="ar" style:country-complex="SA" style:script-type="latin"/>
    </style:style>
    <style:style style:name="T478" style:family="text">
      <style:text-properties fo:color="#333333" loext:opacity="100%" style:font-name="Courier New" fo:font-size="8pt" fo:language="fr" fo:country="FR" officeooo:rsid="00b081ee" style:font-name-asian="Times New Roman1" style:font-size-asian="8pt" style:language-asian="en" style:country-asian="US" style:font-name-complex="Courier New1" style:font-size-complex="8pt"/>
    </style:style>
    <style:style style:name="T479" style:family="text">
      <style:text-properties fo:color="#333333" loext:opacity="100%" fo:language="en" fo:country="US" fo:font-weight="normal" style:font-weight-asian="normal" style:font-weight-complex="normal"/>
    </style:style>
    <style:style style:name="T480" style:family="text">
      <style:text-properties fo:color="#008800" loext:opacity="100%" fo:font-weight="bold" style:font-weight-asian="bold" style:font-weight-complex="bold"/>
    </style:style>
    <style:style style:name="T481" style:family="text">
      <style:text-properties fo:color="#333399" loext:opacity="100%" fo:font-weight="bold" style:font-weight-asian="bold" style:font-weight-complex="bold"/>
    </style:style>
    <style:style style:name="T482" style:family="text">
      <style:text-properties fo:color="#0066bb"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483" style:family="text">
      <style:text-properties fo:color="#0066bb" loext:opacity="100%" style:font-name="Courier New" fo:font-size="8pt" fo:language="zxx" fo:country="none" fo:font-weight="bold" officeooo:rsid="00e034e5"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484" style:family="text">
      <style:text-properties fo:language="en" fo:country="US" style:language-complex="ar" style:country-complex="SA" style:script-type="latin"/>
    </style:style>
    <style:style style:name="T485" style:family="text">
      <style:text-properties fo:language="fr" fo:country="FR"/>
    </style:style>
    <style:style style:name="T486" style:family="text">
      <style:text-properties fo:color="#008800" loext:opacity="100%" fo:language="fr" fo:country="FR" fo:font-weight="bold" style:font-weight-asian="bold" style:font-weight-complex="bold"/>
    </style:style>
    <style:style style:name="T487" style:family="text">
      <style:text-properties fo:color="#333399" loext:opacity="100%" fo:language="fr" fo:country="FR" fo:font-weight="bold" style:font-weight-asian="bold" style:font-weight-complex="bold"/>
    </style:style>
    <style:style style:name="T488" style:family="text">
      <style:text-properties fo:language="en" fo:country="US" fo:font-weight="normal" style:font-weight-asian="normal" style:font-weight-complex="normal"/>
    </style:style>
    <style:style style:name="T489" style:family="text">
      <style:text-properties officeooo:rsid="0059032b"/>
    </style:style>
    <style:style style:name="T490" style:family="text">
      <style:text-properties officeooo:rsid="005acfe7"/>
    </style:style>
    <style:style style:name="T491" style:family="text">
      <style:text-properties fo:color="#333399" loext:opacity="100%" fo:font-weight="bold" style:font-name-asian="Arial Unicode MS1" style:language-asian="ja" style:country-asian="JP" style:font-weight-asian="bold" style:font-weight-complex="bold"/>
    </style:style>
    <style:style style:name="T492" style:family="text">
      <style:text-properties fo:color="#0066bb" loext:opacity="100%" fo:font-weight="bold" style:font-weight-asian="bold" style:font-weight-complex="bold"/>
    </style:style>
    <style:style style:name="T493" style:family="text">
      <style:text-properties fo:color="#888888" loext:opacity="100%" style:font-name="Courier New" fo:font-size="8pt" officeooo:rsid="0001435d" style:font-name-asian="Times New Roman1" style:font-size-asian="8pt" style:language-asian="en" style:country-asian="US" style:font-name-complex="Courier New1" style:font-size-complex="8pt"/>
    </style:style>
    <style:style style:name="T494" style:family="text">
      <style:text-properties fo:color="#888888" loext:opacity="100%" style:font-name="Courier New" fo:font-size="8pt" officeooo:rsid="00295d0c" style:font-name-asian="Times New Roman1" style:font-size-asian="8pt" style:language-asian="en" style:country-asian="US" style:font-name-complex="Courier New1" style:font-size-complex="8pt"/>
    </style:style>
    <style:style style:name="T495" style:family="text">
      <style:text-properties fo:color="#0066bb" loext:opacity="100%" style:font-name="Courier New" fo:font-size="8pt" fo:font-weight="bold" officeooo:rsid="0001435d" style:font-name-asian="Times New Roman1" style:font-size-asian="8pt" style:language-asian="en" style:country-asian="US" style:font-weight-asian="bold" style:font-name-complex="Courier New1" style:font-size-complex="8pt" style:font-weight-complex="bold"/>
    </style:style>
    <style:style style:name="T496" style:family="text">
      <style:text-properties fo:color="#333399"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497" style:family="text">
      <style:text-properties fo:color="#333333"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498" style:family="text">
      <style:text-properties fo:color="#0066bb"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499" style:family="text">
      <style:text-properties fo:color="#333333" loext:opacity="100%" style:font-name="Courier New" fo:font-size="8pt" fo:language="en" fo:country="US" fo:font-weight="normal" style:font-name-asian="Times New Roman1" style:font-size-asian="8pt" style:language-asian="ja" style:country-asian="JP" style:font-weight-asian="normal" style:font-name-complex="Courier New1" style:font-size-complex="8pt" style:font-weight-complex="normal"/>
    </style:style>
    <style:style style:name="T500"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501" style:family="text">
      <style:text-properties fo:color="#888888" loext:opacity="100%" style:font-name="Courier New" fo:font-size="8pt" officeooo:rsid="00bd1099" style:font-name-asian="Times New Roman1" style:font-size-asian="8pt" style:language-asian="en" style:country-asian="US" style:font-name-complex="Courier New1" style:font-size-complex="8pt"/>
    </style:style>
    <style:style style:name="T502" style:family="text">
      <style:text-properties fo:color="#333333"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503" style:family="text">
      <style:text-properties fo:color="#333333" loext:opacity="100%" style:font-name="Courier New" fo:font-size="8pt" fo:language="en" fo:country="GB" fo:font-weight="normal" style:font-name-asian="Times New Roman1" style:font-size-asian="8pt" style:language-asian="en" style:country-asian="US" style:font-weight-asian="normal" style:font-name-complex="Courier New1" style:font-size-complex="8pt" style:font-weight-complex="normal"/>
    </style:style>
    <style:style style:name="T504" style:family="text">
      <style:text-properties fo:color="#333333" loext:opacity="100%" style:font-name="Courier New" fo:font-size="8pt" fo:language="en" fo:country="US" fo:font-weight="normal" style:font-name-asian="Arial Unicode MS1" style:font-size-asian="8pt" style:language-asian="ja" style:country-asian="JP" style:font-weight-asian="normal" style:font-name-complex="Courier New1" style:font-size-complex="8pt" style:font-weight-complex="normal"/>
    </style:style>
    <style:style style:name="T505" style:family="text">
      <style:text-properties fo:color="#333333"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506" style:family="text">
      <style:text-properties fo:color="#333333"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507" style:family="text">
      <style:text-properties fo:color="#888888" loext:opacity="100%" style:font-name="Courier New" fo:font-size="8pt" fo:language="en" fo:country="US" style:letter-kerning="false" style:font-name-asian="Times New Roman1" style:font-size-asian="8pt" style:language-asian="en" style:country-asian="US" style:font-name-complex="Courier New1" style:font-size-complex="8pt" style:language-complex="ar" style:country-complex="SA"/>
    </style:style>
    <style:style style:name="T508" style:family="text">
      <style:text-properties fo:color="#888888" loext:opacity="100%" style:font-name="Courier New" fo:font-size="8pt" fo:language="en" fo:country="US" officeooo:rsid="00eed27f" style:letter-kerning="false" style:font-name-asian="Times New Roman1" style:font-size-asian="8pt" style:language-asian="en" style:country-asian="US" style:font-name-complex="Courier New1" style:font-size-complex="8pt" style:language-complex="ar" style:country-complex="SA"/>
    </style:style>
    <style:style style:name="T509" style:family="text">
      <style:text-properties fo:color="#333399" loext:opacity="100%" style:font-name="Courier New" fo:font-size="8pt" fo:font-weight="bold" style:letter-kerning="false" style:font-name-asian="Times New Roman1" style:font-size-asian="8pt" style:language-asian="ja" style:country-asian="JP" style:font-weight-asian="bold" style:font-name-complex="Courier New1" style:font-size-complex="8pt" style:language-complex="ar" style:country-complex="SA" style:font-weight-complex="bold"/>
    </style:style>
    <style:style style:name="T510" style:family="text">
      <style:text-properties fo:color="#333333" loext:opacity="100%" style:font-name="Courier New" fo:font-size="8pt" fo:language="zxx" fo:country="none" officeooo:rsid="00efde63" style:font-name-asian="Times New Roman1" style:font-size-asian="8pt" style:language-asian="zxx" style:country-asian="none" style:font-name-complex="Courier New1" style:font-size-complex="8pt" style:language-complex="zxx" style:country-complex="none"/>
    </style:style>
    <style:style style:name="T511" style:family="text">
      <style:text-properties fo:color="#333333" loext:opacity="100%" style:font-name="Courier New" fo:font-size="8pt" officeooo:rsid="00efde63" style:font-name-asian="Times New Roman1" style:font-size-asian="8pt" style:language-asian="en" style:country-asian="US" style:font-name-complex="Courier New1" style:font-size-complex="8pt"/>
    </style:style>
    <style:style style:name="T512" style:family="text">
      <style:text-properties fo:color="#333399" loext:opacity="100%" style:font-name="Courier New" fo:font-size="8pt" fo:font-weight="bold" style:letter-kerning="false" style:font-size-asian="8pt" style:language-asian="ja" style:country-asian="JP" style:font-weight-asian="bold" style:font-size-complex="8pt" style:language-complex="ar" style:country-complex="SA" style:font-weight-complex="bold"/>
    </style:style>
    <style:style style:name="T513" style:family="text">
      <style:text-properties fo:color="#333333" loext:opacity="100%" style:font-name="Courier New" fo:font-size="8pt" officeooo:rsid="010051e3" style:font-name-asian="Times New Roman1" style:font-size-asian="8pt" style:language-asian="en" style:country-asian="US" style:font-name-complex="Courier New1" style:font-size-complex="8pt"/>
    </style:style>
    <style:style style:name="T514" style:family="text">
      <style:text-properties fo:color="#333333" loext:opacity="100%" style:font-name="Courier New" fo:font-size="8pt" style:font-name-asian="Arial Unicode MS1" style:font-size-asian="8pt" style:font-size-complex="8pt"/>
    </style:style>
    <style:style style:name="T515" style:family="text">
      <style:text-properties fo:color="#333333" loext:opacity="100%" style:font-name="Courier New" fo:font-size="11pt" fo:language="en" fo:country="US" fo:font-weight="bold" officeooo:rsid="00ed9c33" style:letter-kerning="false" style:font-name-asian="Arial Unicode MS1" style:font-size-asian="11pt" style:language-asian="ja" style:country-asian="JP" style:font-weight-asian="bold" style:font-name-complex="Courier New1" style:font-size-complex="11pt" style:language-complex="ar" style:country-complex="SA" style:font-weight-complex="bold" style:script-type="latin"/>
    </style:style>
    <style:style style:name="T516" style:family="text">
      <style:text-properties fo:color="#888888" loext:opacity="100%" style:font-name="Courier New" fo:font-size="11pt" fo:language="en" fo:country="US" fo:font-weight="bold" officeooo:rsid="00ed9c33" style:letter-kerning="false" style:font-name-asian="Arial Unicode MS1" style:font-size-asian="11pt" style:language-asian="ja" style:country-asian="JP" style:font-weight-asian="bold" style:font-name-complex="Courier New1" style:font-size-complex="11pt" style:language-complex="ar" style:country-complex="SA" style:font-weight-complex="bold" style:script-type="latin"/>
    </style:style>
    <style:style style:name="T517" style:family="text">
      <style:text-properties style:use-window-font-color="true" loext:opacity="0%" style:font-name="Arial" fo:font-size="11pt" fo:language="en" fo:country="US" fo:font-weight="bold" officeooo:rsid="00f0c0a5"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cript-type="latin"/>
    </style:style>
    <style:style style:name="T518" style:family="text">
      <style:text-properties style:use-window-font-color="true" loext:opacity="0%" style:font-name="Arial" fo:font-size="11pt" fo:language="en" fo:country="US" officeooo:rsid="00eed27f" style:letter-kerning="false" style:font-name-asian="MS Mincho" style:font-size-asian="11pt" style:language-asian="ja" style:country-asian="JP" style:font-name-complex="Times New Roman1" style:font-size-complex="10pt" style:language-complex="ar" style:country-complex="SA" style:script-type="latin"/>
    </style:style>
    <style:style style:name="T519"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cript-type="latin"/>
    </style:style>
    <style:style style:name="T520" style:family="text">
      <style:text-properties fo:language="en" fo:country="US" fo:font-weight="normal" style:font-weight-asian="normal" style:font-weight-complex="normal" style:script-type="latin"/>
    </style:style>
    <style:style style:name="T521" style:family="text">
      <style:text-properties fo:language="en" fo:country="US" fo:font-weight="normal" officeooo:rsid="0100314f" style:font-weight-asian="normal" style:font-weight-complex="normal" style:script-type="latin"/>
    </style:style>
    <style:style style:name="T522" style:family="text">
      <style:text-properties fo:color="#333333" loext:opacity="100%" style:font-name="Courier New" fo:font-size="8pt" fo:language="en" fo:country="US" officeooo:rsid="00efde63" style:letter-kerning="false" style:font-name-asian="Times New Roman1" style:font-size-asian="8pt" style:language-asian="en" style:country-asian="US" style:font-name-complex="Courier New1" style:font-size-complex="8pt" style:language-complex="ar" style:country-complex="SA" style:script-type="latin"/>
    </style:style>
    <style:style style:name="T523" style:family="text">
      <style:text-properties fo:color="#333333" loext:opacity="100%" style:font-name="Courier New" fo:font-size="8pt" fo:language="en" fo:country="US" officeooo:rsid="010051e3" style:letter-kerning="false" style:font-name-asian="Times New Roman1" style:font-size-asian="8pt" style:language-asian="en" style:country-asian="US" style:font-name-complex="Courier New1" style:font-size-complex="8pt" style:language-complex="zxx" style:country-complex="none" style:script-type="latin"/>
    </style:style>
    <style:style style:name="T524" style:family="text">
      <style:text-properties fo:color="#333333" loext:opacity="100%" style:font-name="Courier New" fo:font-size="8pt" fo:language="en" fo:country="GB" style:letter-kerning="false" style:font-name-asian="Times New Roman1" style:font-size-asian="8pt" style:language-asian="en" style:country-asian="US" style:font-name-complex="Courier New1" style:font-size-complex="8pt" style:language-complex="ar" style:country-complex="SA"/>
    </style:style>
    <style:style style:name="T525" style:family="text">
      <style:text-properties fo:color="#333333" loext:opacity="100%" style:font-name="Courier New" fo:font-size="8pt" fo:language="en" fo:country="US" style:letter-kerning="false" style:font-name-asian="Times New Roman1" style:font-size-asian="8pt" style:language-asian="en" style:country-asian="US" style:font-name-complex="Courier New1" style:font-size-complex="8pt" style:language-complex="ar" style:country-complex="S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6149055872" text:id="ct36149055872">
          <text:deletion>
            <office:change-info>
              <dc:creator>DvO</dc:creator>
              <dc:date>2026-05-08T15:04:04</dc:date>
            </office:change-info>
            <text:p text:style-name="P6"><text:span text:style-name="T6">16 Feb</text:span></text:p>
          </text:deletion>
        </text:changed-region>
        <text:changed-region xml:id="ct36149064512" text:id="ct36149064512">
          <text:insertion>
            <office:change-info>
              <dc:creator>DvO</dc:creator>
              <dc:date>2026-05-08T15:04:04</dc:date>
            </office:change-info>
          </text:insertion>
        </text:changed-region>
        <text:changed-region xml:id="ct36172392128" text:id="ct36172392128">
          <text:deletion>
            <office:change-info>
              <dc:creator>DvO</dc:creator>
              <dc:date>2026-05-15T09:35:58</dc:date>
            </office:change-info>
            <text:p text:style-name="P97">first hostname set in the trust store if available, otherwise the </text:p>
          </text:deletion>
        </text:changed-region>
        <text:changed-region xml:id="ct36172396928" text:id="ct36172396928">
          <text:deletion>
            <office:change-info>
              <dc:creator>DvO</dc:creator>
              <dc:date>2026-05-15T09:36:05</dc:date>
            </office:change-info>
            <text:p text:style-name="P97"><text:s/></text:p>
          </text:deletion>
        </text:changed-region>
        <text:changed-region xml:id="ct36172391488" text:id="ct36172391488">
          <text:deletion>
            <office:change-info>
              <dc:creator>DvO</dc:creator>
              <dc:date>2026-05-15T09:36:15</dc:date>
            </office:change-info>
            <text:p text:style-name="P97">,</text:p>
          </text:deletion>
        </text:changed-region>
        <text:changed-region xml:id="ct36236188224" text:id="ct36236188224">
          <text:deletion>
            <office:change-info>
              <dc:creator>DvO</dc:creator>
              <dc:date>2026-05-15T22:37:57</dc:date>
            </office:change-info>
            <text:p text:style-name="P289"><text:span text:style-name="T354"><text:s/></text:span></text:p>
          </text:deletion>
        </text:changed-region>
        <text:changed-region xml:id="ct36236188544" text:id="ct36236188544">
          <text:insertion>
            <office:change-info>
              <dc:creator>DvO</dc:creator>
              <dc:date>2026-05-15T22:41:36</dc:date>
            </office:change-info>
          </text:insertion>
        </text:changed-region>
        <text:changed-region xml:id="ct36236185344" text:id="ct36236185344">
          <text:insertion>
            <office:change-info>
              <dc:creator>DvO</dc:creator>
              <dc:date>2026-05-15T22:38:56</dc:date>
            </office:change-info>
          </text:insertion>
        </text:changed-region>
        <text:changed-region xml:id="ct36236196224" text:id="ct36236196224">
          <text:deletion>
            <office:change-info>
              <dc:creator>DvO</dc:creator>
              <dc:date>2026-05-15T22:39:17</dc:date>
            </office:change-info>
            <text:p text:style-name="P289"><text:span text:style-name="T390">name</text:span></text:p>
          </text:deletion>
        </text:changed-region>
        <text:changed-region xml:id="ct36236183744" text:id="ct36236183744">
          <text:insertion>
            <office:change-info>
              <dc:creator>DvO</dc:creator>
              <dc:date>2026-05-15T22:40:11</dc:date>
            </office:change-info>
          </text:insertion>
        </text:changed-region>
        <text:changed-region xml:id="ct36236186304" text:id="ct36236186304">
          <text:deletion>
            <office:change-info>
              <dc:creator>DvO</dc:creator>
              <dc:date>2026-05-15T22:41:16</dc:date>
            </office:change-info>
            <text:p text:style-name="P289"><text:span text:style-name="T392">tries to interpret the string</text:span><text:span text:style-name="T394">s</text:span><text:span text:style-name="T392"> first as</text:span></text:p>
          </text:deletion>
        </text:changed-region>
        <text:changed-region xml:id="ct36236186624" text:id="ct36236186624">
          <text:insertion>
            <office:change-info>
              <dc:creator>DvO</dc:creator>
              <dc:date>2026-05-15T22:41:20</dc:date>
            </office:change-info>
          </text:insertion>
        </text:changed-region>
        <text:changed-region xml:id="ct36236193344" text:id="ct36236193344">
          <text:deletion>
            <office:change-info>
              <dc:creator>DvO</dc:creator>
              <dc:date>2026-05-15T22:41:30</dc:date>
            </office:change-info>
            <text:p text:style-name="P289"><text:span text:style-name="T392">then as</text:span></text:p>
          </text:deletion>
        </text:changed-region>
        <text:changed-region xml:id="ct36149053312" text:id="ct36149053312">
          <text:insertion>
            <office:change-info>
              <dc:creator>DvO</dc:creator>
              <dc:date>2026-05-11T10:51:20</dc:date>
            </office:change-info>
          </text:insertion>
        </text:changed-region>
        <text:changed-region xml:id="ct36149059072" text:id="ct36149059072">
          <text:deletion>
            <office:change-info>
              <dc:creator>DvO</dc:creator>
              <dc:date>2026-05-08T15:12:03</dc:date>
            </office:change-info>
            <text:p text:style-name="P297"><text:span text:style-name="T401">the specification given as </text:span></text:p>
          </text:deletion>
        </text:changed-region>
        <text:changed-region xml:id="ct36149057152" text:id="ct36149057152">
          <text:insertion>
            <office:change-info>
              <dc:creator>DvO</dc:creator>
              <dc:date>2026-05-11T10:51:20</dc:date>
            </office:change-info>
          </text:insertion>
        </text:changed-region>
        <text:changed-region xml:id="ct36149066112" text:id="ct36149066112">
          <text:deletion>
            <office:change-info>
              <dc:creator>DvO</dc:creator>
              <dc:date>2026-05-08T12:43:04</dc:date>
            </office:change-info>
            <text:p text:style-name="P297"><text:span text:style-name="T515">“</text:span></text:p>
          </text:deletion>
        </text:changed-region>
        <text:changed-region xml:id="ct36149053952" text:id="ct36149053952">
          <text:deletion>
            <office:change-info>
              <dc:creator>DvO</dc:creator>
              <dc:date>2026-05-08T12:39:08</dc:date>
            </office:change-info>
            <text:p text:style-name="P297"><text:span text:style-name="T516">RSA:&lt;length&gt;</text:span></text:p>
          </text:deletion>
        </text:changed-region>
        <text:changed-region xml:id="ct36149053632" text:id="ct36149053632">
          <text:deletion>
            <office:change-info>
              <dc:creator>DvO</dc:creator>
              <dc:date>2026-05-08T12:48:03</dc:date>
            </office:change-info>
            <text:p text:style-name="P297"><text:span text:style-name="T515">”</text:span></text:p>
          </text:deletion>
        </text:changed-region>
        <text:changed-region xml:id="ct36149052672" text:id="ct36149052672">
          <text:deletion>
            <office:change-info>
              <dc:creator>DvO</dc:creator>
              <dc:date>2026-05-11T10:49:59</dc:date>
            </office:change-info>
            <text:p text:style-name="P297"><text:span text:style-name="T516"><text:s/>or </text:span></text:p>
          </text:deletion>
        </text:changed-region>
        <text:changed-region xml:id="ct36149061952" text:id="ct36149061952">
          <text:deletion>
            <office:change-info>
              <dc:creator>DvO</dc:creator>
              <dc:date>2026-05-08T15:10:23</dc:date>
            </office:change-info>
            <text:p text:style-name="P297"><text:span text:style-name="T515">“</text:span></text:p>
          </text:deletion>
        </text:changed-region>
        <text:changed-region xml:id="ct36149062912" text:id="ct36149062912">
          <text:deletion>
            <office:change-info>
              <dc:creator>DvO</dc:creator>
              <dc:date>2026-05-08T12:38:54</dc:date>
            </office:change-info>
            <text:p text:style-name="P297"><text:span text:style-name="T516">EC:&lt;curve&gt;</text:span></text:p>
          </text:deletion>
        </text:changed-region>
        <text:changed-region xml:id="ct36149065152" text:id="ct36149065152">
          <text:deletion>
            <office:change-info>
              <dc:creator>DvO</dc:creator>
              <dc:date>2026-05-08T12:48:12</dc:date>
            </office:change-info>
            <text:p text:style-name="P297"><text:span text:style-name="T515">”</text:span></text:p>
          </text:deletion>
        </text:changed-region>
        <text:changed-region xml:id="ct36149052992" text:id="ct36149052992">
          <text:insertion>
            <office:change-info>
              <dc:creator>DvO</dc:creator>
              <dc:date>2026-05-11T10:51:20</dc:date>
            </office:change-info>
          </text:insertion>
        </text:changed-region>
        <text:changed-region xml:id="ct36149060352" text:id="ct36149060352">
          <text:format-change loext:style-name="T517">
            <office:change-info>
              <dc:creator>DvO</dc:creator>
              <dc:date>2026-05-11T11:48:11</dc:date>
            </office:change-info>
          </text:format-change>
        </text:changed-region>
        <text:changed-region xml:id="ct36149051712" text:id="ct36149051712">
          <text:insertion>
            <office:change-info>
              <dc:creator>DvO</dc:creator>
              <dc:date>2026-05-11T10:58:59</dc:date>
            </office:change-info>
          </text:insertion>
        </text:changed-region>
        <text:changed-region xml:id="ct36149062592" text:id="ct36149062592">
          <text:format-change loext:style-name="T518">
            <office:change-info>
              <dc:creator>DvO</dc:creator>
              <dc:date>2026-05-08T15:16:31</dc:date>
            </office:change-info>
          </text:format-change>
        </text:changed-region>
        <text:changed-region xml:id="ct36149054912" text:id="ct36149054912">
          <text:format-change loext:style-name="T519">
            <office:change-info>
              <dc:creator>DvO</dc:creator>
              <dc:date>2026-05-08T15:16:31</dc:date>
            </office:change-info>
          </text:format-change>
        </text:changed-region>
        <text:changed-region xml:id="ct36149060672" text:id="ct36149060672">
          <text:format-change loext:style-name="T420">
            <office:change-info>
              <dc:creator>DvO</dc:creator>
              <dc:date>2026-05-08T15:16:31</dc:date>
            </office:change-info>
          </text:format-change>
        </text:changed-region>
        <text:changed-region xml:id="ct36149054592" text:id="ct36149054592">
          <text:insertion>
            <office:change-info>
              <dc:creator>DvO</dc:creator>
              <dc:date>2026-05-11T10:47:00</dc:date>
            </office:change-info>
          </text:insertion>
        </text:changed-region>
        <text:changed-region xml:id="ct36149055232" text:id="ct36149055232">
          <text:deletion>
            <office:change-info>
              <dc:creator>DvO</dc:creator>
              <dc:date>2026-05-11T10:50:16</dc:date>
            </office:change-info>
            <text:p text:style-name="P297"><text:span text:style-name="T420"><text:s/></text:span></text:p>
          </text:deletion>
        </text:changed-region>
        <text:changed-region xml:id="ct36149066432" text:id="ct36149066432">
          <text:deletion>
            <office:change-info>
              <dc:creator>DvO</dc:creator>
              <dc:date>2026-05-11T10:52:00</dc:date>
            </office:change-info>
            <text:p text:style-name="P297"><text:span text:style-name="T401"><text:line-break/></text:span></text:p>
          </text:deletion>
        </text:changed-region>
        <text:changed-region xml:id="ct36149063872" text:id="ct36149063872">
          <text:format-change loext:style-name="T519">
            <office:change-info>
              <dc:creator>DvO</dc:creator>
              <dc:date>2026-05-08T15:16:31</dc:date>
            </office:change-info>
          </text:format-change>
        </text:changed-region>
        <text:changed-region xml:id="ct36149065472" text:id="ct36149065472">
          <text:deletion>
            <office:change-info>
              <dc:creator>DvO</dc:creator>
              <dc:date>2026-05-11T10:52:16</dc:date>
            </office:change-info>
            <text:p text:style-name="P297"><text:span text:style-name="T401"><text:line-break/></text:span></text:p>
          </text:deletion>
        </text:changed-region>
        <text:changed-region xml:id="ct36149055552" text:id="ct36149055552">
          <text:insertion>
            <office:change-info>
              <dc:creator>DvO</dc:creator>
              <dc:date>2026-05-08T14:57:43</dc:date>
            </office:change-info>
          </text:insertion>
        </text:changed-region>
        <text:changed-region xml:id="ct36236191744" text:id="ct36236191744">
          <text:insertion>
            <office:change-info>
              <dc:creator>DvO</dc:creator>
              <dc:date>2026-05-11T13:28:05</dc:date>
            </office:change-info>
          </text:insertion>
        </text:changed-region>
        <text:changed-region xml:id="ct36236190784" text:id="ct36236190784">
          <text:insertion>
            <office:change-info>
              <dc:creator>DvO</dc:creator>
              <dc:date>2026-05-11T13:29:24</dc:date>
            </office:change-info>
          </text:insertion>
        </text:changed-region>
        <text:changed-region xml:id="ct36413120640" text:id="ct36413120640">
          <text:deletion>
            <office:change-info>
              <dc:creator>DvO</dc:creator>
              <dc:date>2026-06-09T13:53:31</dc:date>
            </office:change-info>
            <text:p text:style-name="P298"><text:span text:style-name="T520">a provider-specific UR</text:span></text:p>
          </text:deletion>
        </text:changed-region>
        <text:changed-region xml:id="ct36149514624" text:id="ct36149514624">
          <text:deletion>
            <office:change-info>
              <dc:creator>DvO</dc:creator>
              <dc:date>2026-05-16T21:38:49</dc:date>
            </office:change-info>
            <text:p text:style-name="P298"><text:span text:style-name="T521">I</text:span></text:p>
          </text:deletion>
        </text:changed-region>
        <text:changed-region xml:id="ct36382472256" text:id="ct36382472256">
          <text:deletion>
            <office:change-info>
              <dc:creator>DvO</dc:creator>
              <dc:date>2026-06-09T13:53:31</dc:date>
            </office:change-info>
            <text:p text:style-name="P298"><text:span text:style-name="T520"><text:s/>by which the new key is to be referenced later</text:span></text:p>
          </text:deletion>
        </text:changed-region>
        <text:changed-region xml:id="ct36172396608" text:id="ct36172396608">
          <text:deletion>
            <office:change-info>
              <dc:creator>DvO</dc:creator>
              <dc:date>2026-05-16T21:39:04</dc:date>
            </office:change-info>
            <text:p text:style-name="P298"><text:span text:style-name="T521">. S</text:span></text:p>
          </text:deletion>
        </text:changed-region>
        <text:changed-region xml:id="ct36141145600" text:id="ct36141145600">
          <text:deletion>
            <office:change-info>
              <dc:creator>DvO</dc:creator>
              <dc:date>2026-05-16T21:45:04</dc:date>
            </office:change-info>
            <text:p text:style-name="P298"><text:span text:style-name="T521">o far</text:span></text:p>
          </text:deletion>
        </text:changed-region>
        <text:changed-region xml:id="ct36141139520" text:id="ct36141139520">
          <text:deletion>
            <office:change-info>
              <dc:creator>DvO</dc:creator>
              <dc:date>2026-05-16T21:40:34</dc:date>
            </office:change-info>
            <text:p text:style-name="P298"><text:span text:style-name="T521">,</text:span></text:p>
          </text:deletion>
        </text:changed-region>
        <text:changed-region xml:id="ct36141141760" text:id="ct36141141760">
          <text:deletion>
            <office:change-info>
              <dc:creator>DvO</dc:creator>
              <dc:date>2026-05-16T21:45:05</dc:date>
            </office:change-info>
            <text:p text:style-name="P298"><text:span text:style-name="T521"><text:s/></text:span></text:p>
          </text:deletion>
        </text:changed-region>
        <text:changed-region xml:id="ct36382464896" text:id="ct36382464896">
          <text:deletion>
            <office:change-info>
              <dc:creator>DvO</dc:creator>
              <dc:date>2026-06-09T13:53:31</dc:date>
            </office:change-info>
            <text:p text:style-name="P298"><text:span text:style-name="T520">the only form is </text:span><text:span text:style-name="T409">"tpm2:handle=0x&lt;hex-string&gt;"</text:span></text:p>
          </text:deletion>
        </text:changed-region>
        <text:changed-region xml:id="ct36149022144" text:id="ct36149022144">
          <text:insertion>
            <office:change-info>
              <dc:creator>DvO</dc:creator>
              <dc:date>2026-05-08T15:17:09</dc:date>
            </office:change-info>
          </text:insertion>
        </text:changed-region>
        <text:changed-region xml:id="ct36458535808" text:id="ct36458535808">
          <text:insertion>
            <office:change-info>
              <dc:creator>DvO</dc:creator>
              <dc:date>2026-06-09T13:53:56</dc:date>
            </office:change-info>
          </text:insertion>
        </text:changed-region>
        <text:changed-region xml:id="ct36149030464" text:id="ct36149030464">
          <text:deletion>
            <office:change-info>
              <dc:creator>DvO</dc:creator>
              <dc:date>2026-05-08T15:18:52</dc:date>
            </office:change-info>
            <text:p text:style-name="P298"/>
            <text:p text:style-name="P299"/>
          </text:deletion>
        </text:changed-region>
        <text:changed-region xml:id="ct36172428416" text:id="ct36172428416">
          <text:insertion>
            <office:change-info>
              <dc:creator>DvO</dc:creator>
              <dc:date>2026-05-08T14:54:10</dc:date>
            </office:change-info>
          </text:insertion>
        </text:changed-region>
        <text:changed-region xml:id="ct36172418496" text:id="ct36172418496">
          <text:format-change loext:style-name="T522">
            <office:change-info>
              <dc:creator>DvO</dc:creator>
              <dc:date>2026-05-11T11:50:09</dc:date>
            </office:change-info>
          </text:format-change>
          <text:insertion>
            <office:change-info>
              <dc:creator>DvO</dc:creator>
              <dc:date>2026-05-08T14:54:10</dc:date>
            </office:change-info>
          </text:insertion>
        </text:changed-region>
        <text:changed-region xml:id="ct36394402112" text:id="ct36394402112">
          <text:insertion>
            <office:change-info>
              <dc:creator>DvO</dc:creator>
              <dc:date>2026-06-09T13:52:50</dc:date>
            </office:change-info>
          </text:insertion>
        </text:changed-region>
        <text:changed-region xml:id="ct36030045376" text:id="ct36030045376">
          <text:format-change loext:style-name="T523">
            <office:change-info>
              <dc:creator>DvO</dc:creator>
              <dc:date>2026-06-09T13:54:44</dc:date>
            </office:change-info>
          </text:format-change>
          <text:insertion>
            <office:change-info>
              <dc:creator>DvO</dc:creator>
              <dc:date>2026-06-09T13:52:50</dc:date>
            </office:change-info>
          </text:insertion>
        </text:changed-region>
        <text:changed-region xml:id="ct36172420096" text:id="ct36172420096">
          <text:format-change loext:style-name="T524">
            <office:change-info>
              <dc:creator>DvO</dc:creator>
              <dc:date>2026-05-08T15:16:31</dc:date>
            </office:change-info>
          </text:format-change>
          <text:insertion>
            <office:change-info>
              <dc:creator>DvO</dc:creator>
              <dc:date>2026-05-08T14:54:10</dc:date>
            </office:change-info>
          </text:insertion>
        </text:changed-region>
        <text:changed-region xml:id="ct36172417216" text:id="ct36172417216">
          <text:insertion>
            <office:change-info>
              <dc:creator>DvO</dc:creator>
              <dc:date>2026-05-11T10:52:38</dc:date>
            </office:change-info>
          </text:insertion>
        </text:changed-region>
        <text:changed-region xml:id="ct36172418176" text:id="ct36172418176">
          <text:deletion>
            <office:change-info>
              <dc:creator>DvO</dc:creator>
              <dc:date>2026-05-08T15:24:27</dc:date>
            </office:change-info>
            <text:p text:style-name="P300"/>
            <text:p text:style-name="P283"><text:span text:style-name="T401"/></text:p>
          </text:deletion>
        </text:changed-region>
        <text:changed-region xml:id="ct36172419136" text:id="ct36172419136">
          <text:insertion>
            <office:change-info>
              <dc:creator>DvO</dc:creator>
              <dc:date>2026-05-08T15:07:09</dc:date>
            </office:change-info>
          </text:insertion>
        </text:changed-region>
        <text:changed-region xml:id="ct36172421376" text:id="ct36172421376">
          <text:insertion>
            <office:change-info>
              <dc:creator>DvO</dc:creator>
              <dc:date>2026-05-08T15:23:47</dc:date>
            </office:change-info>
          </text:insertion>
        </text:changed-region>
        <text:changed-region xml:id="ct36172430336" text:id="ct36172430336">
          <text:insertion>
            <office:change-info>
              <dc:creator>DvO</dc:creator>
              <dc:date>2026-05-08T15:23:43</dc:date>
            </office:change-info>
          </text:insertion>
        </text:changed-region>
        <text:changed-region xml:id="ct36172429056" text:id="ct36172429056">
          <text:insertion>
            <office:change-info>
              <dc:creator>DvO</dc:creator>
              <dc:date>2026-05-08T15:07:05</dc:date>
            </office:change-info>
          </text:insertion>
        </text:changed-region>
        <text:changed-region xml:id="ct36172416256" text:id="ct36172416256">
          <text:insertion>
            <office:change-info>
              <dc:creator>DvO</dc:creator>
              <dc:date>2026-05-08T15:23:50</dc:date>
            </office:change-info>
          </text:insertion>
        </text:changed-region>
        <text:changed-region xml:id="ct36172419776" text:id="ct36172419776">
          <text:insertion>
            <office:change-info>
              <dc:creator>DvO</dc:creator>
              <dc:date>2026-05-11T10:53:54</dc:date>
            </office:change-info>
          </text:insertion>
        </text:changed-region>
        <text:changed-region xml:id="ct36172417856" text:id="ct36172417856">
          <text:deletion>
            <office:change-info>
              <dc:creator>DvO</dc:creator>
              <dc:date>2026-05-11T10:53:54</dc:date>
            </office:change-info>
            <text:p text:style-name="P301"/>
            <text:p text:style-name="P301"/>
          </text:deletion>
        </text:changed-region>
        <text:changed-region xml:id="ct36236258240" text:id="ct36236258240">
          <text:deletion>
            <office:change-info>
              <dc:creator>DvO</dc:creator>
              <dc:date>2026-05-08T15:25:24</dc:date>
            </office:change-info>
            <text:p text:style-name="P276"><text:span text:style-name="T85"><text:line-break/></text:span></text:p>
          </text:deletion>
        </text:changed-region>
        <text:changed-region xml:id="ct36034583104" text:id="ct36034583104">
          <text:format-change loext:style-name="T99">
            <office:change-info>
              <dc:creator>DvO</dc:creator>
              <dc:date>2026-06-09T13:55:53</dc:date>
            </office:change-info>
          </text:format-change>
        </text:changed-region>
        <text:changed-region xml:id="ct36172427456" text:id="ct36172427456">
          <text:deletion>
            <office:change-info>
              <dc:creator>DvO</dc:creator>
              <dc:date>2026-05-08T13:00:04</dc:date>
            </office:change-info>
            <text:p text:style-name="P361"><text:span text:style-name="T370">spec </text:span></text:p>
          </text:deletion>
        </text:changed-region>
        <text:changed-region xml:id="ct36172424256" text:id="ct36172424256">
          <text:insertion>
            <office:change-info>
              <dc:creator>DvO</dc:creator>
              <dc:date>2026-05-08T12:59:30</dc:date>
            </office:change-info>
          </text:insertion>
        </text:changed-region>
        <text:changed-region xml:id="ct36172429376" text:id="ct36172429376">
          <text:deletion>
            <office:change-info>
              <dc:creator>DvO</dc:creator>
              <dc:date>2026-05-08T12:59:32</dc:date>
            </office:change-info>
            <text:p text:style-name="P361"><text:span text:style-name="T370"><text:s/>or</text:span></text:p>
          </text:deletion>
        </text:changed-region>
        <text:changed-region xml:id="ct36172428096" text:id="ct36172428096">
          <text:deletion>
            <office:change-info>
              <dc:creator>DvO</dc:creator>
              <dc:date>2026-05-08T14:50:01</dc:date>
            </office:change-info>
            <text:p text:style-name="P361"><text:span text:style-name="T370"><text:s/></text:span></text:p>
          </text:deletion>
        </text:changed-region>
        <text:changed-region xml:id="ct36172425856" text:id="ct36172425856">
          <text:insertion>
            <office:change-info>
              <dc:creator>DvO</dc:creator>
              <dc:date>2026-05-08T12:59:37</dc:date>
            </office:change-info>
          </text:insertion>
        </text:changed-region>
        <text:changed-region xml:id="ct36172416896" text:id="ct36172416896">
          <text:insertion>
            <office:change-info>
              <dc:creator>DvO</dc:creator>
              <dc:date>2026-05-08T12:37:59</dc:date>
            </office:change-info>
          </text:insertion>
        </text:changed-region>
        <text:changed-region xml:id="ct36172456704" text:id="ct36172456704">
          <text:format-change loext:style-name="T525">
            <office:change-info>
              <dc:creator>DvO</dc:creator>
              <dc:date>2026-06-09T13:55:35</dc:date>
            </office:change-info>
          </text:format-change>
        </text:changed-region>
        <text:changed-region xml:id="ct36172457024" text:id="ct36172457024">
          <text:format-change loext:style-name="T525">
            <office:change-info>
              <dc:creator>DvO</dc:creator>
              <dc:date>2026-06-09T13:55:58</dc:date>
            </office:change-info>
          </text:format-change>
        </text:changed-region>
        <text:changed-region xml:id="ct36034582784" text:id="ct36034582784">
          <text:format-change loext:style-name="T525">
            <office:change-info>
              <dc:creator>DvO</dc:creator>
              <dc:date>2026-06-09T13:56:02</dc:date>
            </office:change-info>
          </text:format-change>
        </text:changed-region>
        <text:changed-region xml:id="ct36172455104" text:id="ct36172455104">
          <text:format-change loext:style-name="T525">
            <office:change-info>
              <dc:creator>DvO</dc:creator>
              <dc:date>2026-06-09T13:56:05</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2"/>
      <text:p text:style-name="P2"/>
      <text:p text:style-name="P2"/>
      <text:p text:style-name="P3"/>
      <text:p text:style-name="P4"/>
      <text:p text:style-name="P4"/>
      <text:p text:style-name="P4"/>
      <text:p text:style-name="P3">Generic CMP client library API<text:bookmark text:name="OLE_LINK2"/><text:bookmark text:name="OLE_LINK1"/><text:bookmark text:name="OLE_LINK4"/></text:p>
      <text:p text:style-name="P5"/>
      <text:p text:style-name="P6"><text:change text:change-id="ct36149055872"/><text:change-start text:change-id="ct36149064512"/><text:span text:style-name="T1">8 May</text:span><text:change-end text:change-id="ct36149064512"/><text:span text:style-name="T2"> 202</text:span><text:span text:style-name="T3">6</text:span></text:p>
      <text:p text:style-name="P7">– released <text:span text:style-name="T4">with genCMPClient v</text:span><text:span text:style-name="T5">2.</text:span><text:span text:style-name="T6">2</text:span><text:span text:style-name="T4">, </text:span><text:span text:style-name="T7">updated</text:span><text:span text:style-name="T4"> –</text:span></text:p>
      <text:p text:style-name="P8"/>
      <text:p text:style-name="P9"/>
      <text:p text:style-name="P8"/>
      <text:p text:style-name="P8"/>
      <text:p text:style-name="P8"/>
      <text:p text:style-name="P10"/>
      <text:p text:style-name="P11"/>
      <text:p text:style-name="P11"/>
      <text:p text:style-name="P11"/>
      <text:p text:style-name="P12"><text:span text:style-name="T8">Dr. David von Oheimb, </text:span><text:span text:style-name="T9">Siemens</text:span><text:span text:style-name="T8"> AG</text:span></text:p>
      <text:p text:style-name="P8"/>
      <text:p text:style-name="P13"/>
      <text:h text:style-name="P14" text:outline-level="1"><text:bookmark-start text:name="__RefHeading___Toc7952_2160941350"/>Public<text:bookmark-end text:name="__RefHeading___Toc7952_2160941350"/></text:h>
      <text:p text:style-name="P12"><text:span text:style-name="T10">Copyright </text:span><text:span text:style-name="T11">(c)</text:span><text:span text:style-name="T12"> </text:span><text:span text:style-name="T10">Siemens AG, 2021-</text:span><text:span text:style-name="T11">202</text:span><text:span text:style-name="T13">6</text:span></text:p>
      <text:p text:style-name="P15">Table of Contents</text:p>
      <text:section text:style-name="Sect1" text:name="Section1">
        <text:p text:style-name="P16"/>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7"><text:a xlink:type="simple" xlink:href="#__RefHeading___Toc7952_2160941350" text:style-name="Index_20_Link" text:visited-style-name="Index_20_Link">Public<text:tab/>1</text:a></text:p>
            <text:p text:style-name="P17"><text:a xlink:type="simple" xlink:href="#__RefHeading___Toc56659_2781851127" text:style-name="Index_20_Link" text:visited-style-name="Index_20_Link">1. Introduction<text:tab/>3</text:a></text:p>
            <text:p text:style-name="P18"><text:a xlink:type="simple" xlink:href="#__RefHeading___Toc13177_3177186546" text:style-name="Index_20_Link" text:visited-style-name="Index_20_Link">1.1 Motivation and Purpose<text:tab/>3</text:a></text:p>
            <text:p text:style-name="P18"><text:a xlink:type="simple" xlink:href="#__RefHeading___Toc13179_3177186546" text:style-name="Index_20_Link" text:visited-style-name="Index_20_Link">1.2 Scope and Status<text:tab/>3</text:a></text:p>
            <text:p text:style-name="P18"><text:a xlink:type="simple" xlink:href="#__RefHeading___Toc13181_3177186546" text:style-name="Index_20_Link" text:visited-style-name="Index_20_Link">1.3 References<text:tab/>4</text:a></text:p>
            <text:p text:style-name="P17"><text:a xlink:type="simple" xlink:href="#__RefHeading___Toc13183_3177186546" text:style-name="Index_20_Link" text:visited-style-name="Index_20_Link">2. Overview<text:tab/>4</text:a></text:p>
            <text:p text:style-name="P17"><text:a xlink:type="simple" xlink:href="#__RefHeading___Toc13185_3177186546" text:style-name="Index_20_Link" text:visited-style-name="Index_20_Link">3. Core functionality<text:tab/>6</text:a></text:p>
            <text:p text:style-name="P18"><text:a xlink:type="simple" xlink:href="#__RefHeading___Toc13187_3177186546" text:style-name="Index_20_Link" text:visited-style-name="Index_20_Link">3.1 CMPclient_prepare<text:tab/>6</text:a></text:p>
            <text:p text:style-name="P18"><text:a xlink:type="simple" xlink:href="#__RefHeading___Toc13189_3177186546" text:style-name="Index_20_Link" text:visited-style-name="Index_20_Link">3.2 CMPclient_setup_HTTP and CMPclient_setup_BIO<text:tab/>8</text:a></text:p>
            <text:p text:style-name="P18"><text:a xlink:type="simple" xlink:href="#__RefHeading___Toc13191_3177186546" text:style-name="Index_20_Link" text:visited-style-name="Index_20_Link">3.3 CMPclient_add_certProfile<text:tab/>10</text:a></text:p>
            <text:p text:style-name="P18"><text:a xlink:type="simple" xlink:href="#__RefHeading___Toc28337_3580160810" text:style-name="Index_20_Link" text:visited-style-name="Index_20_Link">3.4 CMPclient_imprint, CMPclient_bootstrap, CMPclient_pkcs10, CMPclient_update, and CMPclient_update_anycert<text:tab/>10</text:a></text:p>
            <text:p text:style-name="P18"><text:a xlink:type="simple" xlink:href="#__RefHeading___Toc28339_3580160810" text:style-name="Index_20_Link" text:visited-style-name="Index_20_Link">3.5 CMPclient_revoke<text:tab/>12</text:a></text:p>
            <text:p text:style-name="P18"><text:a xlink:type="simple" xlink:href="#__RefHeading___Toc11727_3465195016" text:style-name="Index_20_Link" text:visited-style-name="Index_20_Link">3.6 CMPclient_caCerts<text:tab/>12</text:a></text:p>
            <text:p text:style-name="P18"><text:a xlink:type="simple" xlink:href="#__RefHeading___Toc28341_3580160810" text:style-name="Index_20_Link" text:visited-style-name="Index_20_Link">3.7 CMPclient_certReqTemplate<text:tab/>12</text:a></text:p>
            <text:p text:style-name="P18"><text:a xlink:type="simple" xlink:href="#__RefHeading___Toc28343_3580160810" text:style-name="Index_20_Link" text:visited-style-name="Index_20_Link">3.8 CMPclient_rootCaCert<text:tab/>12</text:a></text:p>
            <text:p text:style-name="P18"><text:a xlink:type="simple" xlink:href="#__RefHeading___Toc28345_3580160810" text:style-name="Index_20_Link" text:visited-style-name="Index_20_Link">3.9 CMPclient_crlUpdate<text:tab/>13</text:a></text:p>
            <text:p text:style-name="P18"><text:a xlink:type="simple" xlink:href="#__RefHeading___Toc56611_2781851127" text:style-name="Index_20_Link" text:visited-style-name="Index_20_Link">3.10 CMPclient_snprint_PKIStatus<text:tab/>13</text:a></text:p>
            <text:p text:style-name="P18"><text:a xlink:type="simple" xlink:href="#__RefHeading___Toc56613_2781851127" text:style-name="Index_20_Link" text:visited-style-name="Index_20_Link">3.11 CMPclient_reinit<text:tab/>13</text:a></text:p>
            <text:p text:style-name="P18"><text:a xlink:type="simple" xlink:href="#__RefHeading___Toc13197_3177186546" text:style-name="Index_20_Link" text:visited-style-name="Index_20_Link">3.12 CMPclient_finish<text:tab/>13</text:a></text:p>
            <text:p text:style-name="P18"><text:a xlink:type="simple" xlink:href="#__RefHeading___Toc13199_3177186546" text:style-name="Index_20_Link" text:visited-style-name="Index_20_Link">3.13 Logging<text:tab/>14</text:a></text:p>
            <text:p text:style-name="P18"><text:a xlink:type="simple" xlink:href="#__RefHeading___Toc7499_2160941350" text:style-name="Index_20_Link" text:visited-style-name="Index_20_Link">3.14 Message transfer callback function<text:tab/>15</text:a></text:p>
            <text:p text:style-name="P18"><text:a xlink:type="simple" xlink:href="#__RefHeading___Toc13201_3177186546" text:style-name="Index_20_Link" text:visited-style-name="Index_20_Link">3.15 Certificate checking callback function<text:tab/>15</text:a></text:p>
            <text:p text:style-name="P18"><text:a xlink:type="simple" xlink:href="#__RefHeading___Toc8499_2160941350" text:style-name="Index_20_Link" text:visited-style-name="Index_20_Link">3.16 <text:s/>Component credentials<text:tab/>16</text:a></text:p>
            <text:p text:style-name="P17"><text:a xlink:type="simple" xlink:href="#__RefHeading___Toc13203_3177186546" text:style-name="Index_20_Link" text:visited-style-name="Index_20_Link">4. Support functionality<text:tab/>17</text:a></text:p>
            <text:p text:style-name="P18"><text:a xlink:type="simple" xlink:href="#__RefHeading___Toc13205_3177186546" text:style-name="Index_20_Link" text:visited-style-name="Index_20_Link">4.1 CREDENTIALS helpers<text:tab/>17</text:a></text:p>
            <text:p text:style-name="P18"><text:a xlink:type="simple" xlink:href="#__RefHeading___Toc13207_3177186546" text:style-name="Index_20_Link" text:visited-style-name="Index_20_Link">4.2 X509_STORE helpers<text:tab/>18</text:a></text:p>
            <text:p text:style-name="P18"><text:a xlink:type="simple" xlink:href="#__RefHeading___Toc13209_3177186546" text:style-name="Index_20_Link" text:visited-style-name="Index_20_Link">4.3 EVP_PKEY helpers<text:tab/>21</text:a></text:p>
            <text:p text:style-name="P18"><text:a xlink:type="simple" xlink:href="#__RefHeading___Toc7954_2160941350" text:style-name="Index_20_Link" text:visited-style-name="Index_20_Link">4.4 SSL_CTX helpers<text:tab/>21</text:a></text:p>
            <text:p text:style-name="P18"><text:a xlink:type="simple" xlink:href="#__RefHeading___Toc13211_3177186546" text:style-name="Index_20_Link" text:visited-style-name="Index_20_Link">4.5 X509_EXTENSIONS helpers<text:tab/>22</text:a></text:p>
            <text:p text:style-name="P17"><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19"/>
        <text:h text:style-name="P20"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text:style-name="WWNum2">
          <text:list-item>
            <text:list>
              <text:list-item>
                <text:h text:style-name="P21"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P22">CMP <text:span text:style-name="T14">(</text:span>[RFC<text:span text:style-name="T14">98</text:span>10], <text:span text:style-name="T14">originally [RFC4210])</text:span>, including CRMF <text:span text:style-name="T14">(</text:span>[RFC4211] <text:span text:style-name="T14">updated by [RFC9045]) </text:span>and HTTP transfer for CMP <text:span text:style-name="T14">(</text:span>[RFC<text:span text:style-name="T14">98</text:span>1<text:span text:style-name="T14">1</text:span>], <text:span text:style-name="T14">originally [RFC6712])</text:span>, is <text:span text:style-name="T14">a </text:span>certificate management protocol, <text:span text:style-name="T15">supporting </text:span><text:span text:style-name="T16">t</text:span><text:span text:style-name="T17">he </text:span>enrollment, update, and revocation of certificates.<text:line-break/><text:line-break/><text:span text:style-name="T2">In late 2024</text:span><text:span text:style-name="T18">, IETF </text:span><text:span text:style-name="T2">released</text:span><text:span text:style-name="T18"> updates to CMP </text:span><text:span text:style-name="T2">[RFC 9480] </text:span><text:span text:style-name="T18">as well as a Lightweight CMP Profile [</text:span><text:span text:style-name="T19">L</text:span><text:span text:style-name="T18">CMPP, </text:span><text:span text:style-name="T2">RFC 9483</text:span><text:span text:style-name="T18">] for industrial and IoT application scenarios. These provide</text:span><text:span text:style-name="T14">d</text:span><text:span text:style-name="T18"> extensions </text:span><text:span text:style-name="T14">to CMPv2 </text:span><text:span text:style-name="T18">supporting specific message exchanges for retrieving CA certificates, </text:span><text:span text:style-name="T20">root CA certificate updates, </text:span><text:span text:style-name="T18">certificate request templates, and CRLs, as well as </text:span><text:span text:style-name="T5">support for </text:span><text:span text:style-name="T18">certificate profiles, central key generation, and polling for all </text:span><text:span text:style-name="T21">types</text:span><text:span text:style-name="T18"> of </text:span><text:span text:style-name="T21">CMP response</text:span><text:span text:style-name="T18">s. These 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3" text:outline-level="2"><text:bookmark-start text:name="_Toc5814389"/><text:bookmark-start text:name="_Toc507509436"/><text:bookmark-start text:name="__RefHeading___Toc13179_3177186546"/><text:span text:style-name="T10">Scope</text:span><text:bookmark-end text:name="_Toc5814389"/><text:bookmark-end text:name="_Toc507509436"/><text:span text:style-name="T10"> and Status</text:span><text:bookmark-end text:name="__RefHeading___Toc13179_3177186546"/></text:h>
              </text:list-item>
            </text:list>
          </text:list-item>
        </text:list>
        <text:p text:style-name="Standard">There is an open-source CMP client implementation that we build upon: CMPforOpenSSL, located on GitHub [<text:span text:style-name="T22">cmpossl</text:span>]. It offers both a library based on OpenSSL with a low-level C API and a high-level command-line interface (CLI).</text:p>
        <text:p text:style-name="Standard"><draw:frame draw:style-name="fr1" draw:name="Picture 16" text:anchor-type="as-char" svg:width="5.0063in" svg:height="2.6398in"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text:span text:style-name="T19">Lightweight </text:span>CMP Profile for Industrial Certificate Management Use Cases [<text:span text:style-name="T19">L</text:span>CMPP].<text:bookmark-start text:name="_Toc507509437"/> </text:p>
        <text:p text:style-name="P24">The implementation makes use of the SecurityUtilities library <text:span text:style-name="T23">[</text:span><text:span text:style-name="T24">libsecutils</text:span><text:span text:style-name="T23">]</text:span>. <text:span text:style-name="T23">I</text:span><text:span text:style-name="T7">t </text:span><text:span text:style-name="T23">also </text:span><text:span text:style-name="T7">uses</text:span> either <text:span text:style-name="T23">the CMP implementation</text:span> integrated <text:span text:style-name="T7">with</text:span> OpenSSL <text:span text:style-name="T7">since version</text:span> 3.0<text:span text:style-name="T18"> </text:span>or CMPforOpenSSL, a standalone <text:span text:style-name="T23">intermediate </text:span>CMP library <text:span text:style-name="T23">with the latest features and fixes, which can by </text:span>dynamically linked to OpenSSL <text:span text:style-name="T18">3.0 or later</text:span>. For details, history, and more current information please refer to the Wiki page of [cmpossl].</text:p>
        <text:p text:style-name="P25">The library has been open-sourced by Siemens AG <text:span text:style-name="T18">as version 1.0 </text:span><text:span text:style-name="T4">on 17th</text:span> September 2021. </text:p>
        <text:p text:style-name="P25">On top of the API a rather extensive CMP client CLI is available as demo application and for testing and exploration purposes. </text:p>
        <text:p text:style-name="P25">Instructions for obtaining, building, installing, and using the library and the CLI can be found at [genCMPClient].</text:p>
        <text:list text:continue-numbering="true" text:style-name="WWNum2">
          <text:list-item>
            <text:list>
              <text:list-item>
                <text:h text:style-name="P26"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7">Reference</text:p>
                <text:p text:style-name="P27">ID</text:p>
              </table:table-cell>
              <table:table-cell table:style-name="Table4.B1" office:value-type="string">
                <text:p text:style-name="P28">Document with title, unique identifier and version</text:p>
              </table:table-cell>
            </table:table-row>
            <table:table-row table:style-name="Table4.1">
              <table:table-cell table:style-name="Table4.A2" office:value-type="string">
                <text:p text:style-name="P29">[RFC4210]</text:p>
              </table:table-cell>
              <table:table-cell table:style-name="Table4.B2" office:value-type="string">
                <text:p text:style-name="P30">RFC4210: “Internet X.509 Public Key Infrastructure -- Certificate Management Protocol (CMP)“, 2005</text:p>
                <text:p text:style-name="P30"><text:a xlink:type="simple" xlink:href="https://www.rfc-editor.org/info/rfc4210" text:style-name="Internet_20_link" text:visited-style-name="Visited_20_Internet_20_Link">https://www.rfc-editor.org/info/rfc4210</text:a></text:p>
              </table:table-cell>
            </table:table-row>
            <table:table-row table:style-name="Table4.1">
              <table:table-cell table:style-name="Table4.A3" office:value-type="string">
                <text:p text:style-name="P29">[RFC4211]</text:p>
              </table:table-cell>
              <table:table-cell table:style-name="Table4.B3" office:value-type="string">
                <text:p text:style-name="P30">RFC4211: “Internet X.509 Public Key Infrastructure -- Certificate Request Message Format (CRMF)”, 2005</text:p>
                <text:p text:style-name="P30"><text:a xlink:type="simple" xlink:href="https://www.rfc-editor.org/info/rfc4211" text:style-name="Internet_20_link" text:visited-style-name="Visited_20_Internet_20_Link"><text:span text:style-name="Internet_20_link">https://www.rfc-editor.org/info/rfc4211</text:span></text:a></text:p>
              </table:table-cell>
            </table:table-row>
          </table:table-header-rows>
          <table:table-row table:style-name="Table4.1">
            <table:table-cell table:style-name="Table4.A4" office:value-type="string">
              <text:p text:style-name="P29">[RFC5280]</text:p>
            </table:table-cell>
            <table:table-cell table:style-name="Table4.B4" office:value-type="string">
              <text:p text:style-name="P30">RFC5280: “Certificate and Certificate Revocation List (CRL) Profile”, 2008</text:p>
              <text:p text:style-name="P30"><text:a xlink:type="simple" xlink:href="https://www.rfc-editor.org/info/rfc5280" text:style-name="Internet_20_link" text:visited-style-name="Visited_20_Internet_20_Link"><text:span text:style-name="Internet_20_link">https://www.rfc-editor.org/info/rfc5280</text:span></text:a></text:p>
            </table:table-cell>
          </table:table-row>
          <table:table-row table:style-name="Table4.1">
            <table:table-cell table:style-name="Table4.A5" office:value-type="string">
              <text:p text:style-name="P29">[RFC6712]</text:p>
            </table:table-cell>
            <table:table-cell table:style-name="Table4.B5" office:value-type="string">
              <text:p text:style-name="P31">RFC6712: “Internet X.509 Public Key Infrastructure -- HTTP Transfer for the Certificate Management Protocol (CMP)”, 2012</text:p>
              <text:p text:style-name="P31"><text:a xlink:type="simple" xlink:href="https://www.rfc-editor.org/info/rfc6712" text:style-name="Internet_20_link" text:visited-style-name="Visited_20_Internet_20_Link"><text:span text:style-name="Internet_20_link"><text:span text:style-name="T25">https://www.rfc-editor.org/info/rfc6712</text:span></text:span></text:a></text:p>
            </table:table-cell>
          </table:table-row>
          <table:table-row table:style-name="Table4.1">
            <table:table-cell table:style-name="Table4.A5" office:value-type="string">
              <text:p text:style-name="P29">‍<text:span text:style-name="T25">[RFC9045]</text:span></text:p>
            </table:table-cell>
            <table:table-cell table:style-name="Table4.B5" office:value-type="string">
              <text:p text:style-name="P31"><text:span text:style-name="T25">Algorithm Requirements Update to the Internet X.509 Public Key Infrastructure -- Certificate Request Message Format (CRMF), 2021</text:span><text:line-break/><text:a xlink:type="simple" xlink:href="https://www.rfc-editor.org/info/rfc9045" text:style-name="Internet_20_link" text:visited-style-name="Visited_20_Internet_20_Link"><text:span text:style-name="T25">https://www.rfc-editor.org/info/rfc9045</text:span></text:a></text:p>
            </table:table-cell>
          </table:table-row>
          <table:table-row table:style-name="Table4.1">
            <table:table-cell table:style-name="Table4.A5" office:value-type="string">
              <text:p text:style-name="P29">[RFC<text:span text:style-name="T26">98</text:span>10]</text:p>
            </table:table-cell>
            <table:table-cell table:style-name="Table4.B5" office:value-type="string">
              <text:p text:style-name="P30">RFC<text:span text:style-name="T26">98</text:span>10: “Internet X.509 Public Key Infrastructure -- Certificate Management Protocol (CMP)“, 20<text:span text:style-name="T26">2</text:span>5</text:p>
              <text:p text:style-name="P30"><text:a xlink:type="simple" xlink:href="https://www.rfc-editor.org/info/rfc9810" text:style-name="Internet_20_link" text:visited-style-name="Visited_20_Internet_20_Link"><text:span text:style-name="T26">https://www.rfc-editor.org/info/rfc9810</text:span></text:a></text:p>
            </table:table-cell>
          </table:table-row>
          <table:table-row table:style-name="Table4.1">
            <table:table-cell table:style-name="Table4.A5" office:value-type="string">
              <text:p text:style-name="P29">[RFC<text:span text:style-name="T26">98</text:span>1<text:span text:style-name="T26">1</text:span>]</text:p>
            </table:table-cell>
            <table:table-cell table:style-name="Table4.B5" office:value-type="string">
              <text:p text:style-name="P31">RFC<text:span text:style-name="T26">98</text:span>1<text:span text:style-name="T26">1</text:span>: “Internet X.509 Public Key Infrastructure -- HTTP Transfer for the Certificate Management Protocol (CMP)”, 20<text:span text:style-name="T26">25</text:span></text:p>
              <text:p text:style-name="P31"><text:a xlink:type="simple" xlink:href="https://www.rfc-editor.org/info/rfc9811" text:style-name="Internet_20_link" text:visited-style-name="Visited_20_Internet_20_Link"><text:span text:style-name="Internet_20_link"><text:span text:style-name="T26">https://www.rfc-editor.org/info/rfc9811</text:span></text:span></text:a></text:p>
            </table:table-cell>
          </table:table-row>
          <table:table-row table:style-name="Table4.1">
            <table:table-cell table:style-name="Table4.A9" office:value-type="string">
              <text:p text:style-name="P29">[<text:span text:style-name="T27">OID-ref</text:span>]</text:p>
            </table:table-cell>
            <table:table-cell table:style-name="Table4.B9" office:value-type="string">
              <text:p text:style-name="P31">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10" office:value-type="string">
              <text:p text:style-name="P29">[OpenSSL-ciphers]</text:p>
            </table:table-cell>
            <table:table-cell table:style-name="Table4.B10" office:value-type="string">
              <text:p text:style-name="P31">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22">ciphers.html</text:span></text:span></text:a></text:p>
            </table:table-cell>
          </table:table-row>
          <table:table-row table:style-name="Table4.1">
            <table:table-cell table:style-name="Table4.A11" office:value-type="string">
              <text:p text:style-name="P29">[<text:span text:style-name="T22">OpenSSL-</text:span><text:span text:style-name="T28">ext-</text:span><text:span text:style-name="T22">config</text:span>]</text:p>
            </table:table-cell>
            <table:table-cell table:style-name="Table4.B11" office:value-type="string">
              <text:p text:style-name="P31">OpenSSL manual page on X509 V3 cer<text:span text:style-name="T23">tificate</text:span> extension <text:span text:style-name="T22">config</text:span>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22">config.html</text:span></text:span></text:a></text:p>
            </table:table-cell>
          </table:table-row>
          <table:table-row table:style-name="Table4.1">
            <table:table-cell table:style-name="Table4.A12" office:value-type="string">
              <text:p text:style-name="P32">[<text:span text:style-name="T22">OpenSSl-provider</text:span>]</text:p>
            </table:table-cell>
            <table:table-cell table:style-name="Table4.B12" office:value-type="string">
              <text:p text:style-name="P33">OpenSSL manual page on <text:span text:style-name="T29">the </text:span>crypto <text:span text:style-name="T29">provider</text:span> API, 20<text:span text:style-name="T29">22<text:line-break/></text:span><text:a xlink:type="simple" xlink:href="https://github.com/openssl/openssl/blob/master/README-PROVIDERS.md" text:style-name="Internet_20_link" text:visited-style-name="Visited_20_Internet_20_Link"><text:span text:style-name="T29">https://github.com/openssl/openssl/blob/master/README-PROVIDERS.md</text:span></text:a></text:p>
            </table:table-cell>
          </table:table-row>
          <table:table-row table:style-name="Table4.1">
            <table:table-cell table:style-name="Table4.A13" office:value-type="string">
              <text:p text:style-name="P34">[<text:span text:style-name="T30">OpenSSL-engine</text:span>]</text:p>
            </table:table-cell>
            <table:table-cell table:style-name="Table4.B13" office:value-type="string">
              <text:p text:style-name="P31">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22">init.html</text:span></text:span></text:a></text:p>
            </table:table-cell>
          </table:table-row>
          <table:table-row table:style-name="Table4.1">
            <table:table-cell table:style-name="Table4.A14" office:value-type="string">
              <text:p text:style-name="P29">[OpenSSL-sec-level]</text:p>
            </table:table-cell>
            <table:table-cell table:style-name="Table4.B14" office:value-type="string">
              <text:p text:style-name="P31">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31">https://www.openssl.org/docs/manmaster/man3/SSL_CTX_get_security_</text:span></text:span><text:span text:style-name="Internet_20_link"><text:span text:style-name="T32">level.html</text:span></text:span></text:a></text:p>
            </table:table-cell>
          </table:table-row>
          <table:table-row table:style-name="Table4.1">
            <table:table-cell table:style-name="Table4.A15" office:value-type="string">
              <text:p text:style-name="P35">[<text:span text:style-name="T33">cmpossl]</text:span></text:p>
            </table:table-cell>
            <table:table-cell table:style-name="Table4.B15" office:value-type="string">
              <text:p text:style-name="P31">M. Peylo and D. von Oheimb: CMP for OpenSSL project, 2019</text:p>
              <text:p text:style-name="P31"><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6" office:value-type="string">
              <text:p text:style-name="P36">[libsecutils]</text:p>
            </table:table-cell>
            <table:table-cell table:style-name="Table4.B16" office:value-type="string">
              <text:p text:style-name="P37">D. von Oheimb et <text:span text:style-name="T22">al.</text:span>: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7" office:value-type="string">
              <text:p text:style-name="P38">[genCMPClient]</text:p>
            </table:table-cell>
            <table:table-cell table:style-name="Table4.B17" office:value-type="string">
              <text:p text:style-name="P31">D. von Oheimb: Generic CMP Client library and CLI, 202<text:span text:style-name="T34">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8" office:value-type="string">
              <text:p text:style-name="P39">[<text:span text:style-name="T19">L</text:span>CMPP, <text:span text:style-name="T2">RFC9483</text:span>]</text:p>
            </table:table-cell>
            <table:table-cell table:style-name="Table4.B18" office:value-type="string">
              <text:p text:style-name="P31">IETF <text:span text:style-name="T19">RFC 9483</text:span><text:span text:style-name="T35"> – </text:span>H. Brockhaus, S. Fries, and <text:span text:style-name="T36">D</text:span>. von Oheimb: “Lightweight Certificate Management Protocol (CMP) Profile”, 20<text:span text:style-name="T5">2</text:span><text:span text:style-name="T2">4</text:span></text:p>
              <text:p text:style-name="P31"><text:span text:style-name="Internet_20_link"><text:span text:style-name="T22">https://www.rfc-editor.org/info/rfc9483</text:span></text:span></text:p>
            </table:table-cell>
          </table:table-row>
        </table:table>
        <text:h text:style-name="P40" text:outline-level="1"/>
        <text:list text:continue-numbering="true" text:style-name="WWNum2">
          <text:list-item>
            <text:h text:style-name="P41" text:outline-level="1"><text:bookmark-start text:name="__RefHeading___Toc13183_3177186546"/><text:bookmark-start text:name="_Ref507656008"/><text:bookmark-start text:name="_Ref507661910"/><text:bookmark-start text:name="_Toc5814391"/>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text:span text:style-name="T18">was originally</text:span> built on top of OpenSSL 1.x and <text:span text:style-name="T37">then </text:span>has been integrated with OpenSSL 3.0. Thus we inherit several declarations from there. In particular, the type <text:span text:style-name="T38">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38">CMP_CTX</text:span>). This context includes all parameters and state information of a CMP transaction. The function <text:span text:style-name="T39">CMPclient</text:span><text:span text:style-name="T40">_prepare()</text:span><text:span text:style-name="T41"> </text:span>sets up those parts of the context data structure generally needed for all use cases. <text:s/>As far as needed, the pointer provided by this function (typically named <text:span text:style-name="T42">ctx</text:span>) <text:span text:style-name="T43">may be used </text:span>to set up any further, uncommon CMP client parameters. In this way we make sure that the low-level API of <text:span text:style-name="T43">OpenSSL or </text:span>CMPforOpenSSL defined in the C header file <text:span text:style-name="T44">cmp.h</text:span> can be used jointly with this API.</text:p>
        <text:p text:style-name="P42">One of the parameters of <text:span text:style-name="T39">CMPclient</text:span><text:span text:style-name="T40">_prepare()</text:span> is the callback function pointer <text:span text:style-name="T42">transfer_fn</text:span>. <text:s/>By default (when <text:span text:style-name="T42">NULL</text:span><text:span text:style-name="T41"> </text:span>is given as the actual argument), standard HTTP(S) transfer is selected. In this case, a second function, <text:span text:style-name="T39">CMPclient</text:span><text:span text:style-name="T40">_setup_HTTP()</text:span> or <text:span text:style-name="T45">CMPclient</text:span><text:span text:style-name="T46">_setup_</text:span><text:span text:style-name="T47">BIO</text:span><text:span text:style-name="T46">()</text:span>, must be called next in order to provide the required HTTP parameters such as the server host and HTTP path. Note that <text:span text:style-name="T48">as</text:span> CMP messages are self-contained, any <text:span text:style-name="T43">transfer (including offline one) is</text:span> support<text:span text:style-name="T43">ed</text:span>. <text:span text:style-name="T43">T</text:span>his implementation supports an overall timeout per CMP transaction, <text:span text:style-name="T43">where </text:span>the default HTTP transfer supports a timeout per message exchange. Polling for requested certificates, as defined by [RFC<text:span text:style-name="T14">98</text:span>10], <text:span text:style-name="T49">as well as delayed delivery for all types of responses as defined in </text:span><text:span text:style-name="T18">[</text:span><text:span text:style-name="T19">L</text:span><text:span text:style-name="T18">CMPP]</text:span><text:span text:style-name="T49">, </text:span>is done automatically when needed.</text:p>
        <text:p text:style-name="Standard">Then the actual activity for the given use case is invoked, by calling <text:span text:style-name="T50">an enrollment function</text:span> <text:span text:style-name="T50">(</text:span><text:span text:style-name="T40">CMPclient_imprint()</text:span>, <text:span text:style-name="T40">CMPclient_bootstrap()</text:span>, <text:span text:style-name="T40">CMPclient_</text:span><text:span text:style-name="T51">pkcs10</text:span><text:span text:style-name="T40">()</text:span>, <text:span text:style-name="T40">CMPclient_update(), CMPclient_update_</text:span><text:span text:style-name="T52">anycert</text:span><text:span text:style-name="T40">()</text:span><text:span text:style-name="T53">)</text:span>, <text:span text:style-name="T40">CMPclient_revoke()</text:span>, <text:span text:style-name="T50">or one of the </text:span><text:span text:style-name="T53">special information retrieval</text:span><text:span text:style-name="T50"> functions (</text:span><text:span text:style-name="T54">CMPclient_</text:span><text:span text:style-name="T55">caCerts</text:span><text:span text:style-name="T56">()</text:span><text:span text:style-name="T50">, </text:span><text:span text:style-name="T54">CMPclient_</text:span><text:span text:style-name="T57">rootC</text:span><text:span text:style-name="T55">aCert</text:span><text:span text:style-name="T56">()</text:span><text:span text:style-name="T50">, </text:span><text:span text:style-name="T54">CMPclient_</text:span><text:span text:style-name="T57">certReqTemplate</text:span><text:span text:style-name="T56">()</text:span><text:span text:style-name="T50">, </text:span><text:span text:style-name="T54">CMPclient_</text:span><text:span text:style-name="T57">crlUpdate</text:span><text:span text:style-name="T56">()</text:span><text:span text:style-name="T50">), </text:span>with their use-case-specific arguments. <text:span text:style-name="T58"><text:s/></text:span></text:p>
        <text:p text:style-name="P43"><text:span text:style-name="T51">CMPclient_snprint_PKIStatus() </text:span><text:span text:style-name="T58">may then be called to vet detailed status or error information provided by the server.<text:line-break/>The CMP context may be reused for further such activities after calling </text:span><text:span text:style-name="T59">CMPclient_</text:span><text:span text:style-name="T54">reinit</text:span><text:span text:style-name="T59">()</text:span><text:span text:style-name="T58">.</text:span></text:p>
        <text:p text:style-name="P44">Finally the transaction must be closed by calling <text:span text:style-name="T40">CMPclient_finish</text:span><text:span text:style-name="T60">()</text:span>, which deallocates all internal resources in the given CMP context.</text:p>
        <text:p text:style-name="Standard">Thus, a<text:span text:style-name="T53">t</text:span> the given level of abstraction, a typical invocation sequence would look like this:</text:p>
        <text:p text:style-name="P45"><text:span text:style-name="T61"><text:s text:c="4"/></text:span><text:span text:style-name="T62">CMPErr</text:span><text:span text:style-name="T63"> err = CMPclient_init(</text:span><text:span text:style-name="T64">"</text:span><text:span text:style-name="T65">my CMP client</text:span><text:span text:style-name="T66">"</text:span><text:span text:style-name="T65">, </text:span><text:span text:style-name="T63">log_fn);</text:span></text:p>
        <text:p text:style-name="P46"><text:span text:style-name="T63"><text:s text:c="4"/></text:span><text:span text:style-name="T62">CMP_CTX</text:span><text:span text:style-name="T63"> *ctx = </text:span><text:span text:style-name="T67">NULL</text:span><text:span text:style-name="T63">;</text:span></text:p>
        <text:p text:style-name="P46"><text:span text:style-name="T63"><text:s text:c="4"/></text:span><text:span text:style-name="T61">…</text:span></text:p>
        <text:p text:style-name="P47"><text:s text:c="4"/>err = CMPclient_prepare(&amp;ctx, log_fn,</text:p>
        <text:p text:style-name="P47"><text:s text:c="28"/>cmp_truststore, recipient, untrusted,</text:p>
        <text:p text:style-name="P47"><text:s text:c="28"/>creds, creds_truststore, digest, mac,</text:p>
        <text:p text:style-name="P47"><text:s text:c="28"/>transfer_fn, total_timeout,</text:p>
        <text:p text:style-name="P47"><text:s text:c="28"/>new_cert_truststore, implicit_confirm);</text:p>
        <text:p text:style-name="P47"><text:s text:c="4"/>…</text:p>
        <text:p text:style-name="P47"><text:s text:c="4"/>err = CMPclient_setup_HTTP(ctx, server, path, timeout, tls, proxy, no_proxy);</text:p>
        <text:p text:style-name="P47"><text:s text:c="4"/>…</text:p>
        <text:p text:style-name="P47"><text:s text:c="4"/>err = CMPclient_imprint(ctx, &amp;new_creds, new_key, subject, exts);</text:p>
        <text:p text:style-name="P48"><text:span text:style-name="T61"><text:s text:c="4"/></text:span><text:span text:style-name="T68">if (CMPclient_snprint_PKIStatus(ctx, buf, bufsize) != NULL)</text:span></text:p>
        <text:p text:style-name="P48"><text:span text:style-name="T68"><text:s text:c="8"/>LOG</text:span><text:span text:style-name="T69">(FL_INFO, </text:span><text:span text:style-name="T68">buf);</text:span></text:p>
        <text:p text:style-name="P49"><text:s text:c="4"/>…</text:p>
        <text:p text:style-name="P50"><text:s text:c="4"/>err = CMPclient_<text:span text:style-name="T70">reinit</text:span>(ctx);</text:p>
        <text:p text:style-name="P51"><text:soft-page-break/><text:s text:c="4"/>…</text:p>
        <text:p text:style-name="P52"><text:s text:c="4"/>err = CMPclient_bootstrap(ctx, &amp;new_creds2, new_key2, subject2, exts2);<text:line-break/> <text:s text:c="3"/>…</text:p>
        <text:p text:style-name="P53"><text:span text:style-name="T71"><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39">CMPclient</text:span><text:span text:style-name="T40">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54" text:outline-level="1"><text:bookmark-start text:name="_Toc5814392"/><text:bookmark-start text:name="__RefHeading___Toc13185_3177186546"/>Core functionality<text:bookmark-end text:name="_Toc5814392"/><text:bookmark-end text:name="__RefHeading___Toc13185_3177186546"/></text:h>
          </text:list-item>
        </text:list>
        <text:p text:style-name="P55">This section describes the essential functions of the generic CMP client library. These functions give feedback to the caller on their success or failure and the reason for any failure. We define the return type <text:span text:style-name="T72">CMP_err</text:span><text:span text:style-name="T41"> </text:span>more abstractly than currently in<text:span text:style-name="T73"> the header file </text:span><text:span text:style-name="T44">cmp.h</text:span><text:span text:style-name="T41"> </text:span>of CMPforOpenSSL while the idea is the same: <text:span text:style-name="T44">CMP_OK</text:span> = <text:span text:style-name="T42">0</text:span> (zero) means no error, else the code indicates the failure reason. The various error codes are defined in <text:span text:style-name="T44">&lt;openssl/cmperr.h&gt;</text:span>.</text:p>
        <text:p text:style-name="P56"/>
        <text:p text:style-name="P57">The function <text:span text:style-name="T74">CMPclient_init() </text:span>initializes the underlying OpenSSL library, and optionally sets up <text:span text:style-name="T75">a module name, defaulting to </text:span><text:span text:style-name="T66">"</text:span><text:span text:style-name="T76">genCMPClient"</text:span><text:span text:style-name="T75">, used for logging </text:span><text:span text:style-name="T21">as well as</text:span><text:span text:style-name="T75">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77">log_fn</text:span> argument is <text:span text:style-name="T77">NULL</text:span> the library uses <text:span text:style-name="T78">LOG_default()</text:span> both using the syslog facility and printing to the console.</text:p>
        <text:p text:style-name="P57"/>
        <text:p text:style-name="P58"><text:span text:style-name="T79"><text:s text:c="4"/>CMP_err</text:span><text:span text:style-name="T77"> </text:span><text:span text:style-name="T74">CMPclient_init</text:span><text:span text:style-name="T77">(OPTIONAL </text:span><text:span text:style-name="T80">const</text:span><text:span text:style-name="T81"> </text:span><text:span text:style-name="T82">char</text:span><text:span text:style-name="T81"> *n</text:span><text:span text:style-name="T83">ame</text:span><text:span text:style-name="T77">, OPTIONAL </text:span><text:span text:style-name="T79">LOG_cb_t </text:span><text:span text:style-name="T77">log_fn);</text:span></text:p>
        <text:list text:continue-numbering="true" text:style-name="WWNum2">
          <text:list-item>
            <text:list>
              <text:list-item>
                <text:h text:style-name="P59"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55">The function <text:span text:style-name="T40">CMPclient_prepare()</text:span><text:span text:style-name="T60"> </text:span>allocates the internal CMP context data structure (of type <text:span text:style-name="T72">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84">const</text:span>.</text:p>
        <text:p text:style-name="P6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1">Param.</text:p>
            </table:table-cell>
            <table:table-cell table:style-name="Table5.A1" office:value-type="string">
              <text:p text:style-name="P62">Type</text:p>
            </table:table-cell>
            <table:table-cell table:style-name="Table5.A1" office:value-type="string">
              <text:p text:style-name="P62">Name</text:p>
            </table:table-cell>
            <table:table-cell table:style-name="Table5.D1" office:value-type="string">
              <text:p text:style-name="P62">Meaning</text:p>
            </table:table-cell>
          </table:table-row>
          <table:table-row table:style-name="Table5.1">
            <table:table-cell table:style-name="Table5.A1" office:value-type="string">
              <text:p text:style-name="P63"/>
            </table:table-cell>
            <table:table-cell table:style-name="Table5.A1" office:value-type="string">
              <text:p text:style-name="P64"><text:span text:style-name="T85">CMP_CTX</text:span><text:span text:style-name="T86"> **</text:span></text:p>
            </table:table-cell>
            <table:table-cell table:style-name="Table5.A1" office:value-type="string">
              <text:p text:style-name="P63">pctx</text:p>
            </table:table-cell>
            <table:table-cell table:style-name="Table5.D1" office:value-type="string">
              <text:p text:style-name="P62">Pointer to the variable that will obtain the context</text:p>
            </table:table-cell>
          </table:table-row>
          <table:table-row table:style-name="Table5.1">
            <table:table-cell table:style-name="Table5.A3" office:value-type="string">
              <text:p text:style-name="P65">OPTIONAL</text:p>
            </table:table-cell>
            <table:table-cell table:style-name="Table5.A3" office:value-type="string">
              <text:p text:style-name="P66"><text:span text:style-name="T87">OSSL_LIB_CTX</text:span><text:span text:style-name="T88"> </text:span><text:span text:style-name="T89">*</text:span></text:p>
            </table:table-cell>
            <table:table-cell table:style-name="Table5.A3" office:value-type="string">
              <text:p text:style-name="P65">libctx</text:p>
            </table:table-cell>
            <table:table-cell table:style-name="Table5.D3" office:value-type="string">
              <text:p text:style-name="P67">Optional pointer to an OpenSSL library context, <text:line-break/><text:span text:style-name="T5">which </text:span>may be used for non-default crypto providers</text:p>
            </table:table-cell>
          </table:table-row>
          <table:table-row table:style-name="Table5.1">
            <table:table-cell table:style-name="Table5.A3" office:value-type="string">
              <text:p text:style-name="P65">OPTIONAL</text:p>
            </table:table-cell>
            <table:table-cell table:style-name="Table5.A3" office:value-type="string">
              <text:p text:style-name="P66"><text:span text:style-name="T90">const</text:span><text:span text:style-name="T88"> </text:span><text:span text:style-name="T87">char</text:span><text:span text:style-name="T88"> *</text:span></text:p>
            </table:table-cell>
            <table:table-cell table:style-name="Table5.A3" office:value-type="string">
              <text:p text:style-name="P65">propq</text:p>
            </table:table-cell>
            <table:table-cell table:style-name="Table5.D3" office:value-type="string">
              <text:p text:style-name="P67">Optional property query for crypto algorithm selectio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5">LOG_cb_t</text:span><text:span text:style-name="T86"> <text:s text:c="5"/></text:span></text:p>
            </table:table-cell>
            <table:table-cell table:style-name="Table5.A1" office:value-type="string">
              <text:p text:style-name="P63">log_fn</text:p>
            </table:table-cell>
            <table:table-cell table:style-name="Table5.D1" office:value-type="string">
              <text:p text:style-name="P68"><text:span text:style-name="T91">Function to be called for logging CMP related errors, warnings, etc. If </text:span><text:span text:style-name="T92">NULL</text:span><text:span text:style-name="T91"> is given, </text:span><text:span text:style-name="T93">LOG_default()</text:span><text:span text:style-name="T91"> is used. See section </text:span><text:span text:style-name="T94"><text:bookmark-ref text:reference-format="number" text:ref-name="_Ref507659291">3.13</text:bookmark-ref></text:span><text:span text:style-name="T91"><text:s/>for details. </text:spa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5">X509_STORE</text:span><text:span text:style-name="T86"> *</text:span></text:p>
            </table:table-cell>
            <table:table-cell table:style-name="Table5.A1" office:value-type="string">
              <text:p text:style-name="P63">cmp_<text:line-break/>truststore</text:p>
            </table:table-cell>
            <table:table-cell table:style-name="Table5.D1" office:value-type="string">
              <text:p text:style-name="P62">Trust store for authenticating the CMP server.<text:line-break/>For efficiency this data structure is not copied but its reference counter is incremented on success. </text:p>
              <text:p text:style-name="P69"><text:span text:style-name="T91">Although it might get modified, it may be reused.<text:line-break/>The argument may be </text:span><text:span text:style-name="T86">NULL</text:span><text:span text:style-name="T91"> in case symmetric mutual authentication is done (via </text:span><text:span text:style-name="T86">creds</text:span><text:span text:style-name="T91">).</text:spa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95">const</text:span><text:span text:style-name="T96"> </text:span><text:span text:style-name="T85">char</text:span><text:span text:style-name="T86"> *</text:span></text:p>
            </table:table-cell>
            <table:table-cell table:style-name="Table5.A1" office:value-type="string">
              <text:p text:style-name="P63">recipient</text:p>
            </table:table-cell>
            <table:table-cell table:style-name="Table5.D1" office:value-type="string">
              <text:p text:style-name="P68"><text:span text:style-name="T91">X.509 Distinguished Name in the form </text:span><text:span text:style-name="T86">"/&lt;type0&gt;=&lt;value0&gt;/&lt;type1&gt;=&lt;value1&gt;..."</text:span><text:span text:style-name="T91"> to use for the recipient field of CMP headers.<text:line-break/>If </text:span><text:span text:style-name="T86">NULL</text:span><text:span text:style-name="T91"> then information from the </text:span><text:span text:style-name="T86">creds</text:span><text:span text:style-name="T91"> or </text:span><text:span text:style-name="T86">untrusted</text:span><text:span text:style-name="T91"> parameter or the NULL DN is taken as fallback.</text:span></text:p>
            </table:table-cell>
          </table:table-row>
          <table:table-row table:style-name="Table5.1">
            <table:table-cell table:style-name="Table5.A1" office:value-type="string">
              <text:p text:style-name="P63">OPTIONAL</text:p>
            </table:table-cell>
            <table:table-cell table:style-name="Table5.A1" office:value-type="string">
              <text:p text:style-name="P70"><text:span text:style-name="T95">const </text:span><text:span text:style-name="T85">STACK_OF<text:line-break/>(X509)</text:span><text:span text:style-name="T86"> *</text:span></text:p>
            </table:table-cell>
            <table:table-cell table:style-name="Table5.A1" office:value-type="string">
              <text:p text:style-name="P63">untrusted</text:p>
            </table:table-cell>
            <table:table-cell table:style-name="Table5.D1" office:value-type="string">
              <text:p text:style-name="P69"><text:span text:style-name="T91">Non-trusted intermediate CA certificates that may be useful for path construction when authenticating the server (</text:span><text:span text:style-name="T35">i.e.</text:span><text:span text:style-name="T91">, the signer of </text:span><text:span text:style-name="T35">received</text:span><text:span text:style-name="T91"> CMP response messages) and for verifying newly enrolled certificates.<text:line-break/>If </text:span><text:span text:style-name="T92">NULL</text:span><text:span text:style-name="T91"> then any chain included in the </text:span><text:span text:style-name="T92">creds</text:span><text:span text:style-name="T91"> parameter is taken as fallback. If the </text:span><text:span text:style-name="T86">recipient</text:span><text:span text:style-name="T91"> argument is </text:span><text:span text:style-name="T86">NULL</text:span><text:span text:style-name="T91"> and <text:s/></text:span><text:soft-page-break/><text:span text:style-name="T91">the </text:span><text:span text:style-name="T86">creds</text:span><text:span text:style-name="T91"> argument is </text:span><text:span text:style-name="T86">NULL</text:span><text:span text:style-name="T91">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97">const</text:span><text:span text:style-name="T86"> <text:line-break/></text:span><text:span text:style-name="T85">CREDENTIALS</text:span><text:span text:style-name="T86"> *</text:span></text:p>
            </table:table-cell>
            <table:table-cell table:style-name="Table5.A1" office:value-type="string">
              <text:p text:style-name="P63">creds</text:p>
            </table:table-cell>
            <table:table-cell table:style-name="Table5.D1" office:value-type="string">
              <text:p text:style-name="P71"><text:span text:style-name="T94">CMP client key material for protecting requests and authenticating to the server, or </text:span><text:span text:style-name="T98">NULL</text:span><text:span text:style-name="T94"> in case requests should not be protected. Any password (symmetric key) included may also be used in opposite direction. See section </text:span><text:span text:style-name="T94"><text:bookmark-ref text:reference-format="number" text:ref-name="_Ref517079660">3.16</text:bookmark-ref></text:span><text:span text:style-name="T94"><text:s/>for details.</text:span></text:p>
              <text:p text:style-name="P72"><text:span text:style-name="T91">If a client certificate is included its subject is taken as the sender and, unless the </text:span><text:span text:style-name="T86">recipient</text:span><text:span text:style-name="T91"> argument is given, its issuer is taken as fallback value for the recipient field of CMP messages.</text:span></text:p>
              <text:p text:style-name="P72"><text:bookmark-start text:name="__DdeLink__9508_1758977826"/><text:span text:style-name="T91">If a certificate chain is included <text:s/>it is appended to the list of </text:span><text:span text:style-name="T99">untrusted</text:span><text:span text:style-name="T91"> certificates.</text:span><text:bookmark-end text:name="__DdeLink__9508_1758977826"/></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5">X509_STORE</text:span><text:span text:style-name="T86"> *</text:span></text:p>
            </table:table-cell>
            <table:table-cell table:style-name="Table5.A1" office:value-type="string">
              <text:p text:style-name="P63">creds_<text:line-break/>truststore</text:p>
            </table:table-cell>
            <table:table-cell table:style-name="Table5.D1" office:value-type="string">
              <text:p text:style-name="P73"><text:span text:style-name="T91">If this trust sto</text:span><text:span text:style-name="T100">re is provided it is used to verify the chain building for the own CMP signer certificate. Otherwise an approximate chain is built as far as possible, ignoring errors. In both cases the </text:span><text:span text:style-name="T99">untrusted</text:span><text:span text:style-name="T100"> certificates (with any </text:span><text:span text:style-name="T99">creds-&gt;chain</text:span><text:span text:style-name="T100"> appended to them) are used for certificate p</text:span><text:span text:style-name="T91">ath construction.</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97">const</text:span><text:span text:style-name="T86"> </text:span><text:span text:style-name="T85">char</text:span><text:span text:style-name="T86"> *</text:span></text:p>
            </table:table-cell>
            <table:table-cell table:style-name="Table5.A1" office:value-type="string">
              <text:p text:style-name="P63">digest</text:p>
            </table:table-cell>
            <table:table-cell table:style-name="Table5.D1" office:value-type="string">
              <text:p text:style-name="P62">Name of hash function to use as one-way function (OWF) in PBM-based message protection and as digest algorithm for signature-based message protection and proof-of-possession (POPO) . </text:p>
              <text:p text:style-name="P69"><text:span text:style-name="T91">The default is </text:span><text:span text:style-name="T64">"sha256"</text:span><text:span text:style-name="T91">. The available digest names can be shown with the command </text:span><text:span text:style-name="T101">openssl list -digest-commands</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102">const</text:span><text:span text:style-name="T86"> </text:span><text:span text:style-name="T85">char</text:span><text:span text:style-name="T86"> *</text:span></text:p>
            </table:table-cell>
            <table:table-cell table:style-name="Table5.A1" office:value-type="string">
              <text:p text:style-name="P63">mac</text:p>
            </table:table-cell>
            <table:table-cell table:style-name="Table5.D1" office:value-type="string">
              <text:p text:style-name="P62">Name of MAC algorithm to use in RFC <text:span text:style-name="T14">98</text:span>10’s MSG_MAC_ALG for PBM-based message <text:s/>protection. </text:p>
              <text:p text:style-name="P69"><text:span text:style-name="T91">The default is </text:span><text:span text:style-name="T64">"hmac-sha1"</text:span><text:span text:style-name="T35"> as per RFC 4210.</text:span></text:p>
            </table:table-cell>
          </table:table-row>
          <table:table-row table:style-name="Table5.1">
            <table:table-cell table:style-name="Table5.A1" office:value-type="string">
              <text:p text:style-name="P63">OPTIONAL</text:p>
            </table:table-cell>
            <table:table-cell table:style-name="Table5.A1" office:value-type="string">
              <text:p text:style-name="P74">OSSL_CMP_<text:span text:style-name="T22">transfer</text:span>_cb_t</text:p>
            </table:table-cell>
            <table:table-cell table:style-name="Table5.A1" office:value-type="string">
              <text:p text:style-name="P63">transfer_fn</text:p>
            </table:table-cell>
            <table:table-cell table:style-name="Table5.D1" office:value-type="string">
              <text:p text:style-name="P69"><text:span text:style-name="T91">Function to be called for message transfer.<text:line-break/>See section </text:span><text:span text:style-name="T94"><text:bookmark-ref text:reference-format="number-no-superior" text:ref-name="__RefHeading___Toc7499_2160941350">3.14</text:bookmark-ref></text:span><text:span text:style-name="T91"><text:s/>for details.</text:span></text:p>
            </table:table-cell>
          </table:table-row>
          <table:table-row table:style-name="Table5.1">
            <table:table-cell table:style-name="Table5.A1" office:value-type="string">
              <text:p text:style-name="P75"/>
            </table:table-cell>
            <table:table-cell table:style-name="Table5.A1" office:value-type="string">
              <text:p text:style-name="P69"><text:span text:style-name="T85">int</text:span><text:span text:style-name="T86"> <text:s text:c="14"/></text:span></text:p>
            </table:table-cell>
            <table:table-cell table:style-name="Table5.A1" office:value-type="string">
              <text:p text:style-name="P63">total_<text:line-break/>timeout</text:p>
            </table:table-cell>
            <table:table-cell table:style-name="Table5.D1" office:value-type="string">
              <text:p text:style-name="P69"><text:span text:style-name="T91">Maximum total time (in seconds) a </text:span><text:span text:style-name="T103">CMP transaction</text:span><text:span text:style-name="T91"> (including </text:span><text:span text:style-name="T104">any certificate conformation and p</text:span><text:span text:style-name="T91">olling) may take, or &lt;</text:span><text:span text:style-name="T104">=</text:span><text:span text:style-name="T91"> </text:span><text:span text:style-name="T101">0</text:span><text:span text:style-name="T91"> for infinite, </text:span><text:span text:style-name="T103">which is the default</text:span></text:p>
            </table:table-cell>
          </table:table-row>
          <table:table-row table:style-name="Table5.15">
            <table:table-cell table:style-name="Table5.A1" office:value-type="string">
              <text:p text:style-name="P63">OPTIONAL</text:p>
            </table:table-cell>
            <table:table-cell table:style-name="Table5.A1" office:value-type="string">
              <text:p text:style-name="P69"><text:span text:style-name="T85">X509_STORE</text:span><text:span text:style-name="T105"> </text:span><text:span text:style-name="T85">*</text:span></text:p>
            </table:table-cell>
            <table:table-cell table:style-name="Table5.A1" office:value-type="string">
              <text:p text:style-name="P63">new_cert_<text:line-break/>truststore </text:p>
            </table:table-cell>
            <table:table-cell table:style-name="Table5.D1" office:value-type="string">
              <text:p text:style-name="P73"><text:span text:style-name="T91">Trust store to be used for verifying the newly enrolled certificate. See section </text:span><text:span text:style-name="T94"><text:bookmark-ref text:reference-format="number" text:ref-name="_Ref507661684">3.15</text:bookmark-ref></text:span><text:span text:style-name="T91"><text:s/>for details.<text:line-break/>For efficiency this data structure is not copied but its reference counter is incremented on success. </text:span></text:p>
              <text:p text:style-name="P76">Although it might get modified, it may be reused.</text:p>
            </table:table-cell>
          </table:table-row>
          <table:table-row table:style-name="Table5.1">
            <table:table-cell table:style-name="Table5.A1" office:value-type="string">
              <text:p text:style-name="P63"/>
            </table:table-cell>
            <table:table-cell table:style-name="Table5.A1" office:value-type="string">
              <text:p text:style-name="P69"><text:span text:style-name="T106">b</text:span><text:span text:style-name="T85">ool</text:span></text:p>
            </table:table-cell>
            <table:table-cell table:style-name="Table5.A1" office:value-type="string">
              <text:p text:style-name="P63">implicit_<text:line-break/>confirm</text:p>
            </table:table-cell>
            <table:table-cell table:style-name="Table5.D1" office:value-type="string">
              <text:p text:style-name="P62">Flag whether to request implicit confirmation for enrolled certificates</text:p>
            </table:table-cell>
          </table:table-row>
        </table:table>
        <text:p text:style-name="P77"/>
        <text:p text:style-name="P77"><text:soft-page-break/>Example use (for the parts replaced by ‘<text:span text:style-name="T107">…</text:span>’, see sections <text:bookmark-ref text:reference-format="number" text:ref-name="_Ref507659168">4.2</text:bookmark-ref><text:s/>and <text:bookmark-ref text:reference-format="number" text:ref-name="_Ref507659178">4.1</text:bookmark-ref>):</text:p>
        <text:p text:style-name="P78"/>
        <text:p text:style-name="P46"><text:span text:style-name="T61"><text:s text:c="4"/></text:span><text:span text:style-name="T108">CMP_err</text:span><text:span text:style-name="T61"> err;</text:span></text:p>
        <text:p text:style-name="P46"><text:span text:style-name="T61"><text:s text:c="4"/></text:span><text:span text:style-name="T108">CMP_CTX</text:span><text:span text:style-name="T61"> *ctx = </text:span><text:span text:style-name="T109">NULL</text:span><text:span text:style-name="T61">;</text:span></text:p>
        <text:p text:style-name="P46"><text:span text:style-name="T61"><text:s text:c="4"/></text:span><text:span text:style-name="T110">LOG_cb_t</text:span><text:span text:style-name="T111"> log_fn = </text:span><text:span text:style-name="T112">NULL</text:span><text:span text:style-name="T111">;</text:span></text:p>
        <text:p text:style-name="P46"><text:span text:style-name="T111"><text:s text:c="4"/></text:span><text:span text:style-name="T108">X509_STORE</text:span><text:span text:style-name="T61"> *cmp_truststore = …</text:span></text:p>
        <text:p text:style-name="P46"><text:span text:style-name="T110"><text:s text:c="4"/></text:span><text:span text:style-name="T113">const</text:span><text:span text:style-name="T61"> </text:span><text:span text:style-name="T110">X509_char_*recipient</text:span><text:span text:style-name="T111"> = </text:span><text:span text:style-name="T112">NULL</text:span><text:span text:style-name="T111">;</text:span></text:p>
        <text:p text:style-name="P46"><text:span text:style-name="T61"><text:s text:c="4"/></text:span><text:span text:style-name="T113">const</text:span><text:span text:style-name="T61"> STACK_OF(X509)</text:span><text:span text:style-name="T111"> *untrusted = …</text:span></text:p>
        <text:p text:style-name="P46"><text:span text:style-name="T61"><text:s text:c="4"/></text:span><text:span text:style-name="T108">CREDENTIALS</text:span><text:span text:style-name="T61"> *creds = …<text:line-break/> <text:s text:c="3"/></text:span><text:span text:style-name="T114">X509_STORE</text:span><text:span text:style-name="T61"> *creds_truststore = …</text:span></text:p>
        <text:p text:style-name="P46"><text:span text:style-name="T61"><text:s text:c="4"/></text:span><text:span text:style-name="T113">const</text:span><text:span text:style-name="T61"> </text:span><text:span text:style-name="T115">char</text:span><text:span text:style-name="T61"> *digest = "sha256";</text:span></text:p>
        <text:p text:style-name="P46"><text:span text:style-name="T113"><text:s text:c="4"/>const</text:span><text:span text:style-name="T61"> </text:span><text:span text:style-name="T115">char</text:span><text:span text:style-name="T61"> *mac = </text:span><text:span text:style-name="T112">NULL</text:span><text:span text:style-name="T61">;</text:span></text:p>
        <text:p text:style-name="P46"><text:span text:style-name="T61"><text:s text:c="4"/></text:span><text:span text:style-name="T110">OSSL_CMP</text:span><text:span text:style-name="T115">_transfer_cb_t</text:span><text:span text:style-name="T61"> transfer_fn = </text:span><text:span text:style-name="T109">NULL</text:span><text:span text:style-name="T61">; /* default HTTP(S) transfer */</text:span></text:p>
        <text:p text:style-name="P46"><text:span text:style-name="T61"><text:s text:c="4"/></text:span><text:span text:style-name="T115">int</text:span><text:span text:style-name="T61"> total_timeout = </text:span><text:span text:style-name="T116">100</text:span><text:span text:style-name="T61">;</text:span></text:p>
        <text:p text:style-name="P46"><text:span text:style-name="T61"><text:s text:c="4"/></text:span><text:bookmark-start text:name="__DdeLink__23502_1758977826"/><text:span text:style-name="T108">X509_STORE</text:span><text:span text:style-name="T61"> *new_cert_truststore = …</text:span><text:bookmark-end text:name="__DdeLink__23502_1758977826"/></text:p>
        <text:p text:style-name="P46"><text:span text:style-name="T61"><text:s text:c="4"/></text:span><text:span text:style-name="T115">bool</text:span><text:span text:style-name="T61"> implicit_confirm = </text:span><text:span text:style-name="T98">false</text:span><text:span text:style-name="T61">;</text:span></text:p>
        <text:p text:style-name="P47"><text:s text:c="4"/>err = CMPclient_prepare(&amp;ctx, log_fn,</text:p>
        <text:p text:style-name="P47"><text:s text:c="28"/>cmp_truststore, recipient,</text:p>
        <text:p text:style-name="P47"><text:s text:c="28"/>untrusted, creds, creds_truststore, digest, mac,</text:p>
        <text:p text:style-name="P47"><text:s text:c="28"/>transfer_fn, total_timeout,</text:p>
        <text:p text:style-name="P46"><text:span text:style-name="T61"><text:s text:c="28"/></text:span><text:span text:style-name="T117">new_cert_truststore, implicit_confirm);</text:span></text:p>
        <text:list text:continue-numbering="true" text:style-name="WWNum2">
          <text:list-item>
            <text:list>
              <text:list-item>
                <text:h text:style-name="P79" text:outline-level="2"><text:bookmark-start text:name="_Toc5814394"/><text:bookmark-start text:name="__RefHeading___Toc13189_3177186546"/>CMPclient_setup_HTTP<text:bookmark-end text:name="_Toc5814394"/> <text:span text:style-name="T118">and CMPclient_setup_</text:span><text:span text:style-name="T119">BIO</text:span><text:bookmark-end text:name="__RefHeading___Toc13189_3177186546"/></text:h>
              </text:list-item>
            </text:list>
          </text:list-item>
        </text:list>
        <text:p text:style-name="P80">The function <text:span text:style-name="T60">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98">tls</text:span> parameter is not copied <text:span text:style-name="T120">but its reference counter is increased, </text:span>so <text:span text:style-name="T120">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1">Param.</text:p>
            </table:table-cell>
            <table:table-cell table:style-name="Table6.A1" office:value-type="string">
              <text:p text:style-name="P82">Type</text:p>
            </table:table-cell>
            <table:table-cell table:style-name="Table6.A1" office:value-type="string">
              <text:p text:style-name="P82">Name</text:p>
            </table:table-cell>
            <table:table-cell table:style-name="Table6.A1" office:value-type="string">
              <text:p text:style-name="P82">Meaning</text:p>
            </table:table-cell>
          </table:table-row>
          <table:table-row table:style-name="Table6.1">
            <table:table-cell table:style-name="Table6.A1" office:value-type="string">
              <text:p text:style-name="P83"/>
            </table:table-cell>
            <table:table-cell table:style-name="Table6.A1" office:value-type="string">
              <text:p text:style-name="P84"><text:span text:style-name="T85">CMP_CTX</text:span><text:span text:style-name="T86"> *</text:span></text:p>
            </table:table-cell>
            <table:table-cell table:style-name="Table6.A1" office:value-type="string">
              <text:p text:style-name="P83"><text:span text:style-name="T22">ctx</text:span> <text:s text:c="5"/></text:p>
            </table:table-cell>
            <table:table-cell table:style-name="Table6.A1" office:value-type="string">
              <text:p text:style-name="P85">CMP context to modify </text:p>
            </table:table-cell>
          </table:table-row>
          <table:table-row table:style-name="Table6.1">
            <table:table-cell table:style-name="Table6.A1" office:value-type="string">
              <text:p text:style-name="P86"/>
            </table:table-cell>
            <table:table-cell table:style-name="Table6.A1" office:value-type="string">
              <text:p text:style-name="P84"><text:span text:style-name="T102">const</text:span><text:span text:style-name="T86"> </text:span><text:span text:style-name="T85">char</text:span><text:span text:style-name="T86"> *</text:span></text:p>
            </table:table-cell>
            <table:table-cell table:style-name="Table6.A1" office:value-type="string">
              <text:p text:style-name="P83">server</text:p>
            </table:table-cell>
            <table:table-cell table:style-name="Table6.A1" office:value-type="string">
              <text:p text:style-name="P87"><text:span text:style-name="T91">Server URI, of the form </text:span><text:span text:style-name="T102">"[http[s]://]&lt;host&gt;[:&lt;port&gt;][/path]"</text:span><text:span text:style-name="T121">,</text:span><text:span text:style-name="T91"> with the default port being 80.<text:line-break/></text:span><text:span text:style-name="T122">A</text:span><text:span text:style-name="T91">n IPv6 address must be enclosed in '[' and ']'.<text:line-break/>Any given path is overridden by </text:span><text:span text:style-name="T99">path</text:span><text:span text:style-name="T91"> if provided.</text:span></text:p>
            </table:table-cell>
          </table:table-row>
          <table:table-row table:style-name="Table6.1">
            <table:table-cell table:style-name="Table6.A1" office:value-type="string">
              <text:p text:style-name="P88">OPTIONAL</text:p>
            </table:table-cell>
            <table:table-cell table:style-name="Table6.A1" office:value-type="string">
              <text:p text:style-name="P84"><text:span text:style-name="T102">const</text:span><text:span text:style-name="T86"> </text:span><text:span text:style-name="T85">char</text:span><text:span text:style-name="T86"> *</text:span></text:p>
            </table:table-cell>
            <table:table-cell table:style-name="Table6.A1" office:value-type="string">
              <text:p text:style-name="P83">path</text:p>
            </table:table-cell>
            <table:table-cell table:style-name="Table6.A1" office:value-type="string">
              <text:p text:style-name="P89"><text:span text:style-name="T91">Server HTTP path (aka CMP alias) with the default taken from the </text:span><text:span text:style-name="T99">server</text:span><text:span text:style-name="T91"> argument, else “</text:span><text:span text:style-name="T123">/</text:span><text:span text:style-name="T91">”.</text:span></text:p>
            </table:table-cell>
          </table:table-row>
          <table:table-row table:style-name="Table6.1">
            <table:table-cell table:style-name="Table6.A1" office:value-type="string">
              <text:p text:style-name="P90"/>
            </table:table-cell>
            <table:table-cell table:style-name="Table6.A1" office:value-type="string">
              <text:p text:style-name="P84"><text:span text:style-name="T85">int</text:span><text:span text:style-name="T86"> <text:s text:c="8"/></text:span></text:p>
            </table:table-cell>
            <table:table-cell table:style-name="Table6.A1" office:value-type="string">
              <text:p text:style-name="P83">keep_<text:line-break/>alive <text:s text:c="6"/></text:p>
            </table:table-cell>
            <table:table-cell table:style-name="Table6.A1" office:value-type="string">
              <text:p text:style-name="P91">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90"/>
            </table:table-cell>
            <table:table-cell table:style-name="Table6.A1" office:value-type="string">
              <text:p text:style-name="P84"><text:span text:style-name="T85">int</text:span><text:span text:style-name="T86"> <text:s text:c="8"/></text:span></text:p>
            </table:table-cell>
            <table:table-cell table:style-name="Table6.A1" office:value-type="string">
              <text:p text:style-name="P83">timeout <text:s text:c="6"/></text:p>
            </table:table-cell>
            <table:table-cell table:style-name="Table6.A1" office:value-type="string">
              <text:p text:style-name="P92"><text:span text:style-name="T91">Maximum time (in seconds) a single response to an HTTP POST request may take, or 0 for infinite,<text:line-break/>or </text:span><text:span text:style-name="T101">&lt; 0</text:span><text:span text:style-name="T91"> for default, which is 120 seconds.</text:span></text:p>
            </table:table-cell>
          </table:table-row>
          <table:table-row table:style-name="Table6.1">
            <table:table-cell table:style-name="Table6.A1" office:value-type="string">
              <text:p text:style-name="P83"><text:bookmark-start text:name="__DdeLink__27874_1758977826"/>OPTIONAL<text:bookmark-end text:name="__DdeLink__27874_1758977826"/></text:p>
            </table:table-cell>
            <table:table-cell table:style-name="Table6.A1" office:value-type="string">
              <text:p text:style-name="P84"><text:span text:style-name="T85">SSL_CTX</text:span><text:span text:style-name="T86"> *</text:span></text:p>
            </table:table-cell>
            <table:table-cell table:style-name="Table6.A1" office:value-type="string">
              <text:p text:style-name="P93">tls</text:p>
            </table:table-cell>
            <table:table-cell table:style-name="Table6.A1" office:value-type="string">
              <text:p text:style-name="P73"><text:span text:style-name="T91">The TLS parameters if TLS shall be used, else </text:span><text:span text:style-name="T86">NULL</text:span><text:span text:style-name="T91">.<text:line-break/>For efficiency, this data structure is not copied but its reference counter is incremented on success. </text:span></text:p>
              <text:p text:style-name="P94"><text:soft-page-break/>Although it might get modified, it may be reused.</text:p>
              <text:p text:style-name="P95">On TLS client connection setup some extra preparation steps are performed:</text:p>
              <text:p text:style-name="P96">If the <text:span text:style-name="T98">server</text:span> <text:span text:style-name="T124">&lt;host&gt;</text:span><text:span text:style-name="T125"> part</text:span> is not <text:span text:style-name="T126">localhost</text:span>, <text:span text:style-name="T126">127.0.0.1</text:span>, <text:span text:style-name="T125">or</text:span> <text:span text:style-name="T127">::</text:span><text:span text:style-name="T128">1</text:span> and <text:span text:style-name="T129">tls</text:span> <text:span text:style-name="T130">contains a</text:span> trust store <text:span text:style-name="T130">that </text:span>does not already include any hostname, IP address, or email address validation information, the hostname part of the server is set there <text:span text:style-name="T131">using </text:span><text:span text:style-name="T132">STORE_set1_host_ip()</text:span>. </text:p>
              <text:p text:style-name="P97">The <text:change text:change-id="ct36172392128"/>&lt;host&gt; part of the<text:change text:change-id="ct36172396928"/> <text:span text:style-name="T133">server</text:span> <text:span text:style-name="T134">(unless it is an IP address)</text:span><text:change text:change-id="ct36172391488"/> is used to set up Server Name Indication (SNI, RFC 3546 <text:span text:style-name="T134">section 3.1</text:span>).</text:p>
            </table:table-cell>
          </table:table-row>
          <table:table-row table:style-name="Table6.1">
            <table:table-cell table:style-name="Table6.A1" office:value-type="string">
              <text:p text:style-name="P83">OPTIONAL</text:p>
            </table:table-cell>
            <table:table-cell table:style-name="Table6.A1" office:value-type="string">
              <text:p text:style-name="P84"><text:span text:style-name="T102">const</text:span><text:span text:style-name="T86"> </text:span><text:span text:style-name="T85">char</text:span><text:span text:style-name="T86"> *</text:span></text:p>
            </table:table-cell>
            <table:table-cell table:style-name="Table6.A1" office:value-type="string">
              <text:p text:style-name="P83">proxy</text:p>
            </table:table-cell>
            <table:table-cell table:style-name="Table6.A1" office:value-type="string">
              <text:p text:style-name="P98"><text:span text:style-name="T91">HTTP(S) proxy address, of the form <text:line-break/></text:span><text:span text:style-name="T102">"</text:span><text:span text:style-name="T135">[</text:span><text:span text:style-name="T102">http[s]://]&lt;host&gt;[:&lt;port&gt;][/path]"</text:span><text:span text:style-name="T91">, <text:line-break/>with the default port being 80.<text:line-break/>Its default is the environment variable </text:span><text:span text:style-name="T85">http_proxy</text:span><text:span text:style-name="T136"> </text:span><text:span text:style-name="T137">or</text:span><text:span text:style-name="T136"> </text:span><text:span text:style-name="T85">https_proxy</text:span><text:span text:style-name="T136">, </text:span><text:span text:style-name="T137">respectively</text:span><text:span text:style-name="T91">. </text:span><text:span text:style-name="T138">Any included http(s) prefix and path are ignored.</text:span><text:span text:style-name="T91"> No proxy is used if the server host matches the </text:span><text:span text:style-name="T99">no_proxy</text:span><text:span text:style-name="T91"> setting. </text:span></text:p>
            </table:table-cell>
          </table:table-row>
          <table:table-row table:style-name="Table6.1">
            <table:table-cell table:style-name="Table6.A1" office:value-type="string">
              <text:p text:style-name="P83">OPTIONAL</text:p>
            </table:table-cell>
            <table:table-cell table:style-name="Table6.A1" office:value-type="string">
              <text:p text:style-name="P84"><text:span text:style-name="T102">const</text:span><text:span text:style-name="T86"> </text:span><text:span text:style-name="T85">char</text:span><text:span text:style-name="T86"> *</text:span></text:p>
            </table:table-cell>
            <table:table-cell table:style-name="Table6.A1" office:value-type="string">
              <text:p text:style-name="P83">no_proxy</text:p>
            </table:table-cell>
            <table:table-cell table:style-name="Table6.A1" office:value-type="string">
              <text:p text:style-name="P99"><text:span text:style-name="T91">List of server hosts not use an HTTP(S) proxy for, separated by commas and/or whitespace. <text:line-break/>Default is the environment variable </text:span><text:span text:style-name="T139">no_proxy</text:span><text:span text:style-name="T91">.</text:span></text:p>
            </table:table-cell>
          </table:table-row>
        </table:table>
        <text:p text:style-name="P100"><text:span text:style-name="T91">Example use </text:span>(for the parts replaced by ‘<text:span text:style-name="T140">…</text:span>’ and <text:span text:style-name="T141">TLS_new</text:span><text:span text:style-name="T140">()</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91">:</text:span></text:p>
        <text:p text:style-name="P46"><text:span text:style-name="T81"><text:s text:c="4"/></text:span><text:span text:style-name="T80">const</text:span><text:span text:style-name="T81"> </text:span><text:span text:style-name="T82">char</text:span><text:span text:style-name="T81"> *server = "</text:span><text:span text:style-name="T142">my.cmp-server.com</text:span><text:span text:style-name="T81">:443";</text:span></text:p>
        <text:p text:style-name="P46"><text:span text:style-name="T81"><text:s text:c="4"/></text:span><text:span text:style-name="T80">const</text:span><text:span text:style-name="T81"> </text:span><text:span text:style-name="T82">char</text:span><text:span text:style-name="T81"> *path = "/pkix";</text:span></text:p>
        <text:p text:style-name="P46"><text:span text:style-name="T80"><text:s text:c="4"/>const</text:span><text:span text:style-name="T81"> </text:span><text:span text:style-name="T82">char</text:span><text:span text:style-name="T81"> *proxy = NULL;</text:span></text:p>
        <text:p text:style-name="P46"><text:span text:style-name="T81"><text:s text:c="4"/></text:span><text:span text:style-name="T80">const</text:span><text:span text:style-name="T81"> </text:span><text:span text:style-name="T82">char</text:span><text:span text:style-name="T81"> *no_proxy = NULL;</text:span></text:p>
        <text:p text:style-name="P46"><text:span text:style-name="T143"><text:s text:c="4"/></text:span><text:span text:style-name="T82">int</text:span><text:span text:style-name="T143"> keep_alive = </text:span><text:span text:style-name="T144">-1</text:span><text:span text:style-name="T143">;</text:span></text:p>
        <text:p text:style-name="P46"><text:span text:style-name="T143"><text:s text:c="4"/></text:span><text:span text:style-name="T82">int</text:span><text:span text:style-name="T81"> timeout = </text:span><text:span text:style-name="T144">10</text:span><text:span text:style-name="T81">;</text:span></text:p>
        <text:p text:style-name="P46"><text:span text:style-name="T81"><text:s text:c="4"/></text:span><text:span text:style-name="T38">X509_STORE</text:span><text:span text:style-name="T81"> *tls_truststore = …</text:span></text:p>
        <text:p text:style-name="P46"><text:span text:style-name="T81"><text:s text:c="4"/></text:span><text:span text:style-name="T145">const</text:span><text:span text:style-name="T146"> </text:span><text:span text:style-name="T38">STACK_OF(X509)</text:span><text:span text:style-name="T147"> *</text:span><text:span text:style-name="T81">tls_untrusted = NULL;</text:span></text:p>
        <text:p text:style-name="P46"><text:span text:style-name="T81"><text:s text:c="4"/></text:span><text:span text:style-name="T38">CREDENTIALS</text:span><text:span text:style-name="T81"> *tls_creds = …</text:span></text:p>
        <text:p text:style-name="P46"><text:span text:style-name="T81"><text:s text:c="4"/>char *ciphers = NULL</text:span><text:span text:style-name="T61">; /* or, e.g., "HIGH:!ADH:!LOW:!EXP:!MD5:@STRENGTH" */</text:span></text:p>
        <text:p text:style-name="P46"><text:span text:style-name="T81"><text:s text:c="4"/></text:span><text:span text:style-name="T38">SSL_CTX</text:span><text:span text:style-name="T81"> *tls = TLS_new(tls_truststore, tls_untrusted, </text:span></text:p>
        <text:p text:style-name="P101"><text:s text:c="27"/>tls_creds, ciphers, -1);</text:p>
        <text:p text:style-name="P101"><text:s text:c="4"/>err = CMPclient_setup_HTTP(ctx, server, path, keep_alive, timeout, tls,</text:p>
        <text:p text:style-name="P101"><text:s text:c="31"/>proxy, no_proxy);</text:p>
        <text:p text:style-name="P102">The function <text:span text:style-name="T60">CMPclient_setup_</text:span><text:span text:style-name="T47">BIO</text:span><text:span text:style-name="T60">()</text:span> <text:span text:style-name="T120">is a more basic </text:span><text:span text:style-name="T148">alternative to</text:span><text:span text:style-name="T120"> </text:span><text:span text:style-name="T149">CMPclient_setup_HTTP() </text:span><text:span text:style-name="T120">for the case that an already opened connection </text:span><text:span text:style-name="T148">(e.g., SSL/TLS) </text:span><text:span text:style-name="T120">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3">Param.</text:p>
            </table:table-cell>
            <table:table-cell table:style-name="Table14.A1" office:value-type="string">
              <text:p text:style-name="P104">Type</text:p>
            </table:table-cell>
            <table:table-cell table:style-name="Table14.A1" office:value-type="string">
              <text:p text:style-name="P104">Name</text:p>
            </table:table-cell>
            <table:table-cell table:style-name="Table14.A1" office:value-type="string">
              <text:p text:style-name="P105">Meaning</text:p>
            </table:table-cell>
          </table:table-row>
          <table:table-row table:style-name="Table14.1">
            <table:table-cell table:style-name="Table14.A1" office:value-type="string">
              <text:p text:style-name="P106"/>
            </table:table-cell>
            <table:table-cell table:style-name="Table14.A1" office:value-type="string">
              <text:p text:style-name="P107"><text:span text:style-name="T85">CMP_CTX</text:span><text:span text:style-name="T86"> *</text:span></text:p>
            </table:table-cell>
            <table:table-cell table:style-name="Table14.A1" office:value-type="string">
              <text:p text:style-name="P106"><text:span text:style-name="T22">ctx</text:span> <text:s text:c="5"/></text:p>
            </table:table-cell>
            <table:table-cell table:style-name="Table14.A1" office:value-type="string">
              <text:p text:style-name="P108">CMP context to modify </text:p>
            </table:table-cell>
          </table:table-row>
          <table:table-row table:style-name="Table14.1">
            <table:table-cell table:style-name="Table14.A1" office:value-type="string">
              <text:p text:style-name="P109"/>
            </table:table-cell>
            <table:table-cell table:style-name="Table14.A1" office:value-type="string">
              <text:p text:style-name="P110"><text:span text:style-name="T150">BIO</text:span><text:span text:style-name="T86"> *</text:span></text:p>
            </table:table-cell>
            <table:table-cell table:style-name="Table14.A1" office:value-type="string">
              <text:p text:style-name="P111">rw</text:p>
            </table:table-cell>
            <table:table-cell table:style-name="Table14.A1" office:value-type="string">
              <text:p text:style-name="P112"><text:span text:style-name="T151">Read-write BIO</text:span><text:span text:style-name="T152"> to use. <text:line-break/>It will not be closed by the library </text:span><text:span text:style-name="T151">after a transaction</text:span><text:span text:style-name="T91">.</text:span></text:p>
            </table:table-cell>
          </table:table-row>
          <table:table-row table:style-name="Table14.1">
            <table:table-cell table:style-name="Table14.A1" office:value-type="string">
              <text:p text:style-name="P113">OPTIONAL</text:p>
            </table:table-cell>
            <table:table-cell table:style-name="Table14.A1" office:value-type="string">
              <text:p text:style-name="P107"><text:span text:style-name="T102">const</text:span><text:span text:style-name="T86"> </text:span><text:span text:style-name="T85">char</text:span><text:span text:style-name="T86"> *</text:span></text:p>
            </table:table-cell>
            <table:table-cell table:style-name="Table14.A1" office:value-type="string">
              <text:p text:style-name="P106">path </text:p>
            </table:table-cell>
            <table:table-cell table:style-name="Table14.A1" office:value-type="string">
              <text:p text:style-name="P114"><text:span text:style-name="T91">Server HTTP path (aka CMP alias) with the default taken from the </text:span><text:span text:style-name="T99">server</text:span><text:span text:style-name="T91"> argument, else “/”.</text:span></text:p>
            </table:table-cell>
          </table:table-row>
          <table:table-row table:style-name="Table14.1">
            <table:table-cell table:style-name="Table14.A1" office:value-type="string">
              <text:p text:style-name="P115"/>
            </table:table-cell>
            <table:table-cell table:style-name="Table14.A1" office:value-type="string">
              <text:p text:style-name="P107"><text:span text:style-name="T85">int</text:span><text:span text:style-name="T86"> <text:s text:c="8"/></text:span></text:p>
            </table:table-cell>
            <table:table-cell table:style-name="Table14.A1" office:value-type="string">
              <text:p text:style-name="P107"><text:span text:style-name="T153">k</text:span><text:span text:style-name="T86">eep_<text:line-break/>alive <text:s text:c="6"/></text:span></text:p>
            </table:table-cell>
            <table:table-cell table:style-name="Table14.A1" office:value-type="string">
              <text:p text:style-name="P116"><text:span text:style-name="T35">If 0 then HTTP connections are </text:span><text:span text:style-name="T154">not requested to be kept alive</text:span><text:span text:style-name="T35">, which is the default for HTTP 1.0.<text:line-break/></text:span><text:soft-page-break/><text:span text:style-name="T35">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5"/>
            </table:table-cell>
            <table:table-cell table:style-name="Table14.A1" office:value-type="string">
              <text:p text:style-name="P107"><text:span text:style-name="T85">int</text:span><text:span text:style-name="T86"> <text:s text:c="8"/></text:span></text:p>
            </table:table-cell>
            <table:table-cell table:style-name="Table14.A1" office:value-type="string">
              <text:p text:style-name="P106">timeout <text:s text:c="6"/></text:p>
            </table:table-cell>
            <table:table-cell table:style-name="Table14.A1" office:value-type="string">
              <text:p text:style-name="P116"><text:span text:style-name="T91">Maximum time (in seconds) a single response to an HTTP POST request may take, or 0 for infinite,<text:line-break/>or </text:span><text:span text:style-name="T101">&lt; 0</text:span><text:span text:style-name="T91"> for default, which is 120 seconds.</text:span></text:p>
            </table:table-cell>
          </table:table-row>
        </table:table>
        <text:list text:continue-numbering="true" text:style-name="WWNum2">
          <text:list-item>
            <text:list>
              <text:list-item>
                <text:h text:style-name="P117" text:outline-level="2"><text:bookmark-start text:name="__RefHeading___Toc13191_3177186546"/>CMPclient_add_certProfile<text:bookmark-end text:name="__RefHeading___Toc13191_3177186546"/></text:h>
              </text:list-item>
            </text:list>
          </text:list-item>
        </text:list>
        <text:p text:style-name="P118">The function <text:span text:style-name="T60">CMPclient_</text:span><text:span text:style-name="T155">add_certProfile</text:span><text:span text:style-name="T60">()</text:span> <text:span text:style-name="T156">may be used to specify a certificate profile name to be added to CMP headers. In case a </text:span><text:span text:style-name="T157">NULL</text:span><text:span text:style-name="T156"> pointer is given, </text:span><text:span text:style-name="T158">OSSL_CMP_CTX_reset_geninfo_ITAVs()</text:span><text:span text:style-name="T156"> </text:span><text:span text:style-name="T120">is </text:span><text:span text:style-name="T156">called, which </text:span><text:span text:style-name="T159">removes</text:span><text:span text:style-name="T156">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19">Param.</text:p>
            </table:table-cell>
            <table:table-cell table:style-name="Table16.A1" office:value-type="string">
              <text:p text:style-name="P120">Type</text:p>
            </table:table-cell>
            <table:table-cell table:style-name="Table16.A1" office:value-type="string">
              <text:p text:style-name="P120">Name</text:p>
            </table:table-cell>
            <table:table-cell table:style-name="Table16.A1" office:value-type="string">
              <text:p text:style-name="P120">Meaning</text:p>
            </table:table-cell>
          </table:table-row>
          <table:table-row table:style-name="Table16.1">
            <table:table-cell table:style-name="Table16.A1" office:value-type="string">
              <text:p text:style-name="P121"/>
            </table:table-cell>
            <table:table-cell table:style-name="Table16.A1" office:value-type="string">
              <text:p text:style-name="P122"><text:span text:style-name="T85">CMP_CTX</text:span><text:span text:style-name="T86"> *</text:span></text:p>
            </table:table-cell>
            <table:table-cell table:style-name="Table16.A1" office:value-type="string">
              <text:p text:style-name="P121"><text:span text:style-name="T22">ctx</text:span> <text:s text:c="5"/></text:p>
            </table:table-cell>
            <table:table-cell table:style-name="Table16.A1" office:value-type="string">
              <text:p text:style-name="P120">CMP context to modify </text:p>
            </table:table-cell>
          </table:table-row>
          <table:table-row table:style-name="Table16.1">
            <table:table-cell table:style-name="Table16.A1" office:value-type="string">
              <text:p text:style-name="P123">OPTIONAL</text:p>
            </table:table-cell>
            <table:table-cell table:style-name="Table16.A1" office:value-type="string">
              <text:p text:style-name="P122"><text:span text:style-name="T102">const</text:span><text:span text:style-name="T86"> </text:span><text:span text:style-name="T85">char</text:span><text:span text:style-name="T86"> *</text:span></text:p>
            </table:table-cell>
            <table:table-cell table:style-name="Table16.A1" office:value-type="string">
              <text:p text:style-name="P121">path</text:p>
            </table:table-cell>
            <table:table-cell table:style-name="Table16.A1" office:value-type="string">
              <text:p text:style-name="P122"><text:span text:style-name="T160">Profile name to add, </text:span><text:span text:style-name="T161">which </text:span><text:span text:style-name="T160">may be UTF8-encoded</text:span></text:p>
            </table:table-cell>
          </table:table-row>
        </table:table>
        <text:list text:continue-numbering="true" text:style-name="WWNum2">
          <text:list-item>
            <text:list>
              <text:list-item>
                <text:h text:style-name="P124" text:outline-level="2"><text:bookmark-start text:name="_Ref507616602"/><text:bookmark-start text:name="__RefHeading___Toc28337_3580160810"/><text:bookmark-start text:name="_Toc5814395"/>CMPclient_imprint, CMPclient_bootstrap, CMPclient_pkcs10<text:bookmark-end text:name="_Ref507616602"/><text:bookmark-end text:name="_Toc5814395"/>,<text:span text:style-name="T118"> </text:span>CMPclient_update, <text:span text:style-name="T118">CMPclient_update_anycert, </text:span><text:span text:style-name="T162">C</text:span><text:span text:style-name="T163">MPclient_update_with_exts</text:span><text:bookmark-end text:name="__RefHeading___Toc28337_3580160810"/></text:h>
              </text:list-item>
            </text:list>
          </text:list-item>
        </text:list>
        <text:p text:style-name="P125">The functions <text:span text:style-name="T60">CMPclient_imprint()</text:span><text:span text:style-name="T121"> </text:span><text:span text:style-name="T137">and</text:span><text:span text:style-name="T35"> </text:span><text:span text:style-name="T164">CMPclient_bootstrap(</text:span><text:span text:style-name="T60">)</text:span> <text:span text:style-name="T165">request</text:span> a certificate, either an initial one (using the CMP <text:span text:style-name="T165">type</text:span> ‘<text:span text:style-name="T166">ir</text:span>’, <text:span text:style-name="T19">see [LCMPP section 4.1.1], </text:span><text:span text:style-name="T36">e.g., as part of imprinting the IDevID during manufacturing </text:span><text:span text:style-name="T165">or when a BRSKI-AE pledge requests the device-wide LDevID-generic certificate from the device operator</text:span>) or a regular one (using ‘<text:span text:style-name="T166">cr</text:span>’, <text:span text:style-name="T19">see [LCMPP section 4.1.2], </text:span><text:span text:style-name="T36">e.g., </text:span><text:span text:style-name="T165">when requesting</text:span><text:span text:style-name="T36"> </text:span><text:span text:style-name="T165">application-specific</text:span><text:span text:style-name="T36"> LDevID</text:span><text:span text:style-name="T165">s</text:span><text:span text:style-name="T36"> </text:span><text:span text:style-name="T165">from the operator</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1">Param.</text:p>
            </table:table-cell>
            <table:table-cell table:style-name="Table7.B1" office:value-type="string">
              <text:p text:style-name="P82">Type</text:p>
            </table:table-cell>
            <table:table-cell table:style-name="Table7.A1" office:value-type="string">
              <text:p text:style-name="P82">Name</text:p>
            </table:table-cell>
            <table:table-cell table:style-name="Table7.A1" office:value-type="string">
              <text:p text:style-name="P82">Meaning</text:p>
            </table:table-cell>
          </table:table-row>
          <table:table-row table:style-name="Table7.1">
            <table:table-cell table:style-name="Table7.A1" office:value-type="string">
              <text:p text:style-name="P83"/>
            </table:table-cell>
            <table:table-cell table:style-name="Table7.B1" office:value-type="string">
              <text:p text:style-name="P84"><text:span text:style-name="T85">CMP_CTX</text:span><text:span text:style-name="T86"> *</text:span></text:p>
            </table:table-cell>
            <table:table-cell table:style-name="Table7.A1" office:value-type="string">
              <text:p text:style-name="P93">ctx</text:p>
            </table:table-cell>
            <table:table-cell table:style-name="Table7.A1" office:value-type="string">
              <text:p text:style-name="P82">CMP context to use</text:p>
            </table:table-cell>
          </table:table-row>
          <table:table-row table:style-name="Table7.1">
            <table:table-cell table:style-name="Table7.A1" office:value-type="string">
              <text:p text:style-name="P83"/>
            </table:table-cell>
            <table:table-cell table:style-name="Table7.B1" office:value-type="string">
              <text:p text:style-name="P84"><text:span text:style-name="T85">CREDENTIALS</text:span><text:span text:style-name="T86"> **</text:span></text:p>
            </table:table-cell>
            <table:table-cell table:style-name="Table7.A1" office:value-type="string">
              <text:p text:style-name="P93">new_creds</text:p>
            </table:table-cell>
            <table:table-cell table:style-name="Table7.A1" office:value-type="string">
              <text:p text:style-name="P82">Pointer to variable to obtain the enrolled cert etc. <text:span text:style-name="T167">With central key generation, this includes the private key obtained from the server.</text:span></text:p>
            </table:table-cell>
          </table:table-row>
          <table:table-row table:style-name="Table7.1">
            <table:table-cell table:style-name="Table7.A1" office:value-type="string">
              <text:p text:style-name="P83"/>
            </table:table-cell>
            <table:table-cell table:style-name="Table7.B1" office:value-type="string">
              <text:p text:style-name="P84"><text:span text:style-name="T102">const</text:span><text:span text:style-name="T86"> </text:span><text:span text:style-name="T85">EVP_PKEY</text:span><text:span text:style-name="T86"> *</text:span></text:p>
            </table:table-cell>
            <table:table-cell table:style-name="Table7.A1" office:value-type="string">
              <text:p text:style-name="P83">new_key</text:p>
            </table:table-cell>
            <table:table-cell table:style-name="Table7.A1" office:value-type="string">
              <text:p text:style-name="P126">Private key for the new certificate. <text:line-break/><text:span text:style-name="T168">If central key generation is requested, only the key type (</text:span><text:span text:style-name="T169">i.e.</text:span><text:span text:style-name="T168">, its algorithm </text:span><text:span text:style-name="T170">and size </text:span><text:span text:style-name="T168">info) is used. <text:line-break/>Otherwise </text:span><text:span text:style-name="T170">the private key</text:span> is used for signature-based POPO and the corresponding public key is <text:span text:style-name="T171">placed</text:span> in the cert<text:span text:style-name="T171">T</text:span>emplate <text:span text:style-name="T171">of the request</text:span>. </text:p>
              <text:p text:style-name="P127"><text:span text:style-name="T172">Note that an </text:span><text:span text:style-name="T85">EVP_PKEY</text:span><text:span text:style-name="T172"> structure can be used </text:span><text:span text:style-name="T173">also </text:span><text:span text:style-name="T172">for HW-based keys. In th</text:span><text:span text:style-name="T173">is</text:span><text:span text:style-name="T172"> case it does not include the key material itself but a reference to key material via a </text:span><text:span text:style-name="T173">crypto provider </text:span><text:span text:style-name="T174">or legacy </text:span><text:span text:style-name="T172">crypto engine.</text:span></text:p>
            </table:table-cell>
          </table:table-row>
          <table:table-row table:style-name="Table7.1">
            <table:table-cell table:style-name="Table7.A1" office:value-type="string">
              <text:p text:style-name="P83"/>
            </table:table-cell>
            <table:table-cell table:style-name="Table7.B1" office:value-type="string">
              <text:p text:style-name="P84"><text:span text:style-name="T102">const</text:span><text:span text:style-name="T86"> </text:span><text:span text:style-name="T85">char</text:span><text:span text:style-name="T86"> *</text:span></text:p>
            </table:table-cell>
            <table:table-cell table:style-name="Table7.A1" office:value-type="string">
              <text:p text:style-name="P83">subject</text:p>
            </table:table-cell>
            <table:table-cell table:style-name="Table7.A1" office:value-type="string">
              <text:p text:style-name="P99"><text:span text:style-name="T172">X.509 Subject Distinguished Name (DN) in the form </text:span><text:span text:style-name="T175">"</text:span><text:span text:style-name="T99">/&lt;type0&gt;=&lt;value0&gt;/&lt;type1&gt;=&lt;value1&gt;...</text:span><text:span text:style-name="T175">"</text:span><text:span text:style-name="T172">.<text:line-break/>If the </text:span><text:span text:style-name="T176">creds</text:span><text:span text:style-name="T172"> argument of is </text:span><text:span text:style-name="T99">NULL</text:span><text:span text:style-name="T172"> or does not contain a certificate this name is taken as the sender field of the CMP messages sent.</text:span></text:p>
            </table:table-cell>
          </table:table-row>
          <text:soft-page-break/>
          <table:table-row table:style-name="Table7.1">
            <table:table-cell table:style-name="Table7.A1" office:value-type="string">
              <text:p text:style-name="P83">OPTIONAL </text:p>
            </table:table-cell>
            <table:table-cell table:style-name="Table7.B1" office:value-type="string">
              <text:p text:style-name="P84"><text:span text:style-name="T102">const</text:span><text:span text:style-name="T86"> </text:span><text:span text:style-name="T85">X509_EXTENSIONS</text:span><text:span text:style-name="T86"> *</text:span></text:p>
            </table:table-cell>
            <table:table-cell table:style-name="Table7.A1" office:value-type="string">
              <text:p text:style-name="P93">exts</text:p>
            </table:table-cell>
            <table:table-cell table:style-name="Table7.A1" office:value-type="string">
              <text:p text:style-name="P82">X.509<text:span text:style-name="T177">v3</text:span> extensions to <text:span text:style-name="T177">place</text:span> in the cert<text:span text:style-name="T171">T</text:span>emplate</text:p>
            </table:table-cell>
          </table:table-row>
        </table:table>
        <text:p text:style-name="P60"/>
        <text:p text:style-name="P128">The function <text:span text:style-name="T60">CMPclient_pkcs10()</text:span> performs certificate enrollment based on a legacy PKCS#10 CSR <text:span text:style-name="T165">(if CRMF cannot be used) </text:span>using the CMP command ‘<text:span text:style-name="T60">p10cr</text:span>’, <text:span text:style-name="T19">see [LCMPP section 4.1.4]</text:span>.</text:p>
        <text:p text:style-name="P12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1">Param.</text:p>
            </table:table-cell>
            <table:table-cell table:style-name="Table8.B1" office:value-type="string">
              <text:p text:style-name="P82">Type</text:p>
            </table:table-cell>
            <table:table-cell table:style-name="Table8.A1" office:value-type="string">
              <text:p text:style-name="P82">Name</text:p>
            </table:table-cell>
            <table:table-cell table:style-name="Table8.A1" office:value-type="string">
              <text:p text:style-name="P82">Meaning</text:p>
            </table:table-cell>
          </table:table-row>
          <table:table-row table:style-name="Table8.1">
            <table:table-cell table:style-name="Table8.A1" office:value-type="string">
              <text:p text:style-name="P83"/>
            </table:table-cell>
            <table:table-cell table:style-name="Table8.B1" office:value-type="string">
              <text:p text:style-name="P84"><text:span text:style-name="T85">CMP_CTX</text:span><text:span text:style-name="T86"> *</text:span></text:p>
            </table:table-cell>
            <table:table-cell table:style-name="Table8.A1" office:value-type="string">
              <text:p text:style-name="P93">ctx</text:p>
            </table:table-cell>
            <table:table-cell table:style-name="Table8.A1" office:value-type="string">
              <text:p text:style-name="P82">CMP context to use</text:p>
            </table:table-cell>
          </table:table-row>
          <table:table-row table:style-name="Table8.1">
            <table:table-cell table:style-name="Table8.A1" office:value-type="string">
              <text:p text:style-name="P83"/>
            </table:table-cell>
            <table:table-cell table:style-name="Table8.B1" office:value-type="string">
              <text:p text:style-name="P84"><text:span text:style-name="T85">CREDENTIALS</text:span><text:span text:style-name="T86"> **</text:span></text:p>
            </table:table-cell>
            <table:table-cell table:style-name="Table8.A1" office:value-type="string">
              <text:p text:style-name="P93">new_creds</text:p>
            </table:table-cell>
            <table:table-cell table:style-name="Table8.A1" office:value-type="string">
              <text:p text:style-name="P82">Pointer to variable to obtain the enrolled cert etc.</text:p>
            </table:table-cell>
          </table:table-row>
          <table:table-row table:style-name="Table8.1">
            <table:table-cell table:style-name="Table8.A1" office:value-type="string">
              <text:p text:style-name="P83"/>
            </table:table-cell>
            <table:table-cell table:style-name="Table8.B1" office:value-type="string">
              <text:p text:style-name="P84"><text:span text:style-name="T102">const</text:span><text:span text:style-name="T86"> </text:span><text:span text:style-name="T85">X509_REQ</text:span><text:span text:style-name="T86"> *</text:span></text:p>
            </table:table-cell>
            <table:table-cell table:style-name="Table8.A1" office:value-type="string">
              <text:p text:style-name="P83">pc10csr</text:p>
            </table:table-cell>
            <table:table-cell table:style-name="Table8.A1" office:value-type="string">
              <text:p text:style-name="P82">Legacy PKCS#10 certificate signing request to use</text:p>
            </table:table-cell>
          </table:table-row>
        </table:table>
        <text:p text:style-name="P130">The function <text:span text:style-name="T60">CMPclient_update()</text:span> performs a certificate update, aka re-enrollment using the CMP command ‘<text:span text:style-name="T166">kur</text:span>’, <text:span text:style-name="T19">see [LCMPP section 4.1.3]</text:span>. The certificate to be updated is the <text:span text:style-name="T98">cert </text:span>component of the <text:span text:style-name="T129">creds</text:span><text:span text:style-name="T98"> </text:span>argument given to <text:span text:style-name="T60">CMPclient_prepare()</text:span>. <text:span text:style-name="T171">The subject, any subject alternative names, </text:span><text:span text:style-name="T178">and also any further</text:span><text:span text:style-name="T171"> </text:span><text:span text:style-name="T179">X.509v3 </text:span><text:span text:style-name="T180">extensions (except for subject key identifier and authority key identifier) </text:span><text:span text:style-name="T171">in the certificate to be updated are taken over in the request certTemplate. </text:span><text:span text:style-name="T181">If the </text:span><text:span text:style-name="T182">new_key</text:span><text:span text:style-name="T181"> parameter is </text:span><text:span text:style-name="T157">NULL</text:span><text:span text:style-name="T181">, it defaults to the </text:span><text:span text:style-name="T183">key </text:span><text:span text:style-name="T181">component of the </text:span><text:span text:style-name="T184">creds</text:span><text:span text:style-name="T183"> </text:span><text:span text:style-name="T181">argument given to </text:span><text:span text:style-name="T185">CMPclient_prepare()</text:span><text:span text:style-name="T181">.</text:span></text:p>
        <text:p text:style-name="P131"/>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32">Param.</text:p>
            </table:table-cell>
            <table:table-cell table:style-name="Table21.A1" office:value-type="string">
              <text:p text:style-name="P133">Type</text:p>
            </table:table-cell>
            <table:table-cell table:style-name="Table21.A1" office:value-type="string">
              <text:p text:style-name="P133">Name</text:p>
            </table:table-cell>
            <table:table-cell table:style-name="Table21.A1" office:value-type="string">
              <text:p text:style-name="P133">Meaning</text:p>
            </table:table-cell>
          </table:table-row>
          <table:table-row table:style-name="Table21.1">
            <table:table-cell table:style-name="Table21.A1" office:value-type="string">
              <text:p text:style-name="P134"/>
            </table:table-cell>
            <table:table-cell table:style-name="Table21.A1" office:value-type="string">
              <text:p text:style-name="P135"><text:span text:style-name="T85">CMP_CTX</text:span><text:span text:style-name="T86"> *</text:span></text:p>
            </table:table-cell>
            <table:table-cell table:style-name="Table21.A1" office:value-type="string">
              <text:p text:style-name="P136">ctx</text:p>
            </table:table-cell>
            <table:table-cell table:style-name="Table21.A1" office:value-type="string">
              <text:p text:style-name="P133">CMP context to use</text:p>
            </table:table-cell>
          </table:table-row>
          <table:table-row table:style-name="Table21.1">
            <table:table-cell table:style-name="Table21.A1" office:value-type="string">
              <text:p text:style-name="P134"/>
            </table:table-cell>
            <table:table-cell table:style-name="Table21.A1" office:value-type="string">
              <text:p text:style-name="P135"><text:span text:style-name="T85">CREDENTIALS</text:span><text:span text:style-name="T86"> **</text:span></text:p>
            </table:table-cell>
            <table:table-cell table:style-name="Table21.A1" office:value-type="string">
              <text:p text:style-name="P136">new_creds</text:p>
            </table:table-cell>
            <table:table-cell table:style-name="Table21.A1" office:value-type="string">
              <text:p text:style-name="P133">Pointer to variable to obtain the enrolled cert etc.</text:p>
            </table:table-cell>
          </table:table-row>
          <table:table-row table:style-name="Table21.1">
            <table:table-cell table:style-name="Table21.A1" office:value-type="string">
              <text:p text:style-name="P137">OPTIONAL</text:p>
            </table:table-cell>
            <table:table-cell table:style-name="Table21.A1" office:value-type="string">
              <text:p text:style-name="P135"><text:span text:style-name="T102">const</text:span><text:span text:style-name="T86"> </text:span><text:span text:style-name="T85">EVP_PKEY</text:span><text:span text:style-name="T86"> *</text:span></text:p>
            </table:table-cell>
            <table:table-cell table:style-name="Table21.A1" office:value-type="string">
              <text:p text:style-name="P134">new_key</text:p>
            </table:table-cell>
            <table:table-cell table:style-name="Table21.A1" office:value-type="string">
              <text:p text:style-name="P138"><text:span text:style-name="T91">Key (pair), </text:span><text:span text:style-name="T186">as described for </text:span><text:span text:style-name="T187">CMPclient_bootstrap(</text:span><text:span text:style-name="T188">)</text:span></text:p>
            </table:table-cell>
          </table:table-row>
        </table:table>
        <text:p text:style-name="P139">The function <text:span text:style-name="T60">CMPclient_update_</text:span><text:span text:style-name="T189">anycert</text:span><text:span text:style-name="T60">()</text:span> <text:span text:style-name="T190">is </text:span><text:span text:style-name="T191">a generalization of</text:span><text:span text:style-name="T190"> </text:span><text:span text:style-name="T192">CMPclient_update()</text:span><text:span text:style-name="T190"> <text:s/>where t</text:span>he certificate to be updated <text:span text:style-name="T180">can be</text:span> <text:span text:style-name="T190">given as the</text:span> <text:span text:style-name="T193">old_c</text:span><text:span text:style-name="T98">ert </text:span><text:span text:style-name="T190">parameter</text:span>. <text:span text:style-name="T180">If </text:span><text:span text:style-name="T193">old_c</text:span><text:span text:style-name="T194">ert</text:span><text:span text:style-name="T180"> is </text:span><text:span text:style-name="T157">NULL</text:span><text:span text:style-name="T180"> the function behaves like </text:span><text:span text:style-name="T195">CMPclient_update()</text:span><text:span text:style-name="T180">.</text:span></text:p>
        <text:p text:style-name="P131"/>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32">Param.</text:p>
            </table:table-cell>
            <table:table-cell table:style-name="Table22.A1" office:value-type="string">
              <text:p text:style-name="P133">Type</text:p>
            </table:table-cell>
            <table:table-cell table:style-name="Table22.A1" office:value-type="string">
              <text:p text:style-name="P133">Name</text:p>
            </table:table-cell>
            <table:table-cell table:style-name="Table22.A1" office:value-type="string">
              <text:p text:style-name="P133">Meaning</text:p>
            </table:table-cell>
          </table:table-row>
          <table:table-row table:style-name="Table22.1">
            <table:table-cell table:style-name="Table22.A1" office:value-type="string">
              <text:p text:style-name="P134"/>
            </table:table-cell>
            <table:table-cell table:style-name="Table22.A1" office:value-type="string">
              <text:p text:style-name="P135"><text:span text:style-name="T85">CMP_CTX</text:span><text:span text:style-name="T86"> *</text:span></text:p>
            </table:table-cell>
            <table:table-cell table:style-name="Table22.A1" office:value-type="string">
              <text:p text:style-name="P136">ctx</text:p>
            </table:table-cell>
            <table:table-cell table:style-name="Table22.A1" office:value-type="string">
              <text:p text:style-name="P133">CMP context to use</text:p>
            </table:table-cell>
          </table:table-row>
          <table:table-row table:style-name="Table22.1">
            <table:table-cell table:style-name="Table22.A1" office:value-type="string">
              <text:p text:style-name="P134"/>
            </table:table-cell>
            <table:table-cell table:style-name="Table22.A1" office:value-type="string">
              <text:p text:style-name="P135"><text:span text:style-name="T85">CREDENTIALS</text:span><text:span text:style-name="T86"> **</text:span></text:p>
            </table:table-cell>
            <table:table-cell table:style-name="Table22.A1" office:value-type="string">
              <text:p text:style-name="P140">new_creds</text:p>
            </table:table-cell>
            <table:table-cell table:style-name="Table22.A1" office:value-type="string">
              <text:p text:style-name="P133">Pointer to variable to obtain the enrolled cert etc.</text:p>
            </table:table-cell>
          </table:table-row>
          <table:table-row table:style-name="Table22.1">
            <table:table-cell table:style-name="Table22.A1" office:value-type="string">
              <text:p text:style-name="P141">OPTIONAL</text:p>
            </table:table-cell>
            <table:table-cell table:style-name="Table22.A1" office:value-type="string">
              <text:p text:style-name="P135"><text:span text:style-name="T102">const</text:span><text:span text:style-name="T86"> </text:span><text:span text:style-name="T196">X509</text:span><text:span text:style-name="T86"> *</text:span></text:p>
            </table:table-cell>
            <table:table-cell table:style-name="Table22.A1" office:value-type="string">
              <text:p text:style-name="P142">old_cert</text:p>
            </table:table-cell>
            <table:table-cell table:style-name="Table22.A1" office:value-type="string">
              <text:p text:style-name="P143">Certificate to be updated</text:p>
            </table:table-cell>
          </table:table-row>
          <table:table-row table:style-name="Table22.1">
            <table:table-cell table:style-name="Table22.A5" office:value-type="string">
              <text:p text:style-name="P144">OPTIONAL</text:p>
            </table:table-cell>
            <table:table-cell table:style-name="Table22.A5" office:value-type="string">
              <text:p text:style-name="P135"><text:span text:style-name="T102">const</text:span><text:span text:style-name="T86"> </text:span><text:span text:style-name="T85">EVP_PKEY</text:span><text:span text:style-name="T86"> *</text:span></text:p>
            </table:table-cell>
            <table:table-cell table:style-name="Table22.A5" office:value-type="string">
              <text:p text:style-name="P134">new_key</text:p>
            </table:table-cell>
            <table:table-cell table:style-name="Table22.A5" office:value-type="string">
              <text:p text:style-name="P135"><text:span text:style-name="T91">Key (pair); see above description in section </text:span><text:span text:style-name="T94"><text:bookmark-ref text:reference-format="number" text:ref-name="_Ref507616602">3.4</text:bookmark-ref></text:span></text:p>
            </table:table-cell>
          </table:table-row>
        </table:table>
        <text:p text:style-name="P145">The function <text:span text:style-name="T166">CMPclient_update_</text:span><text:span text:style-name="T197">with_exts()</text:span> <text:span text:style-name="T190">is </text:span><text:span text:style-name="T198">also </text:span><text:span text:style-name="T179">a </text:span><text:span text:style-name="T191">generalization of</text:span><text:span text:style-name="T190"> </text:span><text:span text:style-name="T192">CMPclient_update()</text:span><text:span text:style-name="T190"> where t</text:span>he certificate to be updated <text:span text:style-name="T180">can be</text:span> <text:span text:style-name="T190">given as the</text:span> <text:span text:style-name="T193">old_c</text:span><text:span text:style-name="T98">ert </text:span><text:span text:style-name="T190">parameter, </text:span><text:span text:style-name="T179">yet here </text:span><text:span text:style-name="T198">by default only any </text:span><text:span text:style-name="T178">subject alternative names </text:span><text:span text:style-name="T198">are taken from the certificate, while </text:span><text:span text:style-name="T178">further </text:span><text:span text:style-name="T179">X.509v3</text:span><text:span text:style-name="T180"> extensions </text:span><text:span text:style-name="T179">are taken from the optional </text:span><text:span text:style-name="T199">exts</text:span><text:span text:style-name="T180"> </text:span><text:span text:style-name="T179">parameter </text:span><text:span text:style-name="T178">rather than from the certificate to be updated</text:span><text:span text:style-name="T179">.</text:span></text:p>
        <text:p text:style-name="P14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47">Param.</text:p>
            </table:table-cell>
            <table:table-cell table:style-name="Table9.A1" office:value-type="string">
              <text:p text:style-name="P148">Type</text:p>
            </table:table-cell>
            <table:table-cell table:style-name="Table9.A1" office:value-type="string">
              <text:p text:style-name="P148">Name</text:p>
            </table:table-cell>
            <table:table-cell table:style-name="Table9.A1" office:value-type="string">
              <text:p text:style-name="P148">Meaning</text:p>
            </table:table-cell>
          </table:table-row>
          <table:table-row table:style-name="Table9.1">
            <table:table-cell table:style-name="Table9.A1" office:value-type="string">
              <text:p text:style-name="P149"/>
            </table:table-cell>
            <table:table-cell table:style-name="Table9.A1" office:value-type="string">
              <text:p text:style-name="P150"><text:span text:style-name="T85">CMP_CTX</text:span><text:span text:style-name="T86"> *</text:span></text:p>
            </table:table-cell>
            <table:table-cell table:style-name="Table9.A1" office:value-type="string">
              <text:p text:style-name="P140">ctx</text:p>
            </table:table-cell>
            <table:table-cell table:style-name="Table9.A1" office:value-type="string">
              <text:p text:style-name="P148">CMP context to use</text:p>
            </table:table-cell>
          </table:table-row>
          <table:table-row table:style-name="Table9.1">
            <table:table-cell table:style-name="Table9.A1" office:value-type="string">
              <text:p text:style-name="P149"/>
            </table:table-cell>
            <table:table-cell table:style-name="Table9.A1" office:value-type="string">
              <text:p text:style-name="P150"><text:span text:style-name="T85">CREDENTIALS</text:span><text:span text:style-name="T86"> **</text:span></text:p>
            </table:table-cell>
            <table:table-cell table:style-name="Table9.A1" office:value-type="string">
              <text:p text:style-name="P151">new_creds</text:p>
            </table:table-cell>
            <table:table-cell table:style-name="Table9.A1" office:value-type="string">
              <text:p text:style-name="P152">Pointer to variable to obtain the enrolled cert etc.</text:p>
            </table:table-cell>
          </table:table-row>
          <table:table-row table:style-name="Table9.1">
            <table:table-cell table:style-name="Table9.A1" office:value-type="string">
              <text:p text:style-name="P153">OPTIONAL</text:p>
            </table:table-cell>
            <table:table-cell table:style-name="Table9.A1" office:value-type="string">
              <text:p text:style-name="P150"><text:span text:style-name="T102">const</text:span><text:span text:style-name="T86"> </text:span><text:span text:style-name="T196">X509</text:span><text:span text:style-name="T86"> *</text:span></text:p>
            </table:table-cell>
            <table:table-cell table:style-name="Table9.A1" office:value-type="string">
              <text:p text:style-name="P154">old_cert</text:p>
            </table:table-cell>
            <table:table-cell table:style-name="Table9.A1" office:value-type="string">
              <text:p text:style-name="P155">Certificate to be updated</text:p>
            </table:table-cell>
          </table:table-row>
          <table:table-row table:style-name="Table9.1">
            <table:table-cell table:style-name="Table9.A5" office:value-type="string">
              <text:p text:style-name="P153">OPTIONAL</text:p>
            </table:table-cell>
            <table:table-cell table:style-name="Table9.A5" office:value-type="string">
              <text:p text:style-name="P150"><text:span text:style-name="T102">const</text:span><text:span text:style-name="T86"> </text:span><text:span text:style-name="T85">EVP_PKEY</text:span><text:span text:style-name="T86"> *</text:span></text:p>
            </table:table-cell>
            <table:table-cell table:style-name="Table9.A5" office:value-type="string">
              <text:p text:style-name="P149">new_key</text:p>
            </table:table-cell>
            <table:table-cell table:style-name="Table9.A5" office:value-type="string">
              <text:p text:style-name="P150"><text:span text:style-name="T91">Key (pair); see above description in section </text:span><text:span text:style-name="T94"><text:bookmark-ref text:reference-format="number" text:ref-name="_Ref507616602">3.4</text:bookmark-ref></text:span></text:p>
            </table:table-cell>
          </table:table-row>
          <table:table-row table:style-name="Table9.1">
            <table:table-cell table:style-name="Table9.A5" office:value-type="string">
              <text:p text:style-name="P153">OPTIONAL</text:p>
            </table:table-cell>
            <table:table-cell table:style-name="Table9.A5" office:value-type="string">
              <text:p text:style-name="P150"><text:span text:style-name="T102">const</text:span><text:span text:style-name="T86"> </text:span><text:span text:style-name="T200">X509_EXTENSIONS</text:span><text:span text:style-name="T86"> *</text:span></text:p>
            </table:table-cell>
            <table:table-cell table:style-name="Table9.A5" office:value-type="string">
              <text:p text:style-name="P156">exts</text:p>
            </table:table-cell>
            <table:table-cell table:style-name="Table9.A5" office:value-type="string">
              <text:p text:style-name="P157"><text:span text:style-name="T177">X.509v3 extensions to place in the cert</text:span><text:span text:style-name="T171">T</text:span><text:span text:style-name="T177">emplate</text:span></text:p>
            </table:table-cell>
          </table:table-row>
        </table:table>
        <text:p text:style-name="P158"><text:soft-page-break/><text:span text:style-name="T201">The request</text:span><text:span text:style-name="T202">s</text:span><text:span text:style-name="T201"> may </text:span><text:span text:style-name="T203">refer to a</text:span><text:span text:style-name="T201"> certificate profile set </text:span><text:span text:style-name="T204">before</text:span><text:span text:style-name="T201"> using </text:span><text:span text:style-name="T205">CMPclient_</text:span><text:span text:style-name="T155">add_certProfile</text:span><text:span text:style-name="T205">()</text:span><text:span text:style-name="T201">.<text:line-break/></text:span><text:span text:style-name="T168">For requesting central key generation, </text:span></text:p>
        <text:p text:style-name="P159"><text:span text:style-name="T206">OSSL_CMP_CTX_set_option</text:span><text:span text:style-name="T207">(ctx, OSSL_CMP_OPT_POPO_METHOD, OSSL_CRMF_POPO_NONE)</text:span><text:span text:style-name="T168"> </text:span></text:p>
        <text:p text:style-name="P160">must be called before.</text:p>
        <text:p text:style-name="P161"><text:span text:style-name="T208">Any certificate confirmation and polling for responses is handled under the hood. This implies that the call will block </text:span><text:span text:style-name="T209">until</text:span><text:span text:style-name="T208"> a final response is </text:span><text:span text:style-name="T209">received</text:span><text:span text:style-name="T208"> <text:s/>or a timeout has occurred.</text:span></text:p>
        <text:p text:style-name="P161"><text:span text:style-name="T91">On success, each of the enrollment functions allocates a </text:span><text:span text:style-name="T200">CREDENTIALS</text:span><text:span text:style-name="T91"> structure and fills it with the </text:span><text:span text:style-name="T86">new_key</text:span><text:span text:style-name="T91"> argument supplied (or </text:span><text:span text:style-name="T86">NULL</text:span><text:span text:style-name="T91"> in case of </text:span><text:span text:style-name="T60">CMPclient_pkcs10()</text:span><text:span text:style-name="T91">), the newly enrolled certificate, and a chain for this certificate. The chain is constructed from the list of untrusted certificates held in the CMP context, which includes any certificates provided by the server in the </text:span><text:span text:style-name="T141">extraCerts</text:span><text:span text:style-name="T91"> field of responses. The pointer to the structure is returned via the pointer to a variable supplied as the </text:span><text:span text:style-name="T129">new_creds</text:span><text:span text:style-name="T91"> parameter.</text:span></text:p>
        <text:p text:style-name="P100"><text:span text:style-name="T91">Example use (for </text:span><text:span text:style-name="T141">KEY_new</text:span><text:span text:style-name="T140">()</text:span><text:span text:style-name="T91">, see section </text:span><text:span text:style-name="T94"><text:bookmark-ref text:reference-format="number" text:ref-name="_Ref507658993">4.3</text:bookmark-ref></text:span><text:span text:style-name="T91">, for the part replaced by ‘</text:span><text:span text:style-name="T140">…</text:span><text:span text:style-name="T91">’, see section </text:span><text:span text:style-name="T94"><text:bookmark-ref text:reference-format="number" text:ref-name="_Ref507658974">4.5</text:bookmark-ref></text:span><text:span text:style-name="T91">, and for </text:span><text:span text:style-name="T141">CREDENTIALS_save()</text:span><text:span text:style-name="T91">, see section </text:span><text:span text:style-name="T94"><text:bookmark-ref text:reference-format="number" text:ref-name="_Ref507659007">4.1</text:bookmark-ref></text:span><text:span text:style-name="T91">):</text:span></text:p>
        <text:p text:style-name="P46"><text:span text:style-name="T77"><text:s text:c="4"/></text:span><text:span text:style-name="T210">CREDENTIALS</text:span><text:span text:style-name="T77"> *new_creds = </text:span><text:span text:style-name="T211">NULL</text:span><text:span text:style-name="T77">;</text:span></text:p>
        <text:p text:style-name="P46"><text:span text:style-name="T77"><text:s text:c="4"/></text:span><text:span text:style-name="T212">const</text:span><text:span text:style-name="T77"> </text:span><text:span text:style-name="T210">char</text:span><text:span text:style-name="T77"> *subject = "/CN=</text:span><text:span text:style-name="T213">test-genCMPClient</text:span><text:span text:style-name="T77">";</text:span></text:p>
        <text:p text:style-name="P46"><text:span text:style-name="T77"><text:s text:c="4"/></text:span><text:span text:style-name="T210">EVP_PKEY</text:span><text:span text:style-name="T77"> *new_key = KEY_new("EC:prime256v1");</text:span></text:p>
        <text:p text:style-name="P46"><text:span text:style-name="T77"><text:s text:c="4"/></text:span><text:span text:style-name="T210">X509_EXTENSIONS</text:span><text:span text:style-name="T77"> *exts = …</text:span></text:p>
        <text:p text:style-name="P162"><text:s text:c="4"/>err = CMPclient_bootstrap(ctx, &amp;new_creds, new_key, subject, exts);</text:p>
        <text:p text:style-name="P46"><text:span text:style-name="T77"><text:s text:c="4"/></text:span><text:span text:style-name="T212">if</text:span><text:span text:style-name="T77"> (err == 0) {</text:span></text:p>
        <text:p text:style-name="P46"><text:span text:style-name="T77"><text:s text:c="8"/></text:span><text:span text:style-name="T212">const</text:span><text:span text:style-name="T77"> </text:span><text:span text:style-name="T210">CREDENTIALS</text:span><text:span text:style-name="T77"> *creds = new_creds;</text:span></text:p>
        <text:p text:style-name="P46"><text:span text:style-name="T77"><text:s text:c="8"/></text:span><text:span text:style-name="T212">const</text:span><text:span text:style-name="T77"> </text:span><text:span text:style-name="T210">char</text:span><text:span text:style-name="T77"> *file = "certs/new.p12";</text:span></text:p>
        <text:p text:style-name="P46"><text:span text:style-name="T77"><text:s text:c="8"/></text:span><text:span text:style-name="T212">const</text:span><text:span text:style-name="T77"> </text:span><text:span text:style-name="T210">char</text:span><text:span text:style-name="T77"> *source = NULL /* plain file */;</text:span></text:p>
        <text:p text:style-name="P46"><text:span text:style-name="T212"><text:s text:c="8"/>const</text:span><text:span text:style-name="T77"> </text:span><text:span text:style-name="T210">char</text:span><text:span text:style-name="T77"> *desc = " newly enrolled certificate and related key and chain";</text:span></text:p>
        <text:p text:style-name="P46"><text:span text:style-name="T77"><text:s text:c="8"/></text:span><text:span text:style-name="T212">if</text:span><text:span text:style-name="T77"> (!CREDENTIALS_save(creds, file, file, OPTIONAL source, OPTIONAL desc))</text:span></text:p>
        <text:p text:style-name="P46"><text:span text:style-name="T77"><text:s text:c="12"/></text:span><text:span text:style-name="T212">goto</text:span><text:span text:style-name="T77"> err;</text:span></text:p>
        <text:p text:style-name="P163"><text:span text:style-name="T77"><text:s text:c="4"/>}</text:span><text:span text:style-name="T214"> </text:span></text:p>
        <text:list text:continue-numbering="true" text:style-name="WWNum2">
          <text:list-item>
            <text:list>
              <text:list-item>
                <text:h text:style-name="P164" text:outline-level="2"><text:bookmark-start text:name="__RefHeading___Toc28339_3580160810"/><text:span text:style-name="T215">CMPclient_</text:span><text:span text:style-name="T216">revoke</text:span><text:bookmark-end text:name="__RefHeading___Toc28339_3580160810"/></text:h>
              </text:list-item>
            </text:list>
          </text:list-item>
        </text:list>
        <text:p text:style-name="P165"><text:span text:style-name="T217">The function </text:span><text:span text:style-name="T218">CMPclient_revoke()</text:span><text:span text:style-name="T217"> performs certificate revocation using the CMP command ‘</text:span><text:span text:style-name="T219">rr</text:span><text:span text:style-name="T217">’, </text:span><text:span text:style-name="T220">see</text:span><text:span text:style-name="T217"> </text:span><text:span text:style-name="T220">[LCMPP section 4.2]</text:span><text:span text:style-name="T217">. </text:span><text:span text:style-name="T221">Any polling for </text:span><text:span text:style-name="T222">the </text:span><text:span text:style-name="T221">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66">Param.</text:p>
            </table:table-cell>
            <table:table-cell table:style-name="Table23.A1" office:value-type="string">
              <text:p text:style-name="P167">Type</text:p>
            </table:table-cell>
            <table:table-cell table:style-name="Table23.A1" office:value-type="string">
              <text:p text:style-name="P167">Name</text:p>
            </table:table-cell>
            <table:table-cell table:style-name="Table23.A1" office:value-type="string">
              <text:p text:style-name="P167">Meaning</text:p>
            </table:table-cell>
          </table:table-row>
          <table:table-row table:style-name="Table23.1">
            <table:table-cell table:style-name="Table23.A1" office:value-type="string">
              <text:p text:style-name="P168"/>
            </table:table-cell>
            <table:table-cell table:style-name="Table23.A1" office:value-type="string">
              <text:p text:style-name="P169"><text:span text:style-name="T85">CMP_CTX</text:span><text:span text:style-name="T86"> *</text:span></text:p>
            </table:table-cell>
            <table:table-cell table:style-name="Table23.A1" office:value-type="string">
              <text:p text:style-name="P170">ctx</text:p>
            </table:table-cell>
            <table:table-cell table:style-name="Table23.A1" office:value-type="string">
              <text:p text:style-name="P167">CMP context to use</text:p>
            </table:table-cell>
          </table:table-row>
          <table:table-row table:style-name="Table23.1">
            <table:table-cell table:style-name="Table23.A1" office:value-type="string">
              <text:p text:style-name="P168"/>
            </table:table-cell>
            <table:table-cell table:style-name="Table23.A1" office:value-type="string">
              <text:p text:style-name="P169"><text:span text:style-name="T102">const</text:span><text:span text:style-name="T86"> </text:span><text:span text:style-name="T85">X509</text:span><text:span text:style-name="T86"> *</text:span></text:p>
            </table:table-cell>
            <table:table-cell table:style-name="Table23.A1" office:value-type="string">
              <text:p text:style-name="P168">cert</text:p>
            </table:table-cell>
            <table:table-cell table:style-name="Table23.A1" office:value-type="string">
              <text:p text:style-name="P167">Certificate to be revoked</text:p>
            </table:table-cell>
          </table:table-row>
          <table:table-row table:style-name="Table23.1">
            <table:table-cell table:style-name="Table23.A1" office:value-type="string">
              <text:p text:style-name="P168"/>
            </table:table-cell>
            <table:table-cell table:style-name="Table23.A1" office:value-type="string">
              <text:p text:style-name="P171">int</text:p>
            </table:table-cell>
            <table:table-cell table:style-name="Table23.A1" office:value-type="string">
              <text:p text:style-name="P168">reason</text:p>
            </table:table-cell>
            <table:table-cell table:style-name="Table23.A1" office:value-type="string">
              <text:p text:style-name="P169"><text:span text:style-name="T91">Revocation reason code, as defined in</text:span><text:span text:style-name="T223"> openssl/x509v3.h</text:span></text:p>
            </table:table-cell>
          </table:table-row>
        </table:table>
        <text:p text:style-name="P172"><text:span text:style-name="T224"/></text:p>
        <text:list text:continue-numbering="true" text:style-name="WWNum2">
          <text:list-item>
            <text:list>
              <text:list-item>
                <text:h text:style-name="P164" text:outline-level="2"><text:bookmark-start text:name="__RefHeading___Toc11727_3465195016"/><text:span text:style-name="T225">CMPclient_</text:span><text:span text:style-name="T226">caCert</text:span><text:span text:style-name="T216">s</text:span><text:bookmark-end text:name="__RefHeading___Toc11727_3465195016"/></text:h>
              </text:list-item>
            </text:list>
          </text:list-item>
        </text:list>
        <text:p text:style-name="P173"><text:span text:style-name="T227">The </text:span>function <text:span text:style-name="T54">CMPclient_</text:span><text:span text:style-name="T55">caCerts</text:span><text:span text:style-name="T60">()</text:span> <text:span text:style-name="T228">obtains</text:span><text:span text:style-name="T229"> a list of CA certificates from the server </text:span><text:span text:style-name="T230">and verifies that they are non-expired CA certificates</text:span><text:span text:style-name="T229">. </text:span><text:span text:style-name="T231">This function, as well as the there following ones, </text:span><text:span text:style-name="T232">is</text:span><text:span text:style-name="T231"> implemented using the CMP command ‘</text:span><text:span text:style-name="T233">genm</text:span><text:span text:style-name="T231">’ and perform</text:span><text:span text:style-name="T234">s</text:span><text:span text:style-name="T231"> any needed polling for the response under the hood.</text:span></text:p>
        <text:p text:style-name="P173"><text:span text:style-name="T229">If the </text:span><text:span text:style-name="T231">obtained certificates </text:span><text:span text:style-name="T229">are going to be </text:span><text:span text:style-name="T230">used as</text:span><text:span text:style-name="T229"> trust </text:span><text:span text:style-name="T230">anchors</text:span><text:span text:style-name="T229">, special care should be taken </text:span><text:span text:style-name="T231">beforehand </text:span><text:span text:style-name="T229">when providing credentials to </text:span><text:span text:style-name="T235">CMPclient_prepare()</text:span><text:span text:style-name="T229"> for </text:span><text:span text:style-name="T231">authenticating the</text:span><text:span text:style-name="T229"> </text:span><text:span text:style-name="T230">server</text:span><text:span text:style-name="T229">. I</text:span><text:span text:style-name="T231">f authentication</text:span><text:span text:style-name="T230"> is </text:span><text:span text:style-name="T229">certificate-based, <text:s/></text:span><text:span text:style-name="T236">after calling </text:span><text:span text:style-name="T54">CMPclient_</text:span><text:span text:style-name="T55">caCerts</text:span><text:span text:style-name="T237">()</text:span><text:span text:style-name="T236"> </text:span><text:span text:style-name="T230">successfully,</text:span><text:span text:style-name="T229"> </text:span><text:soft-page-break/><text:span text:style-name="T238">OSSL_CMP_CTX_get0_validatedSrvCert()</text:span><text:span text:style-name="T236"> </text:span><text:span text:style-name="T230">should be used t</text:span><text:span text:style-name="T236">o </text:span><text:span text:style-name="T201">obtain the server certificate and then </text:span><text:span text:style-name="T236">perform an </text:span>authorization <text:span text:style-name="T236">check </text:span>based on <text:span text:style-name="T201">it</text:span><text:span text:style-name="T236">.</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74">Param.</text:p>
            </table:table-cell>
            <table:table-cell table:style-name="Table17.A1" office:value-type="string">
              <text:p text:style-name="P175">Type</text:p>
            </table:table-cell>
            <table:table-cell table:style-name="Table17.A1" office:value-type="string">
              <text:p text:style-name="P175">Name</text:p>
            </table:table-cell>
            <table:table-cell table:style-name="Table17.A1" office:value-type="string">
              <text:p text:style-name="P175">Meaning</text:p>
            </table:table-cell>
          </table:table-row>
          <table:table-row table:style-name="Table17.1">
            <table:table-cell table:style-name="Table17.A1" office:value-type="string">
              <text:p text:style-name="P176"/>
            </table:table-cell>
            <table:table-cell table:style-name="Table17.A1" office:value-type="string">
              <text:p text:style-name="P177"><text:span text:style-name="T85">CMP_CTX</text:span><text:span text:style-name="T86"> *</text:span></text:p>
            </table:table-cell>
            <table:table-cell table:style-name="Table17.A1" office:value-type="string">
              <text:p text:style-name="P176">ctx</text:p>
            </table:table-cell>
            <table:table-cell table:style-name="Table17.A1" office:value-type="string">
              <text:p text:style-name="P177"><text:span text:style-name="T91">CMP context to </text:span><text:span text:style-name="T138">use</text:span></text:p>
            </table:table-cell>
          </table:table-row>
          <table:table-row table:style-name="Table17.1">
            <table:table-cell table:style-name="Table17.A1" office:value-type="string">
              <text:p text:style-name="P176"/>
            </table:table-cell>
            <table:table-cell table:style-name="Table17.A1" office:value-type="string">
              <text:p text:style-name="P178"><text:span text:style-name="T239">STACK_OF</text:span><text:span text:style-name="T240">(</text:span><text:span text:style-name="T239">X509</text:span><text:span text:style-name="T240">) **</text:span></text:p>
            </table:table-cell>
            <table:table-cell table:style-name="Table17.A1" office:value-type="string">
              <text:p text:style-name="P179">out</text:p>
            </table:table-cell>
            <table:table-cell table:style-name="Table17.A1" office:value-type="string">
              <text:p text:style-name="P180">Pointer to <text:span text:style-name="T241">variable to obtain the list of certificates.<text:line-break/>The list returned may be empty.</text:span></text:p>
            </table:table-cell>
          </table:table-row>
        </table:table>
        <text:p text:style-name="P181"/>
        <text:list text:continue-numbering="true" text:style-name="WWNum2">
          <text:list-item>
            <text:list>
              <text:list-item>
                <text:h text:style-name="P182" text:outline-level="2"><text:bookmark-start text:name="__RefHeading___Toc28341_3580160810"/>CMPclient_<text:span text:style-name="T226">certReqTemplate</text:span><text:bookmark-end text:name="__RefHeading___Toc28341_3580160810"/></text:h>
              </text:list-item>
            </text:list>
          </text:list-item>
        </text:list>
        <text:p text:style-name="P183"><text:span text:style-name="T227">The </text:span>function <text:span text:style-name="T54">CMPclient_</text:span><text:span text:style-name="T55">certReqTemplate</text:span><text:span text:style-name="T60">()</text:span> <text:span text:style-name="T201">requests from the server any preferences of the PKI for c</text:span><text:span text:style-name="T242">ertificate request</text:span><text:span text:style-name="T203">s</text:span><text:span text:style-name="T242">, </text:span><text:span text:style-name="T203">namely a CRMF</text:span><text:span text:style-name="T242"> template and </text:span><text:span text:style-name="T243">optionally </text:span><text:span text:style-name="T242">related key specifications. </text:span><text:span text:style-name="T203">Each of them may be </text:span><text:span text:style-name="T244">NULL</text:span><text:span text:style-name="T203"> to indicate that there are no such preferences.</text:span></text:p>
        <text:p text:style-name="P184"><text:span text:style-name="T203">The request may refer to a certificate profile set using </text:span><text:span text:style-name="T245">CMPclient_</text:span><text:span text:style-name="T158">add_certProfile</text:span><text:span text:style-name="T245">()</text:span><text:span text:style-name="T203">.</text:span></text:p>
        <text:p text:style-name="P185"/>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74">Param.</text:p>
            </table:table-cell>
            <table:table-cell table:style-name="Table18.A1" office:value-type="string">
              <text:p text:style-name="P175">Type</text:p>
            </table:table-cell>
            <table:table-cell table:style-name="Table18.A1" office:value-type="string">
              <text:p text:style-name="P175">Name</text:p>
            </table:table-cell>
            <table:table-cell table:style-name="Table18.A1" office:value-type="string">
              <text:p text:style-name="P175">Meaning</text:p>
            </table:table-cell>
          </table:table-row>
          <table:table-row table:style-name="Table18.1">
            <table:table-cell table:style-name="Table18.A1" office:value-type="string">
              <text:p text:style-name="P176"/>
            </table:table-cell>
            <table:table-cell table:style-name="Table18.A1" office:value-type="string">
              <text:p text:style-name="P177"><text:span text:style-name="T85">CMP_CTX</text:span><text:span text:style-name="T86"> *</text:span></text:p>
            </table:table-cell>
            <table:table-cell table:style-name="Table18.A1" office:value-type="string">
              <text:p text:style-name="P176">ctx</text:p>
            </table:table-cell>
            <table:table-cell table:style-name="Table18.A1" office:value-type="string">
              <text:p text:style-name="P177"><text:span text:style-name="T91">CMP context to </text:span><text:span text:style-name="T138">use</text:span></text:p>
            </table:table-cell>
          </table:table-row>
          <table:table-row table:style-name="Table18.1">
            <table:table-cell table:style-name="Table18.A1" office:value-type="string">
              <text:p text:style-name="P176"/>
            </table:table-cell>
            <table:table-cell table:style-name="Table18.A1" office:value-type="string">
              <text:p text:style-name="P186"><text:span text:style-name="T246">OSSL_CRMF_CERTTEMPLATE</text:span><text:span text:style-name="T86"> *</text:span></text:p>
            </table:table-cell>
            <table:table-cell table:style-name="Table18.A1" office:value-type="string">
              <text:p text:style-name="P187">certTemplate</text:p>
            </table:table-cell>
            <table:table-cell table:style-name="Table18.A1" office:value-type="string">
              <text:p text:style-name="P180">Pointer to <text:span text:style-name="T167">variable to obtain any </text:span><text:span text:style-name="T247">CRMF</text:span><text:span text:style-name="T167"> template</text:span></text:p>
            </table:table-cell>
          </table:table-row>
          <table:table-row table:style-name="Table18.1">
            <table:table-cell table:style-name="Table18.A1" office:value-type="string">
              <text:p text:style-name="P188">OPTIONAL</text:p>
            </table:table-cell>
            <table:table-cell table:style-name="Table18.A1" office:value-type="string">
              <text:p text:style-name="P189"><text:span text:style-name="T239">OSSL_CMP_ATAVS</text:span><text:span text:style-name="T248"> **</text:span></text:p>
            </table:table-cell>
            <table:table-cell table:style-name="Table18.A1" office:value-type="string">
              <text:p text:style-name="P190">keySpec</text:p>
            </table:table-cell>
            <table:table-cell table:style-name="Table18.A1" office:value-type="string">
              <text:p text:style-name="P191">Pointer to <text:span text:style-name="T167">variable to obtain any </text:span><text:span text:style-name="T249">key specifications</text:span></text:p>
            </table:table-cell>
          </table:table-row>
        </table:table>
        <text:p text:style-name="P181"/>
        <text:list text:continue-numbering="true" text:style-name="WWNum2">
          <text:list-item>
            <text:list>
              <text:list-item>
                <text:h text:style-name="P182" text:outline-level="2"><text:bookmark-start text:name="__RefHeading___Toc28343_3580160810"/>CMPclient_<text:span text:style-name="T250">rootCaCert</text:span><text:bookmark-end text:name="__RefHeading___Toc28343_3580160810"/></text:h>
              </text:list-item>
            </text:list>
          </text:list-item>
        </text:list>
        <text:p text:style-name="P192"><text:span text:style-name="T227">The </text:span>function <text:span text:style-name="T54">CMPclient_</text:span><text:span text:style-name="T55">rootCaCert</text:span><text:span text:style-name="T60">()</text:span> <text:span text:style-name="T251">obtains from the server an update </text:span><text:span text:style-name="T252">on the given root CA certificate or</text:span><text:span text:style-name="T227"> </text:span><text:span text:style-name="T244">NULL</text:span><text:span text:style-name="T227"> </text:span><text:span text:style-name="T252">if there is no update</text:span><text:span text:style-name="T227">. </text:span><text:span text:style-name="T253">If available, any provided forward and backward link certificates are used to verify the certificate update, and optionally they can be retrieved, too.</text:span></text:p>
        <text:p text:style-name="P193">The caveats given above for <text:span text:style-name="T54">CMPclient_</text:span><text:span text:style-name="T55">caCerts</text:span><text:span text:style-name="T60">()</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74">Param.</text:p>
            </table:table-cell>
            <table:table-cell table:style-name="Table19.A1" office:value-type="string">
              <text:p text:style-name="P175">Type</text:p>
            </table:table-cell>
            <table:table-cell table:style-name="Table19.A1" office:value-type="string">
              <text:p text:style-name="P175">Name</text:p>
            </table:table-cell>
            <table:table-cell table:style-name="Table19.A1" office:value-type="string">
              <text:p text:style-name="P175">Meaning</text:p>
            </table:table-cell>
          </table:table-row>
          <table:table-row table:style-name="Table19.1">
            <table:table-cell table:style-name="Table19.A1" office:value-type="string">
              <text:p text:style-name="P176"/>
            </table:table-cell>
            <table:table-cell table:style-name="Table19.A1" office:value-type="string">
              <text:p text:style-name="P177"><text:span text:style-name="T85">CMP_CTX</text:span><text:span text:style-name="T86"> *</text:span></text:p>
            </table:table-cell>
            <table:table-cell table:style-name="Table19.A1" office:value-type="string">
              <text:p text:style-name="P176">ctx</text:p>
            </table:table-cell>
            <table:table-cell table:style-name="Table19.A1" office:value-type="string">
              <text:p text:style-name="P177"><text:span text:style-name="T91">CMP context to </text:span><text:span text:style-name="T138">use</text:span></text:p>
            </table:table-cell>
          </table:table-row>
          <table:table-row table:style-name="Table19.1">
            <table:table-cell table:style-name="Table19.A1" office:value-type="string">
              <text:p text:style-name="P176"/>
            </table:table-cell>
            <table:table-cell table:style-name="Table19.A1" office:value-type="string">
              <text:p text:style-name="P194"><text:span text:style-name="T254">const </text:span><text:span text:style-name="T239">X509</text:span><text:span text:style-name="T240"> *</text:span></text:p>
            </table:table-cell>
            <table:table-cell table:style-name="Table19.A1" office:value-type="string">
              <text:p text:style-name="P195">oldWithOld</text:p>
            </table:table-cell>
            <table:table-cell table:style-name="Table19.A1" office:value-type="string">
              <text:p text:style-name="P196">Root CA certificate for which an update may be given</text:p>
            </table:table-cell>
          </table:table-row>
          <table:table-row table:style-name="Table19.1">
            <table:table-cell table:style-name="Table19.A1" office:value-type="string">
              <text:p text:style-name="P197"/>
            </table:table-cell>
            <table:table-cell table:style-name="Table19.A1" office:value-type="string">
              <text:p text:style-name="P194"><text:span text:style-name="T239">X509</text:span> **</text:p>
            </table:table-cell>
            <table:table-cell table:style-name="Table19.A1" office:value-type="string">
              <text:p text:style-name="P195">newWith<text:span text:style-name="T255">New</text:span></text:p>
            </table:table-cell>
            <table:table-cell table:style-name="Table19.A1" office:value-type="string">
              <text:p text:style-name="P198">Pointer to <text:span text:style-name="T230">variable to obtain the </text:span><text:span text:style-name="T255">CA c</text:span><text:span text:style-name="T230">ertificate </text:span><text:span text:style-name="T255">update</text:span></text:p>
            </table:table-cell>
          </table:table-row>
          <table:table-row table:style-name="Table19.1">
            <table:table-cell table:style-name="Table19.A5" office:value-type="string">
              <text:p text:style-name="P199">OPTIONAL</text:p>
            </table:table-cell>
            <table:table-cell table:style-name="Table19.A5" office:value-type="string">
              <text:p text:style-name="P200"><text:span text:style-name="T239">X509</text:span><text:span text:style-name="T248"> </text:span><text:span text:style-name="T256">**</text:span></text:p>
            </table:table-cell>
            <table:table-cell table:style-name="Table19.A5" office:value-type="string">
              <text:p text:style-name="P195">newWithOld</text:p>
            </table:table-cell>
            <table:table-cell table:style-name="Table19.A5" office:value-type="string">
              <text:p text:style-name="P198">Pointer to <text:span text:style-name="T230">variable to obtain </text:span><text:span text:style-name="T253">any forward link certificate</text:span></text:p>
            </table:table-cell>
          </table:table-row>
          <table:table-row table:style-name="Table19.1">
            <table:table-cell table:style-name="Table19.A5" office:value-type="string">
              <text:p text:style-name="P201">OPTIONAL</text:p>
            </table:table-cell>
            <table:table-cell table:style-name="Table19.A5" office:value-type="string">
              <text:p text:style-name="P194"><text:span text:style-name="T239">X509</text:span> **</text:p>
            </table:table-cell>
            <table:table-cell table:style-name="Table19.A5" office:value-type="string">
              <text:p text:style-name="P195">oldWithNew</text:p>
            </table:table-cell>
            <table:table-cell table:style-name="Table19.A5" office:value-type="string">
              <text:p text:style-name="P202">Pointer to <text:span text:style-name="T230">variable to obtain </text:span><text:span text:style-name="T253">any backward link cert</text:span></text:p>
            </table:table-cell>
          </table:table-row>
        </table:table>
        <text:p text:style-name="P181"/>
        <text:list text:continue-numbering="true" text:style-name="WWNum2">
          <text:list-item>
            <text:list>
              <text:list-item>
                <text:h text:style-name="P182" text:outline-level="2"><text:bookmark-start text:name="__RefHeading___Toc28345_3580160810"/>CMPclient_<text:span text:style-name="T250">crlUpdate</text:span><text:bookmark-end text:name="__RefHeading___Toc28345_3580160810"/></text:h>
              </text:list-item>
            </text:list>
          </text:list-item>
        </text:list>
        <text:p text:style-name="P203"><text:span text:style-name="T227">The </text:span>function <text:span text:style-name="T54">CMPclient_</text:span><text:span text:style-name="T55">crlUpdate</text:span><text:span text:style-name="T60">()</text:span> <text:span text:style-name="T253">obtains from the server</text:span><text:span text:style-name="T257"> </text:span><text:span text:style-name="T258">either </text:span><text:span text:style-name="T257">the latest CRL according to a </text:span><text:span text:style-name="T259">distribution point name or </text:span><text:span text:style-name="T257">issuer </text:span><text:span text:style-name="T259">name </text:span><text:span text:style-name="T260">taken from either a given certificate</text:span><text:span text:style-name="T259"> </text:span><text:span text:style-name="T260">or a given CRL. If it is no newer than </text:span><text:span text:style-name="T261">the</text:span><text:span text:style-name="T260"> given CRL, no CRL is transmitted and a </text:span><text:span text:style-name="T244">NULL</text:span><text:span text:style-name="T260"> pointer is provided</text:span><text:span text:style-name="T257">.</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74">Param.</text:p>
            </table:table-cell>
            <table:table-cell table:style-name="Table20.A1" office:value-type="string">
              <text:p text:style-name="P175">Type</text:p>
            </table:table-cell>
            <table:table-cell table:style-name="Table20.A1" office:value-type="string">
              <text:p text:style-name="P175">Name</text:p>
            </table:table-cell>
            <table:table-cell table:style-name="Table20.A1" office:value-type="string">
              <text:p text:style-name="P175">Meaning</text:p>
            </table:table-cell>
          </table:table-row>
          <table:table-row table:style-name="Table20.1">
            <table:table-cell table:style-name="Table20.A1" office:value-type="string">
              <text:p text:style-name="P176"/>
            </table:table-cell>
            <table:table-cell table:style-name="Table20.A1" office:value-type="string">
              <text:p text:style-name="P177"><text:span text:style-name="T85">CMP_CTX</text:span><text:span text:style-name="T86"> *</text:span></text:p>
            </table:table-cell>
            <table:table-cell table:style-name="Table20.A1" office:value-type="string">
              <text:p text:style-name="P176">ctx</text:p>
            </table:table-cell>
            <table:table-cell table:style-name="Table20.A1" office:value-type="string">
              <text:p text:style-name="P177"><text:span text:style-name="T91">CMP context to </text:span><text:span text:style-name="T138">use</text:span></text:p>
            </table:table-cell>
          </table:table-row>
          <table:table-row table:style-name="Table20.1">
            <table:table-cell table:style-name="Table20.A3" office:value-type="string">
              <text:p text:style-name="P204">OPTIONAL</text:p>
            </table:table-cell>
            <table:table-cell table:style-name="Table20.A3" office:value-type="string">
              <text:p text:style-name="P194"><text:span text:style-name="T239">X509</text:span> *</text:p>
            </table:table-cell>
            <table:table-cell table:style-name="Table20.A3" office:value-type="string">
              <text:p text:style-name="P205">cert</text:p>
            </table:table-cell>
            <table:table-cell table:style-name="Table20.A3" office:value-type="string">
              <text:p text:style-name="P198"><text:span text:style-name="T262">c</text:span><text:span text:style-name="T230">ertificate </text:span><text:span text:style-name="T262">to take dist point name or issuer name from</text:span></text:p>
            </table:table-cell>
          </table:table-row>
          <table:table-row table:style-name="Table20.1">
            <table:table-cell table:style-name="Table20.A1" office:value-type="string">
              <text:p text:style-name="P204">OPTIONAL</text:p>
            </table:table-cell>
            <table:table-cell table:style-name="Table20.A1" office:value-type="string">
              <text:p text:style-name="P194"><text:span text:style-name="T254">const </text:span><text:span text:style-name="T239">X509_</text:span><text:span text:style-name="T263">CRL</text:span><text:span text:style-name="T240"> *</text:span></text:p>
            </table:table-cell>
            <table:table-cell table:style-name="Table20.A1" office:value-type="string">
              <text:p text:style-name="P205">last_crl</text:p>
            </table:table-cell>
            <table:table-cell table:style-name="Table20.A1" office:value-type="string">
              <text:p text:style-name="P196"><text:span text:style-name="T264">CRL on which an </text:span>update may be given</text:p>
            </table:table-cell>
          </table:table-row>
          <table:table-row table:style-name="Table20.1">
            <table:table-cell table:style-name="Table20.A1" office:value-type="string">
              <text:p text:style-name="P199"/>
            </table:table-cell>
            <table:table-cell table:style-name="Table20.A1" office:value-type="string">
              <text:p text:style-name="P200"><text:span text:style-name="T239">X509_</text:span><text:span text:style-name="T263">CRL</text:span><text:span text:style-name="T248"> </text:span><text:span text:style-name="T256">**</text:span></text:p>
            </table:table-cell>
            <table:table-cell table:style-name="Table20.A1" office:value-type="string">
              <text:p text:style-name="P205">crl</text:p>
            </table:table-cell>
            <table:table-cell table:style-name="Table20.A1" office:value-type="string">
              <text:p text:style-name="P198">Pointer to <text:span text:style-name="T230">variable to obtain </text:span><text:span text:style-name="T262">the new CRL</text:span></text:p>
            </table:table-cell>
          </table:table-row>
        </table:table>
        <text:p text:style-name="P206"/>
        <text:list text:continue-numbering="true" text:style-name="WWNum2">
          <text:list-item>
            <text:list>
              <text:list-item>
                <text:h text:style-name="P207" text:outline-level="2"><text:bookmark-start text:name="__RefHeading___Toc56611_2781851127"/>CMPclient_snprint_PKIStatus<text:bookmark-end text:name="__RefHeading___Toc56611_2781851127"/></text:h>
              </text:list-item>
            </text:list>
          </text:list-item>
        </text:list>
        <text:p text:style-name="P208"><text:span text:style-name="T227">The </text:span>function <text:span text:style-name="T54">CMPclient_snprint_PKIStatus</text:span><text:span text:style-name="T60">()</text:span> <text:span text:style-name="T227">copies any detailed status or error information provided by the server into the given string buffer. If returns the buffer pointer on success and </text:span><text:span text:style-name="T244">NULL</text:span><text:span text:style-name="T227">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09">Param.</text:p>
            </table:table-cell>
            <table:table-cell table:style-name="Table15.A1" office:value-type="string">
              <text:p text:style-name="P210">Type</text:p>
            </table:table-cell>
            <table:table-cell table:style-name="Table15.A1" office:value-type="string">
              <text:p text:style-name="P210">Name</text:p>
            </table:table-cell>
            <table:table-cell table:style-name="Table15.A1" office:value-type="string">
              <text:p text:style-name="P210">Meaning</text:p>
            </table:table-cell>
          </table:table-row>
          <table:table-row table:style-name="Table15.1">
            <table:table-cell table:style-name="Table15.A1" office:value-type="string">
              <text:p text:style-name="P211"/>
            </table:table-cell>
            <table:table-cell table:style-name="Table15.A1" office:value-type="string">
              <text:p text:style-name="P212"><text:span text:style-name="T85">CMP_CTX</text:span><text:span text:style-name="T86"> *</text:span></text:p>
            </table:table-cell>
            <table:table-cell table:style-name="Table15.A1" office:value-type="string">
              <text:p text:style-name="P211">ctx</text:p>
            </table:table-cell>
            <table:table-cell table:style-name="Table15.A1" office:value-type="string">
              <text:p text:style-name="P212"><text:span text:style-name="T91">CMP context to </text:span><text:span text:style-name="T138">use</text:span></text:p>
            </table:table-cell>
          </table:table-row>
          <text:soft-page-break/>
          <table:table-row table:style-name="Table15.1">
            <table:table-cell table:style-name="Table15.A1" office:value-type="string">
              <text:p text:style-name="P211"/>
            </table:table-cell>
            <table:table-cell table:style-name="Table15.A1" office:value-type="string">
              <text:p text:style-name="P212"><text:span text:style-name="T102">const</text:span><text:span text:style-name="T86"> </text:span><text:span text:style-name="T265">char</text:span><text:span text:style-name="T86"> *</text:span></text:p>
            </table:table-cell>
            <table:table-cell table:style-name="Table15.A1" office:value-type="string">
              <text:p text:style-name="P213">buf</text:p>
            </table:table-cell>
            <table:table-cell table:style-name="Table15.A1" office:value-type="string">
              <text:p text:style-name="P214">Pointer to buffer receiving the string output</text:p>
            </table:table-cell>
          </table:table-row>
          <table:table-row table:style-name="Table15.1">
            <table:table-cell table:style-name="Table15.A1" office:value-type="string">
              <text:p text:style-name="P211"/>
            </table:table-cell>
            <table:table-cell table:style-name="Table15.A1" office:value-type="string">
              <text:p text:style-name="P212"><text:span text:style-name="T265">size_</text:span><text:span text:style-name="T85">t</text:span></text:p>
            </table:table-cell>
            <table:table-cell table:style-name="Table15.A1" office:value-type="string">
              <text:p text:style-name="P213">bufsize</text:p>
            </table:table-cell>
            <table:table-cell table:style-name="Table15.A1" office:value-type="string">
              <text:p text:style-name="P214">Size of the buffer (including the trailing NUL character)</text:p>
            </table:table-cell>
          </table:table-row>
        </table:table>
        <text:p text:style-name="P208"/>
        <text:list xml:id="list135612302096207" text:continue-numbering="true" text:style-name="WWNum2">
          <text:list-item>
            <text:list>
              <text:list-item>
                <text:h text:style-name="P207" text:outline-level="2"><text:bookmark-start text:name="__RefHeading___Toc56613_2781851127"/>CMPclient_reinit<text:bookmark-end text:name="__RefHeading___Toc56613_2781851127"/></text:h>
              </text:list-item>
            </text:list>
          </text:list-item>
        </text:list>
        <text:p text:style-name="P215"><text:span text:style-name="T227">The </text:span>function <text:span text:style-name="T60">CMPclient_</text:span><text:span text:style-name="T54">reinit</text:span><text:span text:style-name="T60">()</text:span> <text:span text:style-name="T227">re-initializes the given CMP context. <text:s/>It must be called between any of the above activities. </text:span>Any of the pointers provided for the above <text:span text:style-name="T266">parameters like</text:span> <text:span text:style-name="T267">ctx</text:span><text:span text:style-name="T268">, </text:span><text:span text:style-name="T267">cmp_t</text:span><text:span text:style-name="T269">ruststore</text:span><text:span text:style-name="T22">, </text:span><text:span text:style-name="T269">server</text:span><text:span text:style-name="T268">, </text:span><text:span text:style-name="T270">tls</text:span><text:span text:style-name="T268">, </text:span><text:span text:style-name="T270">new_key</text:span>,<text:span text:style-name="T266"> and </text:span><text:span text:style-name="T271">subject</text:span> <text:span text:style-name="T266">may</text:span> <text:span text:style-name="T272">then </text:span>be reused <text:span text:style-name="T266">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16">Param.</text:p>
            </table:table-cell>
            <table:table-cell table:style-name="Table13.A1" office:value-type="string">
              <text:p text:style-name="P217">Type</text:p>
            </table:table-cell>
            <table:table-cell table:style-name="Table13.A1" office:value-type="string">
              <text:p text:style-name="P217">Name</text:p>
            </table:table-cell>
            <table:table-cell table:style-name="Table13.A1" office:value-type="string">
              <text:p text:style-name="P217">Meaning</text:p>
            </table:table-cell>
          </table:table-row>
          <table:table-row table:style-name="Table13.1">
            <table:table-cell table:style-name="Table13.A1" office:value-type="string">
              <text:p text:style-name="P218"/>
            </table:table-cell>
            <table:table-cell table:style-name="Table13.A1" office:value-type="string">
              <text:p text:style-name="P219"><text:span text:style-name="T85">CMP_CTX</text:span><text:span text:style-name="T86"> *</text:span></text:p>
            </table:table-cell>
            <table:table-cell table:style-name="Table13.A1" office:value-type="string">
              <text:p text:style-name="P218">ctx</text:p>
            </table:table-cell>
            <table:table-cell table:style-name="Table13.A1" office:value-type="string">
              <text:p text:style-name="P219"><text:span text:style-name="T91">CMP context to </text:span><text:bookmark text:name="_Toc5075094384"/><text:span text:style-name="T273">re-initialize</text:span></text:p>
            </table:table-cell>
          </table:table-row>
        </table:table>
        <text:h text:style-name="P220" text:outline-level="2" text:is-list-header="true"/>
        <text:list text:continue-numbering="true" text:style-name="WWNum2">
          <text:list-item>
            <text:list>
              <text:list-item>
                <text:h text:style-name="P221"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215">The function <text:span text:style-name="T60">CMPclient_finish()</text:span> deallocates the given CMP context, deallocating all internal data but not the structures passed in via the functions described before. Any of the pointers provided for the above <text:span text:style-name="T266">parameters like</text:span> <text:span text:style-name="T274">cmp_</text:span><text:span text:style-name="T269">truststore</text:span><text:span text:style-name="T22">, </text:span><text:span text:style-name="T269">tls</text:span>, <text:span text:style-name="T266">and</text:span> <text:span text:style-name="T275">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1">Param.</text:p>
            </table:table-cell>
            <table:table-cell table:style-name="Table11.A1" office:value-type="string">
              <text:p text:style-name="P82">Type</text:p>
            </table:table-cell>
            <table:table-cell table:style-name="Table11.A1" office:value-type="string">
              <text:p text:style-name="P82">Name</text:p>
            </table:table-cell>
            <table:table-cell table:style-name="Table11.A1" office:value-type="string">
              <text:p text:style-name="P82">Meaning</text:p>
            </table:table-cell>
          </table:table-row>
          <table:table-row table:style-name="Table11.1">
            <table:table-cell table:style-name="Table11.A1" office:value-type="string">
              <text:p text:style-name="P222">OPTIONAL </text:p>
            </table:table-cell>
            <table:table-cell table:style-name="Table11.A1" office:value-type="string">
              <text:p text:style-name="P84"><text:span text:style-name="T85">CMP_CTX</text:span><text:span text:style-name="T86"> *</text:span></text:p>
            </table:table-cell>
            <table:table-cell table:style-name="Table11.A1" office:value-type="string">
              <text:p text:style-name="P83">ctx</text:p>
            </table:table-cell>
            <table:table-cell table:style-name="Table11.A1" office:value-type="string">
              <text:p text:style-name="P82">CMP context to deallocate<text:bookmark text:name="_Toc507509438"/></text:p>
            </table:table-cell>
          </table:table-row>
        </table:table>
        <text:p text:style-name="P100"><text:span text:style-name="T91">Example use </text:span>(for the various <text:span text:style-name="T141">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91">:</text:span></text:p>
        <text:p text:style-name="P223"><text:s text:c="4"/>CMPclient_finish(ctx);</text:p>
        <text:p text:style-name="P223"><text:s text:c="4"/>CREDENTIALS_free(new_creds);</text:p>
        <text:p text:style-name="P223"><text:s text:c="4"/>EXTENSIONS_free(exts);</text:p>
        <text:p text:style-name="P223"><text:s text:c="4"/>KEY_free(newkey);</text:p>
        <text:p text:style-name="P223"><text:s text:c="4"/>TLS_free(tls);</text:p>
        <text:p text:style-name="P223"><text:s text:c="4"/>CREDENTIALS_free(tls_creds);</text:p>
        <text:p text:style-name="P223"><text:s text:c="4"/>STORE_free(tls_truststore);</text:p>
        <text:p text:style-name="P224"><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3"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56">When an important activity is performed or an error occurs, some more detail should be provided for debugging and auditing purposes. An application can obtain this information by providing a callback function, which is called on error with <text:span text:style-name="T117">component</text:span>, <text:span text:style-name="T117">file</text:span>, <text:span text:style-name="T276">lineno</text:span>, and<text:span text:style-name="T117"> msg</text:span> arguments that may provide a component identifier, a file path name and a line number indicating the source code location and a string describing the nature of the event. </text:p>
        <text:p text:style-name="P56">Even when an activity is successful some warnings may be useful and some degree of logging may be required. Therefore we have extended the type of the logging callback function of CMPforOpenSSL by a <text:span text:style-name="T117">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225"><text:span text:style-name="T212"><text:line-break/>typedef</text:span><text:span text:style-name="T277"> </text:span><text:span text:style-name="T212">enum</text:span><text:span text:style-name="T277"> { false </text:span><text:span text:style-name="T278">= 0</text:span><text:span text:style-name="T277">, true </text:span><text:span text:style-name="T278">= 1</text:span><text:span text:style-name="T277"> } </text:span><text:span text:style-name="T210">bool</text:span><text:span text:style-name="T277">;<text:line-break/></text:span><text:span text:style-name="T279">typedef</text:span><text:span text:style-name="T117"> </text:span><text:span text:style-name="T280">int</text:span><text:span text:style-name="T117"> </text:span><text:span text:style-name="T281">s</text:span><text:span text:style-name="T282">everity</text:span><text:span text:style-name="T276">;</text:span></text:p>
        <text:p text:style-name="P226"><text:span text:style-name="T283">#define </text:span><text:span text:style-name="T284">LOG_EMERG <text:s text:c="2"/>0</text:span></text:p>
        <text:p text:style-name="P226"><text:span text:style-name="T283">#define </text:span><text:span text:style-name="T284">LOG_ALERT <text:s text:c="2"/>1</text:span></text:p>
        <text:p text:style-name="P226"><text:span text:style-name="T283">#define </text:span><text:span text:style-name="T284">LOG_CRIT <text:s text:c="3"/>2</text:span></text:p>
        <text:p text:style-name="P226"><text:span text:style-name="T283">#define </text:span><text:span text:style-name="T284">LOG_ERR <text:s text:c="4"/>3</text:span></text:p>
        <text:p text:style-name="P226"><text:span text:style-name="T283">#define </text:span><text:span text:style-name="T284">LOG_WARNING 4</text:span></text:p>
        <text:p text:style-name="P226"><text:span text:style-name="T283">#define </text:span><text:span text:style-name="T284">LOG_NOTICE <text:s/>5</text:span></text:p>
        <text:p text:style-name="P226"><text:span text:style-name="T283">#define </text:span><text:span text:style-name="T284">LOG_INFO <text:s text:c="3"/>6</text:span></text:p>
        <text:p text:style-name="P226"><text:span text:style-name="T283">#define </text:span><text:span text:style-name="T284">LOG_DEBUG <text:s text:c="2"/>7</text:span></text:p>
        <text:p text:style-name="P226"><text:soft-page-break/><text:span text:style-name="T283">#define </text:span><text:span text:style-name="T284">LOG_TRACE <text:s text:c="2"/>8</text:span></text:p>
        <text:p text:style-name="P225"><text:span text:style-name="T285">typedef</text:span><text:span text:style-name="T276"> </text:span><text:span text:style-name="T282">bool</text:span><text:span text:style-name="T276"> </text:span><text:span text:style-name="T117">(*</text:span><text:span text:style-name="T286">LOG</text:span><text:span text:style-name="T287">_cb_t</text:span><text:span text:style-name="T117">) (</text:span><text:span text:style-name="T98">OPTIONAL</text:span><text:span text:style-name="T279"> const</text:span><text:span text:style-name="T117"> </text:span><text:span text:style-name="T280">char</text:span><text:span text:style-name="T117"> *func, </text:span></text:p>
        <text:p text:style-name="P225"><text:span text:style-name="T279"><text:s text:c="26"/></text:span><text:span text:style-name="T98">OPTIONAL</text:span><text:span text:style-name="T279"> const</text:span><text:span text:style-name="T117"> </text:span><text:span text:style-name="T280">char</text:span><text:span text:style-name="T117"> *file, </text:span><text:span text:style-name="T280">int</text:span><text:span text:style-name="T117"> lineno, </text:span></text:p>
        <text:p text:style-name="P225"><text:span text:style-name="T279"><text:s text:c="26"/></text:span><text:span text:style-name="T281">severity</text:span><text:span text:style-name="T117"> level, </text:span><text:span text:style-name="T279">const</text:span><text:span text:style-name="T117"> </text:span><text:span text:style-name="T280">char</text:span><text:span text:style-name="T117"> *msg);</text:span></text:p>
        <text:p text:style-name="HTML_20_Preformatted"/>
        <text:p text:style-name="HTML_20_Preformatted"><text:span text:style-name="T288">The </text:span><text:span text:style-name="T78">LOG_default()</text:span><text:span text:style-name="T288"> function prints more critical messages like errors and warnings to </text:span><text:span text:style-name="T289">stderr</text:span><text:span text:style-name="T288">, while less critical ones like info and debug messages are printed to </text:span><text:span text:style-name="T289">stdout</text:span><text:span text:style-name="T288">. In addition, it sends messages to </text:span><text:span text:style-name="T99">syslog</text:span><text:span text:style-name="T288">.</text:span></text:p>
        <text:p text:style-name="P227"/>
        <text:p text:style-name="HTML_20_Preformatted"><text:span text:style-name="T290"><text:s text:c="4"/></text:span><text:span text:style-name="T291">bool</text:span><text:span text:style-name="T289"> </text:span><text:span text:style-name="T292">LOG_default</text:span><text:span text:style-name="T289">(OPTIONAL </text:span><text:span text:style-name="T293">const</text:span><text:span text:style-name="T289"> </text:span><text:span text:style-name="T291">char</text:span><text:span text:style-name="T289"> *func, OPTIONAL </text:span><text:span text:style-name="T293">const</text:span><text:span text:style-name="T289"> </text:span><text:span text:style-name="T291">char</text:span><text:span text:style-name="T289"> *file, </text:span><text:span text:style-name="T291">int</text:span><text:span text:style-name="T289"> lineno, </text:span></text:p>
        <text:p text:style-name="HTML_20_Preformatted"><text:span text:style-name="T290"><text:s text:c="21"/></text:span><text:span text:style-name="T291">severity</text:span><text:span text:style-name="T294"> level, </text:span><text:span text:style-name="T293">const</text:span><text:span text:style-name="T294"> </text:span><text:span text:style-name="T291">char</text:span><text:span text:style-name="T294"> *msg);</text:span></text:p>
        <text:p text:style-name="P228"/>
        <text:p text:style-name="HTML_20_Preformatted"><text:span text:style-name="T295">The </text:span><text:span text:style-name="T292">LOG_set_verbosity()</text:span><text:span text:style-name="T295"> function sets sets the verbosity of </text:span><text:span text:style-name="T78">LOG_default()</text:span><text:span text:style-name="T295">. The </text:span><text:span text:style-name="T296">level</text:span><text:span text:style-name="T295"> parameter defines the minimal severity of messages to be output. The default is </text:span><text:span text:style-name="T296">LOG_INFO.</text:span></text:p>
        <text:p text:style-name="Standard"><text:bookmark-start text:name="_Ref507604320"/><text:span text:style-name="T291"><text:s text:c="5"/><text:line-break/> <text:s text:c="3"/>void</text:span><text:span text:style-name="T289"> </text:span><text:span text:style-name="T292">LOG_set_verbosity</text:span><text:span text:style-name="T289">(</text:span><text:span text:style-name="T291">severity</text:span><text:span text:style-name="T289"> level);</text:span></text:p>
        <text:p text:style-name="HTML_20_Preformatted"><text:span text:style-name="T297">The </text:span><text:span text:style-name="T292">LOG_set_name()</text:span><text:span text:style-name="T297"> function sets the application name printed by the default log output. The string pointed to by the </text:span><text:span text:style-name="T296">name</text:span><text:span text:style-name="T297"> parameter must not be deallocated as long as logging is used. The default is </text:span><text:span text:style-name="T298">"SecUtils"</text:span><text:span text:style-name="T297"> .</text:span></text:p>
        <text:p text:style-name="HTML_20_Preformatted"><text:span text:style-name="T291"><text:line-break/> <text:s text:c="3"/>void</text:span><text:span text:style-name="T289"> </text:span><text:span text:style-name="T292">LOG_set_name</text:span><text:span text:style-name="T289">(OPTIONAL </text:span><text:span text:style-name="T293">const</text:span><text:span text:style-name="T289"> </text:span><text:span text:style-name="T291">char</text:span><text:span text:style-name="T289"> *name);</text:span></text:p>
        <text:p text:style-name="P229"/>
        <text:p text:style-name="P230"><text:span text:style-name="T299">The </text:span><text:span text:style-name="T300">LOG()</text:span><text:span text:style-name="T299"> function logs the message specified by the parameter </text:span><text:span text:style-name="T301">fmt</text:span><text:span text:style-name="T299"> and optionally further ones as with </text:span><text:span text:style-name="T300">printf()</text:span><text:span text:style-name="T299">. The parameter </text:span><text:span text:style-name="T296">func</text:span><text:span text:style-name="T299"> optionally gives the name of the reporting function or component, the parameter </text:span><text:span text:style-name="T296">file</text:span><text:span text:style-name="T299"> optionally gives the current source file path name, the parameter </text:span><text:span text:style-name="T301">lineno</text:span><text:span text:style-name="T299"> gives the current line number or </text:span><text:span text:style-name="T296">0</text:span><text:span text:style-name="T299">, and the parameter </text:span><text:span text:style-name="T296">level</text:span><text:span text:style-name="T299"> gives the nature of the message. The function returns true </text:span><text:span text:style-name="T302">success</text:span><text:span text:style-name="T299"> and </text:span><text:span text:style-name="T302">false</text:span><text:span text:style-name="T299"> on failure.</text:span></text:p>
        <text:p text:style-name="P231"/>
        <text:p text:style-name="HTML_20_Preformatted"><text:span text:style-name="T290"><text:s text:c="4"/></text:span><text:span text:style-name="T291">bool</text:span><text:span text:style-name="T289"> </text:span><text:span text:style-name="T292">LOG</text:span><text:span text:style-name="T289">(OPTIONAL </text:span><text:span text:style-name="T293">const</text:span><text:span text:style-name="T289"> </text:span><text:span text:style-name="T291">char</text:span><text:span text:style-name="T289"> *func, OPTIONAL </text:span><text:span text:style-name="T293">const</text:span><text:span text:style-name="T289"> </text:span><text:span text:style-name="T291">char</text:span><text:span text:style-name="T289"> *file, </text:span><text:span text:style-name="T291">int</text:span><text:span text:style-name="T289"> lineno, </text:span></text:p>
        <text:p text:style-name="HTML_20_Preformatted"><text:span text:style-name="T290"><text:s text:c="13"/></text:span><text:span text:style-name="T291">severity</text:span><text:span text:style-name="T289"> level, </text:span><text:span text:style-name="T293">const</text:span><text:span text:style-name="T289"> </text:span><text:span text:style-name="T291">char</text:span><text:span text:style-name="T289"> *fmt, ...);</text:span></text:p>
        <text:p text:style-name="P231"/>
        <text:p text:style-name="P232">For convenient use of <text:span text:style-name="T300">LOG()</text:span><text:span text:style-name="T299"> the Security Utilities library </text:span><text:span text:style-name="T303">defines </text:span><text:span text:style-name="T299">various macros such as<text:line-break/></text:span></text:p>
        <text:p text:style-name="P233"><text:s text:c="4"/>#define LOG_FUNC_FILE_LINE <text:s text:c="21"/>OPENSSL_FUNC, OPENSSL_FILE, OPENSSL_LINE</text:p>
        <text:p text:style-name="P233"><text:s text:c="4"/>#define FL_ERR LOG_FUNC_FILE_LINE, LOG_ERR <text:s text:c="5"/>/* An error message. */</text:p>
        <text:p text:style-name="P233"><text:s text:c="4"/>#define FL_WARN LOG_FUNC_FILE_LINE, LOG_WARNING /* A warning message. */</text:p>
        <text:p text:style-name="P233"><text:s text:c="4"/>#define FL_INFO LOG_FUNC_FILE_LINE, LOG_INFO <text:s text:c="3"/>/* A general information message. */</text:p>
        <text:p text:style-name="P233"><text:s text:c="4"/>#define FL_DEBUG LOG_FUNC_FILE_LINE, LOG_DEBUG <text:s/>/* A message useful for debugging. */</text:p>
        <text:p text:style-name="P233"/>
        <text:p text:style-name="P234">When all CMP client activity is finished the log should be closed using the following function, which flushes any pending log output and deallocates log-related resources.</text:p>
        <text:p text:style-name="P235"/>
        <text:p text:style-name="P225"><text:span text:style-name="T280">void</text:span><text:span text:style-name="T117"> LOG_close(</text:span><text:span text:style-name="T280">void</text:span><text:span text:style-name="T117">);</text:span></text:p>
        <text:list text:continue-numbering="true" text:style-name="WWNum2">
          <text:list-item>
            <text:list>
              <text:list-item>
                <text:h text:style-name="P23" text:outline-level="2"><text:bookmark text:name="_Toc5814400"/><text:bookmark text:name="_Ref5076616761"/><text:bookmark-start text:name="__RefHeading___Toc7499_2160941350"/>Message transfer callback function<text:bookmark-end text:name="__RefHeading___Toc7499_2160941350"/></text:h>
              </text:list-item>
            </text:list>
          </text:list-item>
        </text:list>
        <text:p text:style-name="P236">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81">transfer_fn</text:span> argument of the <text:span text:style-name="T60">CMPclient_prepare()</text:span> function (see section <text:bookmark-ref text:reference-format="number" text:ref-name="_Ref507661996">3.1</text:bookmark-ref>) a non-<text:span text:style-name="T81">NULL</text:span> function pointer of type <text:span text:style-name="T110">OSSL_CMP</text:span><text:span text:style-name="T82">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87">CMP_err</text:span>. If needed, the application may also provide a further argument to the callback function, using the CMPforOpenSSL functions <text:span text:style-name="T60">OSSL_CMP_CTX_set_transfer_cb_arg()</text:span> and <text:span text:style-name="T60">OSSL_CMP_CTX_get_transfer_cb_arg()</text:span>. This API design gives full freedom for implementing whatever method of transferring methods, including file-based ones. </text:p>
        <text:p text:style-name="P237"><text:span text:style-name="T80"><text:line-break/> <text:s text:c="3"/>typedef</text:span><text:span text:style-name="T81"> </text:span><text:span text:style-name="T304">OSSL_</text:span><text:span text:style-name="T286">CMP_MSG</text:span><text:span text:style-name="T81"> *(*</text:span><text:span text:style-name="T110">OSSL_CMP</text:span><text:span text:style-name="T287">_transfer_cb_t</text:span><text:span text:style-name="T81">)(</text:span><text:span text:style-name="T287">CMP_CTX</text:span><text:span text:style-name="T81"> *ctx,<text:line-break/> <text:s text:c="47"/></text:span><text:span text:style-name="T80">const</text:span><text:span text:style-name="T81"> </text:span><text:span text:style-name="T110">OSSL_</text:span><text:span text:style-name="T287">CMP_MSG</text:span><text:span text:style-name="T81"> *req);</text:span></text:p>
        <text:list text:continue-numbering="true" text:style-name="WWNum2">
          <text:list-item>
            <text:list>
              <text:list-item>
                <text:h text:style-name="P23" text:outline-level="2"><text:bookmark-start text:name="_Toc5814401"/><text:bookmark-start text:name="_Ref517895446"/><text:bookmark-start text:name="_Ref507661684"/><text:bookmark-start text:name="__RefHeading___Toc13201_3177186546"/><text:soft-page-break/>Certificate checking callback function<text:bookmark-end text:name="_Toc5814401"/><text:bookmark-end text:name="_Ref517895446"/><text:bookmark-end text:name="_Ref507661684"/><text:bookmark-end text:name="__RefHeading___Toc13201_3177186546"/></text:h>
              </text:list-item>
            </text:list>
          </text:list-item>
        </text:list>
        <text:p text:style-name="P25">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81">certConf</text:span>’ CMP message.</text:p>
        <text:p text:style-name="P238">The CMPforOpenSSL library just checks that the public key in the new certificate matches the key used in the request. In addition one can provide via the <text:span text:style-name="T60">OSSL_CMP_CTX_set_certConf_cb()</text:span> function a function pointer of type <text:span text:style-name="T110">OSSL_CMP</text:span><text:span text:style-name="T38">_certConf_cb_t</text:span>. This callback function takes as parameters the current CMP context structure, the newly enrolled certificate to be checked, any CMP failure bits (see [RFC <text:span text:style-name="T14">98</text:span>10, section 5.2.3]) already determined by the library, and a pointer to the string result variable to which it may assign on error a string describing why it rejects the given certificate. The function shall return <text:span text:style-name="T305">0</text:span> on acceptance or CMP failure bits with indices between <text:span text:style-name="T305">0</text:span> and <text:span text:style-name="T306">OSSL_CMP_PKIFAILUREINFO_MAX</text:span> (<text:span text:style-name="T307">= </text:span><text:span text:style-name="T305">26</text:span>) indicating the reason(s) for rejection. The application may also provide a further, implicit argument to the callback function via the CMPforOpenSSL function <text:span text:style-name="T60">OSSL_CMP_CTX_set_certConf_cb arg()</text:span>. This argument can be retrieved using <text:span text:style-name="T60">OSSL_CMP_CTX_get_certConf_cb_arg()</text:span>. </text:p>
        <text:p text:style-name="P238">If the <text:span text:style-name="T142">new_cert_truststore</text:span> argument of the <text:span text:style-name="T60">CMPclient_prepare()</text:span> is not <text:span text:style-name="T81">NULL</text:span> the callback function <text:span text:style-name="T60">OSSL_CMP_certConf_cb() </text:span>provided by CMPforOpenSSL will be selected, which uses this argument as a trust store for validating the newly enrolled certificate.</text:p>
        <text:p text:style-name="P236">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39"><text:bookmark-start text:name="_Ref507661694"/><text:span text:style-name="T308"><text:line-break/> <text:s text:c="3"/>typedef</text:span><text:span text:style-name="T309"> </text:span><text:span text:style-name="T310">int</text:span><text:span text:style-name="T309"> (*</text:span><text:span text:style-name="T311">OSSL_CMP_certConf_cb_t</text:span><text:span text:style-name="T309">)(CMP_CTX *</text:span><text:span text:style-name="T312">ctx</text:span><text:span text:style-name="T309">, </text:span><text:span text:style-name="T308">const</text:span><text:span text:style-name="T309"> X509 *cert, </text:span></text:p>
        <text:p text:style-name="P239"><text:span text:style-name="T313"><text:s text:c="40"/></text:span><text:span text:style-name="T310">int</text:span><text:span text:style-name="T309"> fail_info, </text:span><text:span text:style-name="T308">const</text:span><text:span text:style-name="T309"> </text:span><text:span text:style-name="T310">char</text:span><text:span text:style-name="T309"> **txt);</text:span></text:p>
        <text:list text:continue-numbering="true" text:style-name="WWNum2">
          <text:list-item>
            <text:list>
              <text:list-item>
                <text:h text:style-name="P240"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60">Like CMPforOpenSSL, for key material and other core crypto data structures we re-use the ones defined by the underlying OpenSSL library, as far as possible, but one was missing.</text:p>
        <text:p text:style-name="P241">It is very useful to have an abstraction that combines the key material a component has for authenticating itself in a single data structure. For signature-based authentication this consists of a private key of OpenSSL type<text:span text:style-name="T117"> </text:span><text:span text:style-name="T287">EVP_PKEY</text:span>, which can refer to a key held in a hardware key store via a <text:span text:style-name="T314">crypto </text:span><text:span text:style-name="T29">provider [OpenSSL-provider] </text:span><text:span text:style-name="T314">or a </text:span><text:span text:style-name="T315">legacy </text:span>crypto engine <text:span text:style-name="T29">[OpenSSL-engine]</text:span>, the current certificate (of OpenSSL type <text:span text:style-name="T287">X509</text:span>) including the corresponding public key, and optionally the chain of its issuer certificates towards the respective root CA (of OpenSSL type <text:span text:style-name="T287">STACK_OF(X509)).</text:span> For authentication with password-based MAC (PBM) the credentials include the password and optionally a reference value that may be needed, similarly to a user name, to identify which password to use. </text:p>
        <text:p text:style-name="P55">The resulting data structure, which we call <text:span text:style-name="T287">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242"/>
        <text:p text:style-name="P243"><text:span text:style-name="T279">typedef</text:span><text:span text:style-name="T117"> </text:span><text:span text:style-name="T279">struct</text:span><text:span text:style-name="T117"> </text:span><text:span text:style-name="T287">credentials</text:span><text:span text:style-name="T117"> {</text:span></text:p>
        <text:p text:style-name="P243"><text:span text:style-name="T117"><text:s text:c="4"/>OPTIONAL</text:span><text:span text:style-name="T287"> EVP_PKEY</text:span><text:span text:style-name="T117"> *pkey;</text:span></text:p>
        <text:p text:style-name="P243"><text:span text:style-name="T117"><text:s text:c="4"/>OPTIONAL</text:span><text:span text:style-name="T287"> X509</text:span><text:span text:style-name="T117"> <text:s text:c="4"/>*cert;</text:span></text:p>
        <text:p text:style-name="P243"><text:span text:style-name="T117"><text:s text:c="4"/>OPTIONAL</text:span><text:span text:style-name="T316"> </text:span><text:span text:style-name="T287">STACK_OF(X509)</text:span><text:span text:style-name="T117"> *chain;</text:span></text:p>
        <text:p text:style-name="P244"><text:s text:c="4"/>OPTIONAL <text:span text:style-name="T317">char</text:span> *pwd;</text:p>
        <text:p text:style-name="P244"><text:s text:c="4"/>OPTIONAL <text:span text:style-name="T317">char</text:span> *pwdref;</text:p>
        <text:p text:style-name="P243"><text:span text:style-name="T117">} </text:span><text:span text:style-name="T287">CREDENTIALS</text:span><text:span text:style-name="T117">;</text:span></text:p>
        <text:p text:style-name="P245"/>
        <text:p text:style-name="P60">We define the following core functions dealing with credentials. </text:p>
        <text:p text:style-name="P246"/>
        <text:p text:style-name="P247">The function<text:span text:style-name="T318">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284">NULL</text:span> on failure (i.e., out of memory). On success the <text:span text:style-name="T319">reference counter of the</text:span> first three arguments are incremented and the last two arguments are copied. This means that the caller can deallocate all provided arguments immediately and in any case should wipe/erase the contents of the <text:span text:style-name="T320">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48">Param.</text:p>
            </table:table-cell>
            <table:table-cell table:style-name="Table12.A1" office:value-type="string">
              <text:p text:style-name="P249">Type</text:p>
            </table:table-cell>
            <table:table-cell table:style-name="Table12.A1" office:value-type="string">
              <text:p text:style-name="P249">Name</text:p>
            </table:table-cell>
            <table:table-cell table:style-name="Table12.A1" office:value-type="string">
              <text:p text:style-name="P250">Meaning</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80">const</text:span><text:span text:style-name="T81"> </text:span><text:span text:style-name="T287">EVP_PKEY</text:span><text:span text:style-name="T117"> *</text:span></text:p>
            </table:table-cell>
            <table:table-cell table:style-name="Table12.A1" office:value-type="string">
              <text:p text:style-name="P252">pkey</text:p>
            </table:table-cell>
            <table:table-cell table:style-name="Table12.A1" office:value-type="string">
              <text:p text:style-name="P253">Private key to include, which may be<text:line-break/><text:span text:style-name="T29">from</text:span> a <text:span text:style-name="T29">provider </text:span><text:span text:style-name="T314">or </text:span><text:span text:style-name="T315">legacy </text:span><text:span text:style-name="T29">crypto </text:span>engine</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80">const</text:span><text:span text:style-name="T81"> </text:span><text:span text:style-name="T287">X509</text:span><text:span text:style-name="T117"> *</text:span></text:p>
            </table:table-cell>
            <table:table-cell table:style-name="Table12.A1" office:value-type="string">
              <text:p text:style-name="P252">cert</text:p>
            </table:table-cell>
            <table:table-cell table:style-name="Table12.A1" office:value-type="string">
              <text:p text:style-name="P249">Related certificate to include</text:p>
            </table:table-cell>
          </table:table-row>
          <table:table-row table:style-name="Table12.1">
            <table:table-cell table:style-name="Table12.A1" office:value-type="string">
              <text:p text:style-name="P251">OPTIONAL </text:p>
            </table:table-cell>
            <table:table-cell table:style-name="Table12.A1" office:value-type="string">
              <text:p text:style-name="P249"><text:span text:style-name="T80">const</text:span><text:span text:style-name="T81"> </text:span><text:span text:style-name="T287">STACK_OF(X509)</text:span><text:span text:style-name="T117"> *</text:span></text:p>
            </table:table-cell>
            <table:table-cell table:style-name="Table12.A1" office:value-type="string">
              <text:p text:style-name="P252">chain</text:p>
            </table:table-cell>
            <table:table-cell table:style-name="Table12.A1" office:value-type="string">
              <text:p text:style-name="P249">Chain of the given certificate</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80">const</text:span><text:span text:style-name="T81"> </text:span><text:span text:style-name="T287">char *</text:span></text:p>
            </table:table-cell>
            <table:table-cell table:style-name="Table12.A1" office:value-type="string">
              <text:p text:style-name="P252">pwd</text:p>
            </table:table-cell>
            <table:table-cell table:style-name="Table12.A1" office:value-type="string">
              <text:p text:style-name="P249">Password to use for PBM etc.</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80">const</text:span><text:span text:style-name="T81"> </text:span><text:span text:style-name="T287">char *</text:span></text:p>
            </table:table-cell>
            <table:table-cell table:style-name="Table12.A1" office:value-type="string">
              <text:p text:style-name="P252">pwdref</text:p>
            </table:table-cell>
            <table:table-cell table:style-name="Table12.A1" office:value-type="string">
              <text:p text:style-name="P249">Reference for identifying the password</text:p>
            </table:table-cell>
          </table:table-row>
        </table:table>
        <text:p text:style-name="P254"/>
        <text:p text:style-name="P254">The function<text:span text:style-name="T318"> CREDENTIALS_free()</text:span><text:span text:style-name="T321"> takes a pointer to a credentials structure when not needed any more, deallocates its components (using among others </text:span><text:span text:style-name="T318">KEY_free()</text:span><text:span text:style-name="T321">, which wipes the private key, and </text:span><text:span text:style-name="T318">OPENSSL_cleanse()</text:span><text:span text:style-name="T321"> to wipe the secret/password), and then deallocates the structure itself. It has no return value.</text:span></text:p>
        <text:p text:style-name="P255"/>
        <text:p text:style-name="P254"><text:span text:style-name="T322"><text:s text:c="4"/></text:span><text:span text:style-name="T323">void</text:span><text:span text:style-name="T324"> CREDENTIALS_free</text:span><text:span text:style-name="T325">(</text:span><text:span text:style-name="T326">OPTIONAL</text:span><text:span text:style-name="T325"> </text:span><text:span text:style-name="T327">CREDENTIALS</text:span><text:span text:style-name="T325"> *creds);</text:span></text:p>
        <text:p text:style-name="P235"/>
        <text:p text:style-name="P60">Since the <text:span text:style-name="T287">CREDENTIALS</text:span><text:span text:style-name="T117"> </text:span>data type is opaque some selector functions are needed:<text:line-break/><text:bookmark-start text:name="_Ref507602564"/></text:p>
        <text:p text:style-name="HTML_20_Preformatted"><text:span text:style-name="T328"><text:s text:c="4"/></text:span><text:span text:style-name="T323">X509</text:span><text:span text:style-name="T328"> *</text:span><text:span text:style-name="T329">CREDENTIALS_get_cert</text:span><text:span text:style-name="T328">(</text:span><text:span text:style-name="T330">const</text:span><text:span text:style-name="T328"> </text:span><text:span text:style-name="T323">CREDENTIALS</text:span><text:span text:style-name="T328"> *creds);</text:span></text:p>
        <text:p text:style-name="HTML_20_Preformatted"><text:span text:style-name="T328"><text:s text:c="4"/></text:span><text:span text:style-name="T323">STACK_OF(X509)</text:span><text:span text:style-name="T328"> *</text:span><text:span text:style-name="T329">CREDENTIALS_get_chain</text:span><text:span text:style-name="T328">(</text:span><text:span text:style-name="T330">const</text:span><text:span text:style-name="T328"> </text:span><text:span text:style-name="T323">CREDENTIALS</text:span><text:span text:style-name="T328"> *creds);</text:span></text:p>
        <text:list text:continue-numbering="true" text:style-name="WWNum2">
          <text:list-item>
            <text:h text:style-name="P54"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3" text:outline-level="2"><text:bookmark-start text:name="_Toc5814404"/><text:bookmark-start text:name="_Ref507659178"/><text:bookmark-start text:name="_Ref507659007"/><text:bookmark-start text:name="__RefHeading___Toc13205_3177186546"/><text:span text:style-name="T331">CREDENTIALS helpers</text:span><text:bookmark-end text:name="_Toc5814404"/><text:bookmark-end text:name="_Ref507659178"/><text:bookmark-end text:name="_Ref507659007"/><text:span text:style-name="T331">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87">CREDENTIALS</text:span> structure can be easily and conveniently managed in a single PKCS#12 structure. Other formats, such as PEM, are partially supported.</text:p>
        <text:p text:style-name="P256">The function <text:span text:style-name="T60">CREDENTIALS_load()</text:span> reads from the file given in the <text:span text:style-name="T98">certs</text:span> argument (if not <text:span text:style-name="T107">NULL</text:span>) the primary certificate, which is taken as the <text:span text:style-name="T117">cert</text:span> component, plus any further ones, which are taken as the <text:span text:style-name="T117">chain</text:span> component. <text:s/>In case the <text:span text:style-name="T98">source</text:span> argument is <text:span text:style-name="T211">NULL</text:span> or begins with <text:span text:style-name="T332">“pass:”,</text:span> it reads the private key from the file given in the <text:span text:style-name="T98">key</text:span> argument (if not <text:span text:style-name="T107">NULL</text:span>), where the <text:span text:style-name="T98">source</text:span> argument may refer to a password in the form <text:span text:style-name="T332">“pass:&lt;pwd&gt;”</text:span> that may be needed to decrypt the file contents including the private key. If the <text:span text:style-name="T98">certs</text:span> and <text:span text:style-name="T98">key</text:span> arguments are equal the credentials are jointly read from the same file, which is expected in PKCS#12 format, else for each file the <text:span text:style-name="Internet_20_link"><text:span text:style-name="T333">format may be PEM, PKCS#12, or ASN.1 (DER)</text:span></text:span>. In case the <text:span text:style-name="T98">source</text:span> argument begins with <text:span text:style-name="T332">“engine:”,</text:span> it loads a reference to the private key with the identifier given in the <text:span text:style-name="T98">key</text:span> argument, where the rest of the <text:span text:style-name="T98">source</text:span> argument gives the identifier of the <text:span text:style-name="T315">legacy </text:span>crypto engine to use (while the remaining credentials components are loaded from the file without decrypting it). The respective crypto engine must already have been parameterized and initialized in an engine-specific way with the <text:span text:style-name="T315">respective legacy</text:span> OpenSSL mechanisms. <text:span text:style-name="T314">These</text:span> are described for instance in <text:span text:style-name="T334">[</text:span><text:span text:style-name="T335">OpenSSL-engine</text:span><text:span text:style-name="T334">] </text:span><text:span text:style-name="T336">and a</text:span><text:span text:style-name="T337">re removed with </text:span><text:span text:style-name="T336">OpenSSL 4.0</text:span><text:span text:style-name="Internet_20_link"><text:span text:style-name="T338">.</text:span></text:span></text:p>
        <text:p text:style-name="Standard">The function internally calls <text:span text:style-name="T318">CREDENTIALS_new()</text:span> to construct a <text:span text:style-name="T287">CREDENTIALS</text:span> structure and returns the pointer to it on success, or <text:span text:style-name="T339">NULL</text:span> otherwise. In case of errors optionally the string held in the optional <text:span text:style-name="T98">desc</text:span> parameter is used for forming more descriptive error messages. </text:p>
        <text:p text:style-name="P257"><text:span text:style-name="T85">CREDENTIALS</text:span><text:span text:style-name="T86"> *</text:span><text:span text:style-name="T340">CREDENTIALS_load</text:span><text:span text:style-name="T86">(</text:span><text:span text:style-name="T341">OPTIONAL </text:span><text:span text:style-name="T102">const</text:span><text:span text:style-name="T86"> </text:span><text:span text:style-name="T85">char</text:span><text:span text:style-name="T86"> *certs, </text:span><text:span text:style-name="T341">OPTIONAL </text:span><text:span text:style-name="T102">const</text:span><text:span text:style-name="T86"> </text:span><text:span text:style-name="T85">char</text:span><text:span text:style-name="T86"> *key,</text:span></text:p>
        <text:p text:style-name="P257"><text:span text:style-name="T86"><text:s text:c="30"/></text:span><text:span text:style-name="T341">OPTIONAL </text:span><text:span text:style-name="T102">const</text:span><text:span text:style-name="T86"> </text:span><text:span text:style-name="T85">char</text:span><text:span text:style-name="T86"> *source, </text:span><text:span text:style-name="T341">OPTIONAL </text:span><text:span text:style-name="T102">const</text:span><text:span text:style-name="T86"> </text:span><text:span text:style-name="T85">char</text:span><text:span text:style-name="T86"> *desc);</text:span></text:p>
        <text:p text:style-name="Standard">Example use for certificates and a private key read from a PKCS#12 file:</text:p>
        <text:p text:style-name="P46"><text:span text:style-name="T107"><text:s text:c="4"/></text:span><text:span text:style-name="T342">const</text:span><text:span text:style-name="T107"> </text:span><text:span text:style-name="T343">char</text:span><text:span text:style-name="T107"> *certs = "certs/cmp_signer.p12";</text:span></text:p>
        <text:p text:style-name="P46"><text:span text:style-name="T107"><text:s text:c="4"/></text:span><text:span text:style-name="T342">const</text:span><text:span text:style-name="T107"> </text:span><text:span text:style-name="T343">char</text:span><text:span text:style-name="T107"> *key = certs;</text:span></text:p>
        <text:p text:style-name="P46"><text:span text:style-name="T107"><text:s text:c="4"/></text:span><text:span text:style-name="T342">const</text:span><text:span text:style-name="T107"> </text:span><text:span text:style-name="T343">char</text:span><text:span text:style-name="T107"> *source = "pass:12345";</text:span></text:p>
        <text:p text:style-name="P46"><text:span text:style-name="T107"><text:s text:c="4"/></text:span><text:span text:style-name="T342">const</text:span><text:span text:style-name="T107"> </text:span><text:span text:style-name="T343">char</text:span><text:span text:style-name="T107"> *desc = "credentials for CMP level"</text:span></text:p>
        <text:p text:style-name="P163"><text:span text:style-name="T107"><text:s text:c="4"/></text:span><text:span text:style-name="T343">CREDENTIALS</text:span><text:span text:style-name="T107"> *creds = CREDENTIALS_load(certs, key, source, desc</text:span><text:span text:style-name="T344">);</text:span></text:p>
        <text:p text:style-name="Standard">Example use where the private key is held in HW and its reference is loaded via PKCS#11 <text:span text:style-name="T315">using a legacy crypto engine</text:span> (while the actual key is held, e.g., on a smart card or a TPM chip):</text:p>
        <text:p text:style-name="P258"><text:span text:style-name="T345"><text:s text:c="4"/></text:span><text:span text:style-name="T346">const</text:span><text:span text:style-name="T345"> </text:span><text:span text:style-name="T347">char</text:span><text:span text:style-name="T345"> *tls_certs = "certs/tls.p12";</text:span></text:p>
        <text:p text:style-name="P258"><text:span text:style-name="T345"><text:s text:c="4"/></text:span><text:span text:style-name="T346">const</text:span><text:span text:style-name="T345"> </text:span><text:span text:style-name="T347">char</text:span><text:span text:style-name="T345"> *tls_pkey = "my-key-ID;type=private;pin-value=1234";</text:span></text:p>
        <text:p text:style-name="P258"><text:span text:style-name="T345"><text:s text:c="4"/></text:span><text:span text:style-name="T346">const</text:span><text:span text:style-name="T345"> </text:span><text:span text:style-name="T347">char</text:span><text:span text:style-name="T345"> *tls_source = "engine:pkcs11";</text:span></text:p>
        <text:p text:style-name="P258"><text:span text:style-name="T345"><text:s text:c="4"/></text:span><text:span text:style-name="T346">const</text:span><text:span text:style-name="T345"> </text:span><text:span text:style-name="T347">char</text:span><text:span text:style-name="T345"> *tls_desc = "credentials for TLS level"</text:span></text:p>
        <text:p text:style-name="P258"><text:span text:style-name="T345"><text:s text:c="4"/></text:span><text:span text:style-name="T347">CREDENTIALS</text:span><text:span text:style-name="T345"> *tls_creds = CREDENTIALS_load(tls_certs, tls_pkey, tls_source,</text:span></text:p>
        <text:p text:style-name="P259"><text:s text:c="20"/><text:span text:style-name="T348">f</text:span> <text:s text:c="25"/>tls_desc);</text:p>
        <text:p text:style-name="Standard"/>
        <text:p text:style-name="P260">The function <text:span text:style-name="T60">CREDENTIALS_save()</text:span> writes the certificate components of the given credentials data structure <text:span text:style-name="T129">creds</text:span> to the file given as the <text:span text:style-name="T98">certs</text:span> argument (unless it is <text:span text:style-name="T98">null</text:span>). If the <text:span text:style-name="T332">certs</text:span> and <text:span text:style-name="T332">key</text:span> arguments are equal the certificates and the private key are written jointly to the same PKCS#12 file, else they are written to PEM files (where the certificates are not encrypted). In case the <text:span text:style-name="T98">source</text:span> argument is <text:span text:style-name="T211">NULL</text:span> or begins with <text:span text:style-name="T332">“pass:”,</text:span> it stores the private key in the given <text:span text:style-name="T98">key</text:span> file (unless it is <text:span text:style-name="T98">null</text:span>). , where the <text:span text:style-name="T98">source</text:span> argument may refer to a password in the form <text:span text:style-name="T332">“pass:&lt;pwd&gt;”</text:span> that is then used to encrypt the private key (together with the related certificates when stored jointly in a PKCS#12 file) before storing it. In case the <text:span text:style-name="T98">source</text:span> argument begins with <text:span text:style-name="T332">“engine:”,</text:span> it assumes that the private key is held in a <text:span text:style-name="T315">legacy </text:span>crypto engine and there is no need and neither a possibility for it to save the key (nor to encrypt the related certificates written to a file). The function returns <text:span text:style-name="T339">true</text:span> on success and <text:span text:style-name="T339">false</text:span> otherwise. In case of errors optionally the string held in the optional <text:span text:style-name="T98">desc</text:span> parameter is used for forming error messages.</text:p>
        <text:p text:style-name="P261"><text:span text:style-name="T106">bool</text:span><text:span text:style-name="T86"> </text:span><text:span text:style-name="T340">CREDENTIALS_save</text:span><text:span text:style-name="T86">(</text:span><text:span text:style-name="T341">OPTIONAL </text:span><text:span text:style-name="T102">const</text:span><text:span text:style-name="T86"> </text:span><text:span text:style-name="T85">CREDENTIALS</text:span><text:span text:style-name="T86"> *creds,</text:span></text:p>
        <text:p text:style-name="P261"><text:span text:style-name="T106"><text:s text:c="21"/></text:span><text:span text:style-name="T86"><text:s/></text:span><text:span text:style-name="T341">OPTIONAL </text:span><text:span text:style-name="T102">const</text:span><text:span text:style-name="T86"> </text:span><text:span text:style-name="T85">char</text:span><text:span text:style-name="T86"> *certs, </text:span><text:span text:style-name="T341">OPTIONAL </text:span><text:span text:style-name="T102">const</text:span><text:span text:style-name="T86"> </text:span><text:span text:style-name="T85">char</text:span><text:span text:style-name="T86"> *key,</text:span></text:p>
        <text:p text:style-name="P262"><text:span text:style-name="T86"><text:s text:c="22"/></text:span><text:span text:style-name="T341">OPTIONAL </text:span><text:span text:style-name="T102">const</text:span><text:span text:style-name="T86"> </text:span><text:span text:style-name="T85">char</text:span><text:span text:style-name="T86"> *source, </text:span><text:span text:style-name="T341">OPTIONAL </text:span><text:span text:style-name="T102">const</text:span><text:span text:style-name="T86"> </text:span><text:span text:style-name="T85">char</text:span><text:span text:style-name="T86"> *desc);</text:span></text:p>
        <text:p text:style-name="Standard">An example use has already been given in section <text:bookmark-ref text:reference-format="number" text:ref-name="_Ref507616602">3.4</text:bookmark-ref>.</text:p>
        <text:p text:style-name="Standard"><text:span text:style-name="T349">F</text:span>unctions for loading and storing individual certificates and for loading CSRs <text:span text:style-name="T350">and CRLs</text:span>:</text:p>
        <text:p text:style-name="HTML_20_Preformatted"><text:span text:style-name="T351"><text:s text:c="4"/>X509 </text:span><text:span text:style-name="T352">*</text:span><text:span text:style-name="T300">CERT_load</text:span><text:span text:style-name="T352">(</text:span><text:span text:style-name="T135">const</text:span><text:span text:style-name="T352"> </text:span><text:span text:style-name="T351">char </text:span><text:span text:style-name="T352">*file, OPTIONAL </text:span><text:span text:style-name="T135">const</text:span><text:span text:style-name="T352"> </text:span><text:span text:style-name="T351">char </text:span><text:span text:style-name="T352">*pass, OPTIONAL </text:span><text:span text:style-name="T135">const</text:span><text:span text:style-name="T352"> </text:span><text:span text:style-name="T351">char </text:span><text:span text:style-name="T352">*desc);</text:span></text:p>
        <text:p text:style-name="HTML_20_Preformatted"><text:span text:style-name="T351"><text:s text:c="4"/>bool</text:span><text:span text:style-name="T352"> </text:span><text:span text:style-name="T300">CERT_save</text:span><text:span text:style-name="T352">(</text:span><text:span text:style-name="T135">const</text:span><text:span text:style-name="T352"> </text:span><text:span text:style-name="T351">X509 </text:span><text:span text:style-name="T352">*cert, </text:span><text:span text:style-name="T135">const</text:span><text:span text:style-name="T352"> </text:span><text:span text:style-name="T351">char </text:span><text:span text:style-name="T352">*file, OPTIONAL </text:span><text:span text:style-name="T135">const</text:span><text:span text:style-name="T352"> </text:span><text:span text:style-name="T351">char </text:span><text:span text:style-name="T352">*desc);</text:span></text:p>
        <text:p text:style-name="P263"><text:span text:style-name="T291"><text:s text:c="4"/>X509_REQ</text:span><text:span text:style-name="T352"> *</text:span><text:span text:style-name="T300">CSR_load</text:span><text:span text:style-name="T352">(</text:span><text:span text:style-name="T135">const</text:span><text:span text:style-name="T352"> </text:span><text:span text:style-name="T351">char</text:span><text:span text:style-name="T352"> *file, OPTIONAL </text:span><text:span text:style-name="T135">const</text:span><text:span text:style-name="T352"> </text:span><text:span text:style-name="T351">char</text:span><text:span text:style-name="T352"> *desc);<text:line-break/> <text:s text:c="3"/></text:span><text:span text:style-name="T291">X509_</text:span><text:span text:style-name="T353">CRL</text:span><text:span text:style-name="T354"> *</text:span><text:span text:style-name="T355">CRL_</text:span><text:span text:style-name="T300">load</text:span><text:span text:style-name="T354">(</text:span><text:span text:style-name="T135">const</text:span><text:span text:style-name="T354"> </text:span><text:span text:style-name="T356">char</text:span><text:span text:style-name="T354"> *file, </text:span><text:span text:style-name="T357">int</text:span><text:span text:style-name="T354"> total_timeout, OPTIONAL </text:span><text:span text:style-name="T135">const</text:span><text:span text:style-name="T354"> </text:span><text:span text:style-name="T356">char</text:span><text:span text:style-name="T354"> *desc);</text:span></text:p>
        <text:p text:style-name="P264"/>
        <text:p text:style-name="Standard"><text:span text:style-name="T358">When storing a certificate in a file with the given name the format is determined from the file name extension and can be PEM, DER, or PKCS#12. In case of errors the string held in the optional </text:span><text:span text:style-name="T359">desc</text:span><text:span text:style-name="T358"> parameter is used for forming more descriptive error messages.</text:span></text:p>
        <text:p text:style-name="P265">Functions for loading and saving lists of certificates are described below.</text:p>
        <text:list xml:id="list135612303991603" text:continue-numbering="true" text:style-name="WWNum2">
          <text:list-item>
            <text:list>
              <text:list-item>
                <text:h text:style-name="P23" text:outline-level="2"><text:bookmark-start text:name="_Ref507659168"/><text:bookmark-start text:name="_Toc5814405"/><text:bookmark-start text:name="__RefHeading___Toc13207_3177186546"/><text:span text:style-name="T360">X509</text:span><text:span text:style-name="T361">_</text:span><text:span text:style-name="T331">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287">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66">The function <text:span text:style-name="T60">STORE_load()</text:span> sets up a new trust store with the certificates held in the PEM, DER, or PKCS#12 file(s) with the comma-separated list of names given as the <text:span text:style-name="T98">trusted_certs</text:span> argument. It enables diagnostic output in the log that is very helpful for debugging in case certificate verification fails. It does not enable certificate status checks. <text:span text:style-name="T349">Specific OpenSSL certificate verification parameters may be given in the </text:span><text:span text:style-name="T362">vpm</text:span><text:span text:style-name="T349"> parameter. </text:span>The function returns the pointer to the constructed trust store on success, or <text:span text:style-name="T339">NULL</text:span> otherwise. In case of errors the string held in the optional <text:span text:style-name="T98">desc</text:span> parameter is used for forming error messages. </text:p>
        <text:p text:style-name="P267"><text:span text:style-name="T85">X509_STORE</text:span><text:span text:style-name="T86"> *</text:span><text:span text:style-name="T340">STORE_load</text:span><text:span text:style-name="T86">(</text:span><text:span text:style-name="T102">const</text:span><text:span text:style-name="T86"> </text:span><text:span text:style-name="T85">char</text:span><text:span text:style-name="T86"> *trusted_certs, </text:span><text:span text:style-name="T341">OPTIONAL </text:span><text:span text:style-name="T102">const</text:span><text:span text:style-name="T86"> </text:span><text:span text:style-name="T85">char</text:span><text:span text:style-name="T86"> *desc,</text:span></text:p>
        <text:p text:style-name="P267"><text:span text:style-name="T86"><text:s text:c="23"/></text:span><text:span text:style-name="T298">OPTIONAL </text:span><text:span text:style-name="T363">X509_VERIFY_PARAM</text:span><text:span text:style-name="T298"> *vpm</text:span><text:span text:style-name="T86">);</text:span></text:p>
        <text:p text:style-name="Standard">Example use:</text:p>
        <text:p text:style-name="P268"><text:span text:style-name="T81"><text:s text:c="4"/></text:span><text:span text:style-name="T80">const</text:span><text:span text:style-name="T81"> </text:span><text:span text:style-name="T82">char</text:span><text:span text:style-name="T81"> *trusted_certs = "certs/trusted/RootCAv10.crt,</text:span><text:span text:style-name="T364">trusted2.crt</text:span><text:span text:style-name="T81">";</text:span></text:p>
        <text:p text:style-name="P269"><text:span text:style-name="T81"><text:s text:c="4"/></text:span><text:span text:style-name="T80">const</text:span><text:span text:style-name="T81"> </text:span><text:span text:style-name="T82">char</text:span><text:span text:style-name="T81"> *desc = "trusted certs for CMP level";<text:line-break/> <text:s text:c="3"/></text:span><text:span text:style-name="T287">X509_STORE</text:span><text:span text:style-name="T81"> *truststore = STORE_load(trusted_certs, </text:span><text:span text:style-name="T341">OPTIONAL </text:span><text:span text:style-name="T81">desc, </text:span><text:span text:style-name="T365">NULL</text:span><text:span text:style-name="T81">);</text:span></text:p>
        <text:p text:style-name="P270">The function <text:span text:style-name="T60">CERTS_load()</text:span> loads the certificate(s) held in the PEM, DER, or PKCS#12 file(s) with the comma-separated list of file names in the <text:span text:style-name="T98">files</text:span> argument and returns the pointer to the loaded list of certificates on success, or <text:span text:style-name="T339">NULL</text:span> otherwise. These certificates can be used as auxiliary untrusted certs when constructing a <text:span text:style-name="T366">CMP_CTX</text:span> <text:s/>or <text:span text:style-name="T366">TLS_CTX</text:span>. <text:span text:style-name="T349">The </text:span><text:span text:style-name="T367">type_CA</text:span><text:span text:style-name="T349"> parameter specifies the required certificate type: </text:span><text:span text:style-name="T368">1</text:span><text:span text:style-name="T349"> for CA certificates, </text:span><text:span text:style-name="T368">0</text:span><text:span text:style-name="T349"> for EE certificates, or </text:span><text:span text:style-name="T368">-1</text:span><text:span text:style-name="T349"> for no restriction. Specific verification parameters may be given via </text:span><text:span text:style-name="T362">vpm</text:span><text:span text:style-name="T349">. </text:span>In case of errors the string held in the optional <text:span text:style-name="T98">desc</text:span> parameter is used for forming more descriptive error messages.</text:p>
        <text:p text:style-name="P271"><text:soft-page-break/><text:span text:style-name="T287">STACK_OF(X509)</text:span><text:span text:style-name="T369"> *</text:span><text:span text:style-name="T300">CERTS_load</text:span><text:span text:style-name="T369">(</text:span><text:span text:style-name="T212">const</text:span><text:span text:style-name="T77"> </text:span><text:span text:style-name="T210">char</text:span><text:span text:style-name="T77"> </text:span><text:span text:style-name="T369">*files, OPTIONAL</text:span><text:span text:style-name="T370"> </text:span><text:span text:style-name="T212">const</text:span><text:span text:style-name="T77"> </text:span><text:span text:style-name="T210">char</text:span><text:span text:style-name="T77"> </text:span><text:span text:style-name="T369">*desc</text:span><text:span text:style-name="T371">,<text:line-break/> <text:s text:c="26"/></text:span><text:span text:style-name="T372">int</text:span><text:span text:style-name="T371"> type_CA, OPTIONAL </text:span><text:span text:style-name="T363">const</text:span><text:span text:style-name="T371"> </text:span><text:span text:style-name="T372">X509_VERIFY_PARAM</text:span><text:span text:style-name="T371"> *vpm</text:span><text:span text:style-name="T369">);</text:span></text:p>
        <text:p text:style-name="P272"><text:span text:style-name="T373">The function </text:span><text:span text:style-name="T374">CERTS_save()</text:span><text:span text:style-name="T373"> stores the given certificate(s) in a file with the given name, where the format is determined from the file name extension and can be PEM, DER, or PKCS#12. In case of errors the string held in the optional </text:span><text:span text:style-name="T359">desc</text:span><text:span text:style-name="T373"> parameter is used for forming more descriptive error messages.</text:span></text:p>
        <text:p text:style-name="P273"/>
        <text:p text:style-name="HTML_20_Preformatted"><text:span text:style-name="T291"><text:s text:c="4"/>int</text:span><text:span text:style-name="T375"> </text:span><text:span text:style-name="T300">CERTS_save</text:span><text:span text:style-name="T375">(</text:span><text:span text:style-name="T135">const</text:span><text:span text:style-name="T375"> </text:span><text:span text:style-name="T291">STACK_OF(X509)</text:span><text:span text:style-name="T375"> *certs, </text:span><text:span text:style-name="T135">const</text:span><text:span text:style-name="T375"> </text:span><text:span text:style-name="T291">char</text:span><text:span text:style-name="T375"> *file, OPTIONAL </text:span><text:span text:style-name="T135">const</text:span><text:span text:style-name="T375"> </text:span><text:span text:style-name="T291">char</text:span><text:span text:style-name="T375"> *desc);</text:span></text:p>
        <text:p text:style-name="P274"/>
        <text:p text:style-name="P275"><text:span text:style-name="T91">The function </text:span><text:span text:style-name="T340">CERTS_free()</text:span><text:span text:style-name="T91"> deallocates any given list of certificates. It has no return value.</text:span></text:p>
        <text:p text:style-name="P276"><text:span text:style-name="T85"><text:s/>void</text:span><text:span text:style-name="T86"> </text:span><text:span text:style-name="T340">CERTS_free</text:span><text:span text:style-name="T86">(</text:span><text:span text:style-name="T341">OPTIONAL</text:span><text:span text:style-name="T85"> </text:span><text:span text:style-name="T366">STACK_OF(X509)</text:span><text:span text:style-name="T86"> *certs);</text:span></text:p>
        <text:p text:style-name="P277">The function <text:span text:style-name="T60">CRLs_load()</text:span> loads the CRL(s) held in the DER or PEM file(s) with the comma-separated list of file names in the <text:span text:style-name="T98">files</text:span> argument and returns the loaded list of CRLs on success, or <text:span text:style-name="T339">NULL</text:span> otherwise. The <text:span text:style-name="T289">timeout</text:span> parameter specifies the number of seconds an HTTP transaction (if needed) may take, or <text:span text:style-name="T289">0</text:span> for infinite or <text:span text:style-name="T289">-1</text:span> for default. In case of errors the string held in the optional <text:span text:style-name="T98">desc</text:span> parameter is used for forming more descriptive error messages.</text:p>
        <text:p text:style-name="P278"/>
        <text:p text:style-name="P279"><text:span text:style-name="T287">STACK_OF(X509_CRL)</text:span><text:span text:style-name="T370"> *CRLs_load(</text:span><text:span text:style-name="T212">const</text:span><text:span text:style-name="T77"> </text:span><text:span text:style-name="T210">char</text:span><text:span text:style-name="T77"> </text:span><text:span text:style-name="T370">*files,</text:span><text:span text:style-name="T376"> </text:span><text:span text:style-name="T377">int </text:span><text:span text:style-name="T376">timeout,</text:span><text:span text:style-name="T370"> OPTIONAL </text:span><text:span text:style-name="T212">const</text:span><text:span text:style-name="T77"> </text:span><text:span text:style-name="T210">char</text:span><text:span text:style-name="T77"> </text:span><text:span text:style-name="T370">*desc);</text:span></text:p>
        <text:p text:style-name="P69"><text:span text:style-name="T91">The function </text:span><text:span text:style-name="T378">STORE_add_crls</text:span><text:span text:style-name="T379">()</text:span><text:span text:style-name="T91"> adds an optional list of CRLs to the given trust store and enables CRL-based status checks for end-entity certificates.</text:span></text:p>
        <text:p text:style-name="P280"><text:span text:style-name="T380">bool</text:span><text:span text:style-name="T105"> </text:span><text:span text:style-name="T378">STORE_add_crls</text:span><text:span text:style-name="T105">(</text:span><text:span text:style-name="T380">X509_STORE</text:span><text:span text:style-name="T105"> *truststore, OPTIONAL </text:span><text:span text:style-name="T95">const</text:span><text:span text:style-name="T105"> </text:span><text:span text:style-name="T366">STACK_OF(X509_CRL)</text:span><text:span text:style-name="T105"> *crls);</text:span></text:p>
        <text:p text:style-name="P275"><text:span text:style-name="T91">The function </text:span><text:span text:style-name="T340">CRLs_free()</text:span><text:span text:style-name="T91"> deallocates any given list of CRLs. It has no return value.</text:span></text:p>
        <text:p text:style-name="P257"><text:span text:style-name="T85">void</text:span><text:span text:style-name="T86"> </text:span><text:span text:style-name="T340">CRLs_free</text:span><text:span text:style-name="T86">(</text:span><text:span text:style-name="T341">OPTIONAL</text:span><text:span text:style-name="T85"> </text:span><text:span text:style-name="T366">STACK_OF(X509_CRL)</text:span><text:span text:style-name="T86"> *crls);</text:span></text:p>
        <text:p text:style-name="P281">The function <text:span text:style-name="T60">STORE_set_parameters()</text:span> sets various optional verification parameters in the given trust store <text:span text:style-name="T381">truststore</text:span>; in more detail, it</text:p>
        <text:list text:style-name="WWNum3">
          <text:list-item>
            <text:p text:style-name="P282">takes over any given OpenSSL certificate verification parameters <text:span text:style-name="T98">vpm</text:span></text:p>
          </text:list-item>
          <text:list-item>
            <text:p text:style-name="P282">demands certificate status checks in case any of the OCSP- or CRL-related options is set. If in addition the <text:span text:style-name="T98">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82">enables OCSP stapling, which makes sense only for TLS, if <text:span text:style-name="T98">try_stapling</text:span> is set</text:p>
          </text:list-item>
          <text:list-item>
            <text:p text:style-name="P282">adds CRLs provided in the <text:span text:style-name="T98">crls</text:span> argument and in this case enables CRL-based checks,</text:p>
          </text:list-item>
          <text:list-item>
            <text:p text:style-name="P282">enables CRL-based checks in case us<text:span text:style-name="T349">ing</text:span> CDP entries in certificates is enabled via the <text:span text:style-name="T98">use_CDP</text:span> argument or a static list of comma-separated URLs for fetching CRLs is given as the <text:span text:style-name="T98">cdps</text:span> argument (used as fallback) where the <text:span text:style-name="T382">crls_timeout</text:span> parameter gives the number of seconds fetching a CRL may take, or <text:span text:style-name="T382">0</text:span> for infinite or <text:span text:style-name="T382">-1</text:span> for default (= <text:span text:style-name="T382">10</text:span>), and</text:p>
          </text:list-item>
          <text:list-item>
            <text:p text:style-name="P282">enables fetching OCSP responses in case the use of AIA OCSP entries in certificates is enabled via the <text:span text:style-name="T98">use_AIA</text:span> argument or a static list of comma-separated OCSP responder URLs is given as the <text:span text:style-name="T98">ocsp</text:span> argument (which is used as fallback) where the <text:span text:style-name="T382">ocsp_timeout</text:span> parameter gives the number of seconds fetching an OCSP response may take, or <text:span text:style-name="T382">0</text:span> for infinite or <text:span text:style-name="T382">-1</text:span> for default (= <text:span text:style-name="T382">10</text:span>).</text:p>
          </text:list-item>
        </text:list>
        <text:p text:style-name="Standard">The function returns <text:span text:style-name="T339">true</text:span> on success and <text:span text:style-name="T339">false</text:span> otherwise.</text:p>
        <text:p text:style-name="P283"><text:span text:style-name="T106">bool</text:span><text:span text:style-name="T86"> </text:span><text:span text:style-name="T340">STORE_set_parameters</text:span><text:span text:style-name="T86">(</text:span><text:span text:style-name="T85">X509_STORE</text:span><text:span text:style-name="T86"> *truststore, OPTIONAL </text:span><text:span text:style-name="T102">const</text:span><text:span text:style-name="T86"> </text:span><text:span text:style-name="T85">X509_VERIFY_PARAM</text:span><text:span text:style-name="T86"> *vpm,</text:span></text:p>
        <text:p text:style-name="P276"><text:soft-page-break/><text:span text:style-name="T86"><text:s text:c="26"/></text:span><text:span text:style-name="T106">bool</text:span><text:span text:style-name="T86"> full_chain,</text:span><text:span text:style-name="T106"> bool</text:span><text:span text:style-name="T86"> try_stapling,</text:span></text:p>
        <text:p text:style-name="P276"><text:span text:style-name="T106"><text:s text:c="25"/></text:span><text:span text:style-name="T341"><text:s/>OPTIONAL </text:span><text:span text:style-name="T102">const</text:span><text:span text:style-name="T86"> </text:span><text:span text:style-name="T85">STACK_OF(X509_CRL)</text:span><text:span text:style-name="T86"> *crls,</text:span></text:p>
        <text:p text:style-name="P276"><text:span text:style-name="T341"><text:s text:c="25"/></text:span><text:span text:style-name="T106"><text:s/>bool</text:span><text:span text:style-name="T86"> use_CDP, OPTIONAL </text:span><text:span text:style-name="T102">const</text:span><text:span text:style-name="T86"> </text:span><text:span text:style-name="T85">char</text:span><text:span text:style-name="T86"> *cdps, </text:span><text:span text:style-name="T356">int</text:span><text:span text:style-name="T86"> crls_timeout,</text:span></text:p>
        <text:p text:style-name="P284"><text:span text:style-name="T86"><text:s text:c="26"/></text:span><text:span text:style-name="T106">bool</text:span><text:span text:style-name="T86"> use_AIA, OPTIONAL </text:span><text:span text:style-name="T102">const</text:span><text:span text:style-name="T86"> </text:span><text:span text:style-name="T85">char</text:span><text:span text:style-name="T86"> *ocsp, </text:span><text:span text:style-name="T356">int</text:span><text:span text:style-name="T86"> ocsp_timeout);</text:span></text:p>
        <text:p text:style-name="P285"><text:span text:style-name="T383">The function </text:span><text:span text:style-name="T292">STORE_set_crl_callback()</text:span> sets a CRL fetching callback function and optional argument in the given trust store, which may be used for instance to implement CRL caching. If the <text:span text:style-name="T296">use_CDP</text:span> parameter has been set in the trust store the callback is called for each HTTP URL found in the CDP entries of a certificate to be verified. If all these are inconclusive then it is called once more with a <text:span text:style-name="T384">NULL</text:span> URL (such that the callback may try getting a CRL based on any further information contained in the certificate being checked). The <text:span text:style-name="T296">store</text:span> parameter references the certificate trust store to be extended, the <text:span text:style-name="T296">crl_cb</text:span> parameter provides the callback function to use, or null for default (which is <text:span text:style-name="T292">CONN_load_crl_http()</text:span>), and the <text:span text:style-name="T296">crl_cb_arg</text:span> may be used to provide an argument to be passed to the callback function. It returns <text:span text:style-name="T384">true</text:span> on success and <text:span text:style-name="T384">false</text:span> otherwise.</text:p>
        <text:p text:style-name="HTML_20_Preformatted"><text:span text:style-name="T296"><text:s text:c="4"/></text:span><text:span text:style-name="T293">typedef</text:span><text:span text:style-name="T296"> </text:span><text:span text:style-name="T356">X509_CRL</text:span><text:span text:style-name="T296"> *(*</text:span><text:span text:style-name="T356">CONN_load_crl_cb_t</text:span><text:span text:style-name="T296">)(</text:span><text:span text:style-name="T354">OPTIONAL</text:span><text:span text:style-name="T296"> </text:span><text:span text:style-name="T356">void</text:span><text:span text:style-name="T296"> *arg,</text:span></text:p>
        <text:p text:style-name="HTML_20_Preformatted"><text:span text:style-name="T296"><text:s text:c="44"/></text:span><text:span text:style-name="T354">OPTIONAL </text:span><text:span text:style-name="T385">const</text:span><text:span text:style-name="T296"> </text:span><text:span text:style-name="T356">char</text:span><text:span text:style-name="T296"> *url, </text:span><text:span text:style-name="T356">int</text:span><text:span text:style-name="T296"> timeout,</text:span></text:p>
        <text:p text:style-name="HTML_20_Preformatted"><text:span text:style-name="T296"><text:s text:c="44"/></text:span><text:span text:style-name="T385">const</text:span><text:span text:style-name="T296"> </text:span><text:span text:style-name="T356">X509</text:span><text:span text:style-name="T296"> *cert, </text:span><text:span text:style-name="T354">OPTIONAL</text:span><text:span text:style-name="T296"> </text:span><text:span text:style-name="T385">const</text:span><text:span text:style-name="T296"> </text:span><text:span text:style-name="T356">char </text:span><text:span text:style-name="T296">*desc);</text:span></text:p>
        <text:p text:style-name="HTML_20_Preformatted"><text:span text:style-name="T356"><text:s text:c="4"/>bool</text:span><text:span text:style-name="T296"> </text:span><text:span text:style-name="T300">STORE_set_crl_callback</text:span><text:span text:style-name="T296">(</text:span><text:span text:style-name="T356">X509_STORE</text:span><text:span text:style-name="T296"> *store,</text:span></text:p>
        <text:p text:style-name="P286"><text:s text:c="32"/><text:span text:style-name="T386">OPTIONAL</text:span><text:span text:style-name="T331"> </text:span>CONN_load_crl_cb_t<text:span text:style-name="T331"> </text:span><text:span text:style-name="T387">crl_cb</text:span><text:span text:style-name="T331">,</text:span></text:p>
        <text:p text:style-name="P287"><text:span text:style-name="T296"><text:s text:c="32"/></text:span><text:span text:style-name="T354">OPTIONAL</text:span><text:span text:style-name="T296"> </text:span><text:span text:style-name="T356">void </text:span><text:span text:style-name="T296">*crl_cb_arg);</text:span></text:p>
        <text:p text:style-name="P288"/>
        <text:p text:style-name="P289"><text:span text:style-name="T295">The </text:span><text:span text:style-name="T300">STORE_set1_host_ip()</text:span><text:span text:style-name="T295"> function </text:span><text:span text:style-name="T388">is used by </text:span><text:span text:style-name="T389">CMPclient_setup_HTTP() </text:span><text:span text:style-name="T388">as described there. It </text:span><text:span text:style-name="T295">disable</text:span><text:span text:style-name="T390">s</text:span><text:span text:style-name="T295"> host name/address verification if the </text:span><text:span text:style-name="T354">host</text:span><text:span text:style-name="T295"> and </text:span><text:span text:style-name="T354">ip</text:span><text:change text:change-id="ct36236188224"/><text:span text:style-name="T295"> parameters are </text:span><text:span text:style-name="T384">NULL</text:span><text:span text:style-name="T295">, otherwise enables host verification in the given trust store (typically returned from </text:span><text:span text:style-name="T374">TLS_new()</text:span><text:span text:style-name="T295">) and defines the server host name and/or IP address to be expected for a TLS connection, </text:span><text:span text:style-name="T391">where the host </text:span><text:change-start text:change-id="ct36236188544"/><text:span text:style-name="T392">domain</text:span><text:change-end text:change-id="ct36236188544"/><text:change-start text:change-id="ct36236185344"/><text:span text:style-name="T392"> </text:span><text:change-end text:change-id="ct36236185344"/><text:span text:style-name="T391">name </text:span><text:span text:style-name="T390">will</text:span><text:span text:style-name="T391"> also </text:span><text:span text:style-name="T390">be </text:span><text:span text:style-name="T391">used for Server Name Indication (SNI) according to RFC 3546 section 3.1</text:span><text:span text:style-name="T295">. It is crucial for TLS clients to verify the identity of the host to connect to. The parameter </text:span><text:span text:style-name="T354">host</text:span><text:span text:style-name="T295"> optionally gives the host DNS name to be expected, while the parameter </text:span><text:span text:style-name="T354">ip</text:span><text:span text:style-name="T295"> optionally gives the host </text:span><text:span text:style-name="T393">IP</text:span><text:span text:style-name="T295"> address to be expected. </text:span><text:span text:style-name="T394">Both parameters may be given in the form of a URL, from which the host</text:span><text:change text:change-id="ct36236196224"/><text:span text:style-name="T394"> part </text:span><text:span text:style-name="T395">is </text:span><text:span text:style-name="T394">copied and the rest is ignored. </text:span><text:span text:style-name="T295">If both </text:span><text:span text:style-name="T354">host</text:span><text:span text:style-name="T295"> and </text:span><text:span text:style-name="T354">ip</text:span><text:span text:style-name="T295"> are non-</text:span><text:span text:style-name="T396">NULL</text:span><text:span text:style-name="T295"> and </text:span><text:span text:style-name="T394">the strings resulting from them </text:span><text:span text:style-name="T295">are equal, the function </text:span><text:change-start text:change-id="ct36236183744"/><text:span text:style-name="T392">determines using CONN_IS_IP_ADDRESS() whether to set</text:span><text:change-end text:change-id="ct36236183744"/><text:change text:change-id="ct36236186304"/><text:span text:style-name="T295"> </text:span><text:span text:style-name="T397">an </text:span><text:span text:style-name="T295">IP address </text:span><text:change-start text:change-id="ct36236186624"/><text:span text:style-name="T392">or</text:span><text:change-end text:change-id="ct36236186624"/><text:change text:change-id="ct36236193344"/><text:span text:style-name="T295"> </text:span><text:span text:style-name="T397">a </text:span><text:span text:style-name="T295">domain name. The function returns </text:span><text:span text:style-name="T384">true</text:span><text:span text:style-name="T295"> on success and </text:span><text:span text:style-name="T384">false</text:span><text:span text:style-name="T295"> otherwise..</text:span></text:p>
        <text:p text:style-name="P290"/>
        <text:p text:style-name="P291"><text:span text:style-name="T356"><text:s text:c="4"/>bool</text:span><text:span text:style-name="T354"> </text:span><text:span text:style-name="T300">STORE_set1_host_ip</text:span><text:span text:style-name="T354">(</text:span><text:span text:style-name="T356">X509_STORE</text:span><text:span text:style-name="T354"> *s</text:span><text:span text:style-name="T398">tore</text:span><text:span text:style-name="T354">, OPTIONAL </text:span><text:span text:style-name="T385">const</text:span><text:span text:style-name="T354"> </text:span><text:span text:style-name="T356">char</text:span><text:span text:style-name="T354"> *host, OPTIONAL </text:span><text:span text:style-name="T385">const</text:span><text:span text:style-name="T354"> </text:span><text:span text:style-name="T356">char</text:span><text:span text:style-name="T354"> *ip);</text:span></text:p>
        <text:p text:style-name="P292"/>
        <text:p text:style-name="P293">Further non-default trust store parameters may be set as far as needed using the various respective low-level OpenSSL functions.<text:line-break/>Example for setting up a trust store with use of statically and dynamically obtained CRLs:</text:p>
        <text:p text:style-name="P229"><text:span text:style-name="T61"><text:s text:c="4"/></text:span><text:span text:style-name="T287">X509_STORE</text:span><text:span text:style-name="T81"> *truststore = …;</text:span></text:p>
        <text:p text:style-name="P229"><text:span text:style-name="T61"><text:s text:c="4"/></text:span><text:span text:style-name="T113">const</text:span><text:span text:style-name="T61"> </text:span><text:span text:style-name="T399">X509_VERIFY_PARAM</text:span><text:span text:style-name="T61"> *vpm = </text:span><text:span text:style-name="T109">NULL</text:span><text:span text:style-name="T61">;</text:span></text:p>
        <text:p text:style-name="P276"><text:span text:style-name="T86"><text:s/></text:span><text:span text:style-name="T106">bool</text:span><text:span text:style-name="T86"> full_chain = true;</text:span></text:p>
        <text:p text:style-name="P276"><text:span text:style-name="T106"><text:s/>bool</text:span><text:span text:style-name="T86"> try_stapling = false;</text:span></text:p>
        <text:p text:style-name="P229"><text:span text:style-name="T61"><text:s text:c="4"/></text:span><text:span text:style-name="T113">const</text:span><text:span text:style-name="T61"> </text:span><text:span text:style-name="T115">char</text:span><text:span text:style-name="T61"> *file = <text:s text:c="2"/></text:span></text:p>
        <text:p text:style-name="P294"><text:s text:c="9"/>"certs/crls/EJBCA-InfrastructureIssuingCAv10.crl, "</text:p>
        <text:p text:style-name="P294"><text:s text:c="9"/>"certs/crls/EjBCA-ECCRootAv10.crl"; <text:s text:c="11"/></text:p>
        <text:p text:style-name="P229"><text:span text:style-name="T61"><text:s text:c="4"/></text:span><text:span text:style-name="T113">const</text:span><text:span text:style-name="T61"> </text:span><text:span text:style-name="T115">char</text:span><text:span text:style-name="T61"> *desc = "CRLs for CMP level";</text:span></text:p>
        <text:p text:style-name="P229"><text:span text:style-name="T61"><text:s text:c="4"/></text:span><text:span text:style-name="T124">const</text:span><text:span text:style-name="T98"> </text:span><text:span text:style-name="T366">STACK_OF(X509_CRL)</text:span><text:span text:style-name="T98"> *</text:span><text:span text:style-name="T61">crls = CRLs_load(file, -1, </text:span><text:span text:style-name="T109">NULL</text:span><text:span text:style-name="T61">);</text:span></text:p>
        <text:p text:style-name="P229"><text:span text:style-name="T61"><text:s text:c="4"/></text:span><text:span text:style-name="T115">bool</text:span><text:span text:style-name="T61"> use_CDP = true;</text:span></text:p>
        <text:p text:style-name="P229"><text:span text:style-name="T61"><text:s text:c="4"/></text:span><text:span text:style-name="T113">const</text:span><text:span text:style-name="T61"> </text:span><text:span text:style-name="T115">char</text:span><text:span text:style-name="T61"> *cdps = </text:span><text:span text:style-name="T109">NULL</text:span><text:span text:style-name="T61">;</text:span></text:p>
        <text:p text:style-name="P229"><text:span text:style-name="T115"><text:s text:c="4"/>int</text:span><text:span text:style-name="T61"> crls_timeout = -1;</text:span></text:p>
        <text:p text:style-name="P229"><text:span text:style-name="T61"><text:s text:c="4"/></text:span><text:span text:style-name="T115">bool</text:span><text:span text:style-name="T61"> use_AIA = </text:span><text:span text:style-name="T332">false</text:span><text:span text:style-name="T61">;</text:span></text:p>
        <text:p text:style-name="P229"><text:span text:style-name="T61"><text:s text:c="4"/></text:span><text:span text:style-name="T113">const</text:span><text:span text:style-name="T61"> </text:span><text:span text:style-name="T115">char</text:span><text:span text:style-name="T61"> *ocsp = </text:span><text:span text:style-name="T109">NULL</text:span><text:span text:style-name="T61">;</text:span></text:p>
        <text:p text:style-name="P229"><text:span text:style-name="T115"><text:s text:c="4"/>int</text:span><text:span text:style-name="T61"> ocsp_timeout = -1;</text:span></text:p>
        <text:p text:style-name="P229"><text:span text:style-name="T61"><text:s text:c="4"/></text:span><text:span text:style-name="T115">bool</text:span><text:span text:style-name="T61"> success = STORE_set_parameters(truststore, vpm,</text:span><text:span text:style-name="T98"> full_chain,</text:span><text:span text:style-name="T86"> try_stapling, </text:span><text:span text:style-name="T400">crls,</text:span></text:p>
        <text:p text:style-name="P295"><text:s text:c="40"/>use_CDP, cdps, crls_timeout,<text:line-break/> <text:s text:c="39"/>use_AIA, ocsp, ocsp_timeout);</text:p>
        <text:p text:style-name="P275"><text:span text:style-name="T91">The function </text:span><text:span text:style-name="T340">STORE_free()</text:span><text:span text:style-name="T91"> deallocates any given trust store. It has no return value.</text:span></text:p>
        <text:p text:style-name="P276"><text:span text:style-name="T85">void</text:span><text:span text:style-name="T86"> </text:span><text:span text:style-name="T340">STORE_free</text:span><text:span text:style-name="T86">(</text:span><text:span text:style-name="T341">OPTIONAL</text:span><text:span text:style-name="T85"> X509_STORE</text:span><text:span text:style-name="T86"> *</text:span><text:span text:style-name="T129">truststore</text:span><text:span text:style-name="T86">);</text:span></text:p>
        <text:list text:continue-list="list135612303991603" text:style-name="WWNum2">
          <text:list-item>
            <text:list>
              <text:list-item>
                <text:h text:style-name="P296"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P297"><text:change-start text:change-id="ct36149053312"/><text:span text:style-name="T401">The function </text:span><text:span text:style-name="T402">KEY_new()</text:span><text:span text:style-name="T401"> generates a new private key of OpenSSL type </text:span><text:span text:style-name="T403">EVP_PKEY</text:span><text:span text:style-name="T401"> according to </text:span><text:change-end text:change-id="ct36149053312"/><text:change text:change-id="ct36149059072"/><text:change-start text:change-id="ct36149057152"/><text:span text:style-name="T401">its </text:span><text:span text:style-name="T404">spec</text:span><text:span text:style-name="T401"> argument, which may be of the form </text:span><text:span text:style-name="T405">"</text:span><text:span text:style-name="T406">EC:&lt;curve&gt;</text:span><text:span text:style-name="T405">"</text:span><text:span text:style-name="T407">, </text:span><text:span text:style-name="T408">"</text:span><text:span text:style-name="T409">RSA:&lt;length&gt;</text:span><text:span text:style-name="T408">"</text:span><text:span text:style-name="T407">, </text:span><text:span text:style-name="T410">"</text:span><text:span text:style-name="T409">RSA-&lt;length&gt;</text:span><text:span text:style-name="T408">"</text:span><text:span text:style-name="T407">, </text:span><text:span text:style-name="T411">or </text:span><text:span text:style-name="T409">"&lt;length&gt;"</text:span><text:change-end text:change-id="ct36149057152"/><text:change text:change-id="ct36149066112"/><text:change text:change-id="ct36149053952"/><text:change text:change-id="ct36149053632"/><text:change text:change-id="ct36149052672"/><text:change text:change-id="ct36149061952"/><text:change text:change-id="ct36149062912"/><text:change text:change-id="ct36149065152"/><text:change-start text:change-id="ct36149052992"/><text:span text:style-name="T401">. Everything else is considered an ECC curve name if the OpenSSL version is below 3.5, </text:span><text:span text:style-name="T412">while s</text:span><text:span text:style-name="T413">ince OpenSSL 3.5, </text:span><text:span text:style-name="T412">it is taken as an </text:span><text:span text:style-name="T413">algorithm name, potentially including parameters, such as </text:span><text:span text:style-name="T409">"ED25519"</text:span><text:span text:style-name="T413"> or </text:span><text:span text:style-name="T414">"</text:span><text:span text:style-name="T415">ML-DS</text:span><text:span text:style-name="T409">A-&lt;level&gt;</text:span><text:span text:style-name="T415">"</text:span><text:span text:style-name="T413">. </text:span><text:span text:style-name="T416">For the full list of available</text:span><text:span text:style-name="T417"> algorithm</text:span><text:change-end text:change-id="ct36149052992"/><text:change-start text:change-id="ct36149060352"/><text:span text:style-name="T418">s</text:span><text:change-end text:change-id="ct36149060352"/><text:change-start text:change-id="ct36149051712"/><text:span text:style-name="T417"> </text:span><text:span text:style-name="T416">see the output of </text:span><text:span text:style-name="T419">openssl list -public-key-algorithms</text:span><text:change-end text:change-id="ct36149051712"/><text:change-start text:change-id="ct36149062592"/><text:span text:style-name="T413">.</text:span><text:change-end text:change-id="ct36149062592"/><text:change-start text:change-id="ct36149054912"/><text:span text:style-name="T401"> </text:span><text:change-end text:change-id="ct36149054912"/><text:change-start text:change-id="ct36149060672"/><text:span text:style-name="T420">The</text:span><text:change-end text:change-id="ct36149060672"/><text:change-start text:change-id="ct36149054592"/><text:span text:style-name="T420"> </text:span><text:change-end text:change-id="ct36149054592"/><text:change text:change-id="ct36149055232"/><text:span text:style-name="T401">RSA key length must be between 1024 and 8192 bits. </text:span><text:change text:change-id="ct36149066432"/><text:span text:style-name="T401">The available ECC curves can be shown with the command </text:span><text:span text:style-name="T421">openssl </text:span><text:span text:style-name="T422">ecparam</text:span><text:span text:style-name="T421"> -list_curves</text:span><text:change-start text:change-id="ct36149063872"/><text:span text:style-name="T401">. </text:span><text:change-end text:change-id="ct36149063872"/><text:change text:change-id="ct36149065472"/><text:span text:style-name="T401">The function returns the new key on success and </text:span><text:span text:style-name="T423">NULL</text:span><text:span text:style-name="T401"> otherwise.</text:span><text:change-start text:change-id="ct36149055552"/></text:p>
        <text:p text:style-name="P298"><text:span text:style-name="T401">The function </text:span><text:span text:style-name="T402">KEY_new</text:span><text:span text:style-name="T424">_ex</text:span><text:span text:style-name="T402">()</text:span><text:span text:style-name="T401"> </text:span><text:span text:style-name="T425">is a generalization taking two optional further parameters </text:span><text:span text:style-name="T426">that can be used with OpenSSL 3.0+ (while for earlier versions they must be </text:span><text:span text:style-name="T427">NULL</text:span><text:span text:style-name="T426">)</text:span><text:change-end text:change-id="ct36149055552"/><text:change-start text:change-id="ct36236191744"/><text:span text:style-name="T426">: </text:span><text:change-end text:change-id="ct36236191744"/><text:change-start text:change-id="ct36236190784"/><text:span text:style-name="T426"><text:line-break/></text:span><text:change-end text:change-id="ct36236190784"/><text:change text:change-id="ct36413120640"/><text:change text:change-id="ct36149514624"/><text:change text:change-id="ct36382472256"/><text:change text:change-id="ct36172396608"/><text:change text:change-id="ct36141145600"/><text:change text:change-id="ct36141139520"/><text:change text:change-id="ct36141141760"/><text:change text:change-id="ct36382464896"/><text:change-start text:change-id="ct36149022144"/><text:span text:style-name="T428">libctx</text:span><text:span text:style-name="T429"> may </text:span><text:span text:style-name="T401">point to an OpenSSL library context, </text:span><text:span text:style-name="T429">to</text:span><text:span text:style-name="T401"> use </text:span><text:span text:style-name="T429">with</text:span><text:span text:style-name="T401"> non-default crypto providers.</text:span><text:change-end text:change-id="ct36149022144"/><text:change-start text:change-id="ct36458535808"/><text:span text:style-name="T401"><text:line-break/></text:span><text:span text:style-name="T430">propq </text:span><text:span text:style-name="T431">m</text:span><text:span text:style-name="T431">ay give a</text:span><text:span text:style-name="T432"> property query for crypto algorithm selection.</text:span><text:change-end text:change-id="ct36458535808"/><text:change text:change-id="ct36149030464"/><text:change-start text:change-id="ct36172428416"/></text:p>
        <text:p text:style-name="P299"><text:span text:style-name="T210"><text:s text:c="3"/>EVP_PKEY</text:span><text:span text:style-name="T433"> *</text:span><text:span text:style-name="T434">KEY_new</text:span><text:span text:style-name="T433">(</text:span><text:span text:style-name="T212">const</text:span><text:span text:style-name="T433"> </text:span><text:span text:style-name="T210">char</text:span><text:span text:style-name="T433"> *spec);<text:line-break/> <text:s text:c="2"/></text:span><text:span text:style-name="T210">EVP_PKEY</text:span><text:span text:style-name="T77"> *</text:span><text:span text:style-name="T434">KEY_new</text:span><text:span text:style-name="T435">_ex</text:span><text:span text:style-name="T77">(</text:span><text:span text:style-name="T212">const</text:span><text:span text:style-name="T77"> </text:span><text:span text:style-name="T210">char</text:span><text:span text:style-name="T77"> *spec, <text:s/></text:span></text:p>
        <text:p text:style-name="P300"><text:span text:style-name="T436"><text:s text:c="24"/>OPTIONAL </text:span><text:span text:style-name="T437">OSSL_LIB_CTX</text:span><text:span text:style-name="T436"> *</text:span><text:span text:style-name="T438">libct</text:span><text:change-end text:change-id="ct36172428416"/><text:change-start text:change-id="ct36172418496"/><text:span text:style-name="T439">x</text:span><text:change-end text:change-id="ct36172418496"/><text:change-start text:change-id="ct36394402112"/><text:span text:style-name="T439">, </text:span><text:span text:style-name="T440">OPTIONAL </text:span><text:span text:style-name="T441">const</text:span><text:span text:style-name="T440"> </text:span><text:span text:style-name="T442">char</text:span><text:span text:style-name="T440"> *</text:span><text:change-end text:change-id="ct36394402112"/><text:change-start text:change-id="ct36030045376"/><text:span text:style-name="T443">propq</text:span><text:change-end text:change-id="ct36030045376"/><text:change-start text:change-id="ct36172420096"/><text:span text:style-name="T436">)</text:span><text:change-end text:change-id="ct36172420096"/><text:change-start text:change-id="ct36172417216"/><text:span text:style-name="T436">;</text:span><text:change-end text:change-id="ct36172417216"/><text:span text:style-name="T436"><text:line-break/><text:line-break/></text:span><text:span text:style-name="T401">An example use has been given in section </text:span><text:span text:style-name="T401"><text:bookmark-ref text:reference-format="number" text:ref-name="_Ref507616602">3.4</text:bookmark-ref></text:span><text:span text:style-name="T401">.</text:span><text:change text:change-id="ct36172418176"/>Keys accessed via a <text:span text:style-name="T314">crypto </text:span><text:span text:style-name="T315">provider</text:span><text:change-start text:change-id="ct36172419136"/><text:span text:style-name="T315"> </text:span><text:span text:style-name="T1">other than TPM2</text:span><text:change-end text:change-id="ct36172419136"/><text:span text:style-name="T315"> </text:span><text:change-start text:change-id="ct36172421376"/><text:span text:style-name="T444">(</text:span><text:change-end text:change-id="ct36172421376"/><text:span text:style-name="T315">or </text:span><text:change-start text:change-id="ct36172430336"/><text:span text:style-name="T444">via </text:span><text:change-end text:change-id="ct36172430336"/><text:change-start text:change-id="ct36172429056"/><text:span text:style-name="T1">a </text:span><text:change-end text:change-id="ct36172429056"/><text:span text:style-name="T315">legacy </text:span>crypto engine<text:change-start text:change-id="ct36172416256"/><text:span text:style-name="T444">)</text:span><text:change-end text:change-id="ct36172416256"/> need to be generated by other means.<text:change-start text:change-id="ct36172419776"/></text:p>
        <text:p text:style-name="P301"><text:change-end text:change-id="ct36172419776"/><text:change text:change-id="ct36172417856"/>The <text:span text:style-name="T300">KEY_load()</text:span> function loads a private key from the given <text:span text:style-name="T352">file</text:span> or <text:span text:style-name="T352">engine</text:span>. The file format can be PEM, DER, or PKCS#12. The parameter <text:span text:style-name="T352">pass</text:span> may provide a password (optionally preceded by <text:span text:style-name="T352">"pass:"</text:span>) needed for decrypting the file content. <text:span text:style-name="T445">In case of errors the string held in the optional </text:span><text:span text:style-name="T359">desc</text:span><text:span text:style-name="T445"> parameter is used for forming more descriptive error messages.</text:span></text:p>
        <text:p text:style-name="HTML_20_Preformatted"><text:span text:style-name="T352"><text:s text:c="4"/></text:span><text:span text:style-name="T351">EVP_PKEY</text:span><text:span text:style-name="T352"> *</text:span><text:span text:style-name="T300">KEY_load</text:span><text:span text:style-name="T352">(OPTIONAL </text:span><text:span text:style-name="T135">const</text:span><text:span text:style-name="T352"> </text:span><text:span text:style-name="T351">char</text:span><text:span text:style-name="T352"> *file, OPTIONAL </text:span><text:span text:style-name="T135">const</text:span><text:span text:style-name="T352"> </text:span><text:span text:style-name="T351">char</text:span><text:span text:style-name="T352"> *pass,</text:span></text:p>
        <text:p text:style-name="HTML_20_Preformatted"><text:span text:style-name="T352"><text:s text:c="23"/>OPTIONAL </text:span><text:span text:style-name="T135">const</text:span><text:span text:style-name="T352"> </text:span><text:span text:style-name="T351">char</text:span><text:span text:style-name="T352"> *engine, OPTIONAL </text:span><text:span text:style-name="T135">const</text:span><text:span text:style-name="T352"> </text:span><text:span text:style-name="T351">char</text:span><text:span text:style-name="T352"> *desc);<text:line-break/></text:span></text:p>
        <text:p text:style-name="P302"><text:span text:style-name="T91">The function </text:span><text:span text:style-name="T340">KEY_free()</text:span><text:span text:style-name="T91"> deallocates the given </text:span><text:span text:style-name="T446">p</text:span><text:span text:style-name="T129">key</text:span><text:span text:style-name="T447"> and </text:span><text:span text:style-name="T94">wipes its representation in memory if it is SW-based</text:span><text:span text:style-name="T91">. It has no return value. For HW-based keys it just deallocates the reference.</text:span><text:span text:style-name="T85"> <text:s text:c="2"/></text:span></text:p>
        <text:p text:style-name="P303"/>
        <text:p text:style-name="P302"><text:span text:style-name="T85"><text:s text:c="3"/>void</text:span><text:span text:style-name="T86"> </text:span><text:span text:style-name="T340">KEY_free</text:span><text:span text:style-name="T86">(</text:span><text:span text:style-name="T341">OPTIONAL</text:span><text:span text:style-name="T85"> EVP_PKEY</text:span><text:span text:style-name="T86"> *</text:span><text:span text:style-name="T448">p</text:span><text:span text:style-name="T86">key);</text:span></text:p>
        <text:h text:style-name="P304" text:outline-level="2"/>
        <text:list text:continue-numbering="true" text:style-name="WWNum2">
          <text:list-item>
            <text:list>
              <text:list-item>
                <text:h text:style-name="P305"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306"><text:span text:style-name="T91">The function </text:span><text:span text:style-name="T340">TLS_new()</text:span><text:span text:style-name="T91"> sets up a new OpenSSL </text:span><text:span text:style-name="T85">SSL_CTX</text:span><text:span text:style-name="T91"> structure with reasonable default parameters for TLS (typically HTTPS client) connections. Its optional arguments are the trust store </text:span><text:span text:style-name="T129">truststore</text:span><text:span text:style-name="T91"> to use for authenticating the peer (typically a TLS server), a list of intermediate certificates </text:span><text:span text:style-name="T86">untrusted</text:span><text:span text:style-name="T91"> that may be helpful when building the own (typically TLS client) certificate chain and while checking stapled OCSP responses, the credentials </text:span><text:span text:style-name="T129">creds</text:span><text:span text:style-name="T91"> to use for authenticating to the peer, and the enabled cipher suites. All these parameters are not consumed, so should be deallocated by the caller.</text:span></text:p>
        <text:p text:style-name="P306"><text:span text:style-name="T91">If the </text:span><text:span text:style-name="T176">creds</text:span><text:span text:style-name="T91"> argument is given the function checks that its certificate matches its private key and tries to build a chain from the certificate using the </text:span><text:span text:style-name="T176">truststore</text:span><text:span text:style-name="T91"> and </text:span><text:span text:style-name="T99">untrusted</text:span><text:span text:style-name="T91"> certificates (as far as given) to be used for authenticating to the peer. If this fails it issues a warning and uses the chain in the </text:span><text:span text:style-name="T176">creds</text:span><text:span text:style-name="T91"> argument (if included) as fallback.</text:span></text:p>
        <text:p text:style-name="P306"><text:span text:style-name="T91">The available cipher suite names can be shown with the command </text:span><text:span text:style-name="T101">openssl list -cipher-algorithms</text:span><text:span text:style-name="T91">. See also [OpenSSL-ciphers] how to specify them more abstractly. <text:line-break/>The security level ranges from </text:span><text:span text:style-name="T449">0</text:span><text:span text:style-name="T91"> (lowest) to </text:span><text:span text:style-name="T449">5</text:span><text:span text:style-name="T91">. If </text:span><text:span text:style-name="T449">-1</text:span><text:span text:style-name="T91"> is given, a sensible value is determined from the cipher list if provided, else the OpenSSL default is used (which is currently </text:span><text:span text:style-name="T449">1</text:span><text:span text:style-name="T91">). For details see [OpenSSL-sec-level]. The function returns the pointer to the new structure on success, or </text:span><text:span text:style-name="T86">NULL</text:span><text:span text:style-name="T91"> otherwise. Further non-default TLS parameters may be set as far as needed using the various respective low-level OpenSSL functions. </text:span></text:p>
        <text:p text:style-name="P276"><text:span text:style-name="T85"><text:line-break/>SSL_CTX</text:span><text:span text:style-name="T86"> *</text:span><text:span text:style-name="T340">TLS_new</text:span><text:span text:style-name="T86">(OPTIONAL </text:span><text:span text:style-name="T85">X509_STORE</text:span><text:span text:style-name="T86"> *</text:span><text:span text:style-name="T129">truststore</text:span><text:span text:style-name="T86">, </text:span></text:p>
        <text:p text:style-name="P276"><text:span text:style-name="T86"><text:s text:c="17"/>OPTIONAL </text:span><text:span text:style-name="T95">const</text:span><text:span text:style-name="T105"> </text:span><text:span text:style-name="T85">STACK_OF(X509)</text:span><text:span text:style-name="T450"> </text:span><text:span text:style-name="T86">*untrusted,<text:line-break/> <text:s text:c="16"/>OPTIONAL </text:span><text:span text:style-name="T95">const</text:span><text:span text:style-name="T105"> </text:span><text:span text:style-name="T85">CREDENTIALS</text:span><text:span text:style-name="T86"> *creds,</text:span></text:p>
        <text:p text:style-name="P276"><text:span text:style-name="T85"><text:s text:c="17"/></text:span><text:span text:style-name="T105">OPTIONAL </text:span><text:span text:style-name="T95">const</text:span><text:span text:style-name="T105"> </text:span><text:span text:style-name="T86">char *ciphers, </text:span><text:span text:style-name="T380">int</text:span><text:span text:style-name="T86"> security_level);</text:span></text:p>
        <text:p text:style-name="P307"/>
        <text:p text:style-name="P308"><text:span text:style-name="T91">The function </text:span><text:span text:style-name="T340">TLS_free()</text:span><text:span text:style-name="T91"> deallocates the given TLS context </text:span><text:span text:style-name="T129">tls</text:span><text:span text:style-name="T91">. It has no return value.</text:span></text:p>
        <text:p text:style-name="P276"><text:change text:change-id="ct36236258240"/><text:span text:style-name="T85">void</text:span><text:span text:style-name="T86"> </text:span><text:span text:style-name="T340">TLS_free</text:span><text:span text:style-name="T86">(</text:span><text:span text:style-name="T341">OPTIONAL</text:span><text:span text:style-name="T85"> SSL_CTX</text:span><text:span text:style-name="T86"> *tls);</text:span></text:p>
        <text:list text:continue-numbering="true" text:style-name="WWNum2">
          <text:list-item>
            <text:list>
              <text:list-item>
                <text:h text:style-name="P305"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309"><text:span text:style-name="T91">The function </text:span><text:span text:style-name="T451">EXTENSIONS_new()</text:span><text:span text:style-name="T91"> initiates a list of X.509</text:span><text:span text:style-name="T94"> extensions, which has OpenSSL type </text:span><text:span text:style-name="T366">X509_EXTENSIONS</text:span><text:span text:style-name="T94">, to be used in certificate </text:span><text:span text:style-name="T91">enrollment</text:span><text:span text:style-name="T94">.</text:span> It <text:span text:style-name="T91">returns the pointer to the new structure on success, or </text:span><text:span text:style-name="T86">NULL</text:span><text:span text:style-name="T91"> otherwise.</text:span></text:p>
        <text:p text:style-name="P310"><text:span text:style-name="T452"><text:line-break/>X509_EXTENSIONS</text:span><text:span text:style-name="T88"> *</text:span><text:span text:style-name="T74">EXTENSIONS_new</text:span><text:span text:style-name="T88">(</text:span><text:span text:style-name="T79">void</text:span><text:span text:style-name="T88">);<text:line-break/></text:span></text:p>
        <text:p text:style-name="P30">The function <text:span text:style-name="T434">EXTENSIONS_add_SANs()</text:span> appends to the given list of X.509 extensions <text:span text:style-name="T77">exts</text:span> a list of Subject Alternative Names (SANs) given as a string <text:span text:style-name="T77">spec </text:span>of comma-separated domain names, IP addresses, and/or URIs optionally preceded by “<text:span text:style-name="T77">critical,</text:span>” to mark them critical. It returns <text:span text:style-name="T339">true</text:span> on success and <text:span text:style-name="T339">false</text:span> otherwise.</text:p>
        <text:p text:style-name="P311"><text:span text:style-name="T210"><text:line-break/>bool</text:span><text:span text:style-name="T77"> </text:span><text:span text:style-name="T434">EXTENSIONS_add_SANs</text:span><text:span text:style-name="T77">(</text:span><text:span text:style-name="T287">X509_EXTENSIONS</text:span><text:span text:style-name="T77"> *</text:span><text:span text:style-name="T213">exts</text:span><text:span text:style-name="T77">, </text:span><text:span text:style-name="T212">const</text:span><text:span text:style-name="T77"> </text:span><text:span text:style-name="T210">char</text:span><text:span text:style-name="T77"> *spec);<text:line-break/></text:span></text:p>
        <text:p text:style-name="P306"><text:span text:style-name="T91">The function </text:span><text:span text:style-name="T451">EXTENSIONS_add_ext</text:span><text:span text:style-name="T340">()</text:span><text:span text:style-name="T91"> appends to the given list of X.509 extensions </text:span><text:span text:style-name="T453">exts</text:span><text:span text:style-name="T105"> </text:span><text:span text:style-name="T91">an extension of the given type, e.g., </text:span><text:span text:style-name="T454">"basicCon</text:span><text:span text:style-name="T455">s</text:span><text:span text:style-name="T454">traints"</text:span><text:span text:style-name="T91">, </text:span><text:span text:style-name="T454">"keyUsage"</text:span><text:span text:style-name="T91">, </text:span><text:span text:style-name="T454">"extendedKeyUsage"</text:span><text:span text:style-name="T91">, or <text:line-break/></text:span><text:span text:style-name="T454">"certificatePolicies"</text:span><text:span text:style-name="T91">. Its value is given as a string </text:span><text:span text:style-name="T105">spec </text:span><text:span text:style-name="T91">of comma-separated names or OIDs optionally preceded by “</text:span><text:span text:style-name="T105">critical,</text:span><text:span text:style-name="T91">” to mark the extension critical. The specification may refer to further details specified in the style of OpenSSL configuration file sections (see [</text:span><text:span text:style-name="T456">OpenSSL-</text:span><text:span text:style-name="T457">ext-</text:span><text:span text:style-name="T456">config</text:span><text:span text:style-name="Internet_20_link"><text:span text:style-name="T458">]</text:span></text:span><text:span text:style-name="T91">), which can be provided via the optional </text:span><text:span text:style-name="T454">sections</text:span><text:span text:style-name="T91"> parameter. The function returns </text:span><text:span text:style-name="T459">true</text:span><text:span text:style-name="T91"> on success, </text:span><text:span text:style-name="T459">false</text:span><text:span text:style-name="T91"> otherwise. </text:span></text:p>
        <text:p text:style-name="P306"><text:span text:style-name="T91">Possible values for basic key usages are: "</text:span><text:span text:style-name="T454">digitalSignature</text:span><text:span text:style-name="T91">", "</text:span><text:span text:style-name="T454">nonRepudiation</text:span><text:span text:style-name="T91">",</text:span></text:p>
        <text:p text:style-name="P72"><text:span text:style-name="T91">"</text:span><text:span text:style-name="T454">keyEncipherment</text:span><text:span text:style-name="T91">", "</text:span><text:span text:style-name="T454">dataEncipherment</text:span><text:span text:style-name="T91">", "</text:span><text:span text:style-name="T454">keyAgreement</text:span><text:span text:style-name="T91">", "</text:span><text:span text:style-name="T454">keyCertSign</text:span><text:span text:style-name="T91">", <text:s/>"</text:span><text:span text:style-name="T454">cRLSign</text:span><text:span text:style-name="T91">", "</text:span><text:span text:style-name="T454">encipherOnly</text:span><text:span text:style-name="T91">", and "</text:span><text:span text:style-name="T454">decipherOnly</text:span><text:span text:style-name="T91">". For a list of generally defined Extended Key Usage OIDs, see [OID-ref].</text:span></text:p>
        <text:p text:style-name="P310"><text:span text:style-name="T210">bool</text:span><text:span text:style-name="T77"> </text:span><text:span text:style-name="T434">EXTENSIONS_add_ext</text:span><text:span text:style-name="T77">(</text:span><text:span text:style-name="T287">X509_EXTENSIONS</text:span><text:span text:style-name="T77"> *</text:span><text:span text:style-name="T213">exts</text:span><text:span text:style-name="T77">, </text:span><text:span text:style-name="T212">const</text:span><text:span text:style-name="T77"> </text:span><text:span text:style-name="T210">char</text:span><text:span text:style-name="T77"> *name,</text:span><text:span text:style-name="T212"> <text:line-break/> <text:s text:c="23"/>const</text:span><text:span text:style-name="T77"> </text:span><text:span text:style-name="T210">char</text:span><text:span text:style-name="T77"> *spec,</text:span><text:span text:style-name="T212"> </text:span><text:span text:style-name="T210">BIO</text:span><text:span text:style-name="T77"> *sections);</text:span></text:p>
        <text:p text:style-name="P162"/>
        <text:p text:style-name="P46">Example use:</text:p>
        <text:p text:style-name="P229"><text:span text:style-name="T81"><text:line-break/> <text:s text:c="3"/></text:span><text:span text:style-name="T287">X509_EXTENSIONS</text:span><text:span text:style-name="T81"> *</text:span><text:span text:style-name="T142">exts</text:span><text:span text:style-name="T81"> = EXTENSIONS_new();</text:span></text:p>
        <text:p text:style-name="P229"><text:span text:style-name="T81"><text:s text:c="4"/></text:span><text:span text:style-name="T287">BIO</text:span><text:span text:style-name="T81"> *policy_sections = BIO_new(BIO_s_mem());</text:span></text:p>
        <text:p text:style-name="P229"><text:span text:style-name="T81"><text:s text:c="4"/></text:span><text:span text:style-name="T82">bool</text:span><text:span text:style-name="T81"> success = </text:span><text:span text:style-name="T142">exts</text:span><text:span text:style-name="T81"> != NULL &amp;&amp; policy_sections != NULL &amp;&amp;</text:span></text:p>
        <text:p text:style-name="P229"><text:span text:style-name="T81"><text:s text:c="8"/>EXTENSIONS_add_SANs(</text:span><text:span text:style-name="T142">exts</text:span><text:span text:style-name="T81">, "localhost, 127.0.0.1, 192.168.0.1") &amp;&amp;<text:line-break/> <text:s text:c="7"/>EXTENSIONS_add_ext (</text:span><text:span text:style-name="T142">exts</text:span><text:span text:style-name="T81">, "keyUsage", "critical, digitalSignature", NULL)</text:span><text:span text:style-name="T61"> &amp;&amp;</text:span></text:p>
        <text:p text:style-name="P312"><text:span text:style-name="T81"><text:s text:c="7"/></text:span><text:span text:style-name="T142"><text:s/>EXTENSIONS_add_ext (exts</text:span><text:span text:style-name="T81">, "extendedKeyUsage",</text:span><text:span text:style-name="T460"> "</text:span><text:span text:style-name="T81">critical</text:span><text:span text:style-name="T460">, </text:span><text:span text:style-name="T461">clientAuth</text:span><text:span text:style-name="T460">, "<text:line-break/> <text:s text:c="35"/>"1.3.6.1.5.5.7.3.1" /* </text:span><text:span text:style-name="T142">serverAuth</text:span><text:span text:style-name="T460"> */, NULL) </text:span><text:span text:style-name="T81">&amp;&amp;<text:line-break/> <text:s text:c="7"/>BIO_printf(policy_sections, "%s", <text:line-break/> <text:s text:c="18"/>"[</text:span><text:span text:style-name="T142">pkiPolicy</text:span><text:span text:style-name="T81">]\n"<text:line-break/> <text:s text:c="18"/>" <text:s/>policyIdentifier = 1.3.6.1.4.1.4329.38.4.2.2\n"<text:line-break/> <text:s text:c="18"/>" <text:s/>CPS.1 = http://</text:span><text:span text:style-name="T142">www.my-company.com</text:span><text:span text:style-name="T81">/</text:span><text:span text:style-name="T142">pki-policy</text:span><text:span text:style-name="T81">/\n"<text:line-break/> <text:s text:c="18"/>" <text:s/>userNotice = </text:span><text:span text:style-name="T142">@notice</text:span><text:span text:style-name="T81">\n"<text:line-break/> <text:s text:c="18"/>"[notice]\n"<text:line-break/> <text:s text:c="18"/>" <text:s/>explicitText=policy text\n") &gt; 0 &amp;&amp;<text:line-break/> <text:s text:c="7"/>EXTENSIONS_add_ext(</text:span><text:span text:style-name="T142">exts</text:span><text:span text:style-name="T81">, "certificatePolicies",<text:line-break/> <text:s text:c="32"/>"critical, </text:span><text:span text:style-name="T142">@pkiPolicy</text:span><text:span text:style-name="T81">", policy_sections);<text:line-break/> <text:s text:c="3"/>BIO_free(policy_sections);</text:span></text:p>
        <text:p text:style-name="P313"/>
        <text:p text:style-name="P275"><text:span text:style-name="T91">The function </text:span><text:span text:style-name="T451">EXTENSIONS</text:span><text:span text:style-name="T340">_free()</text:span><text:span text:style-name="T91"> deallocates the given structure </text:span><text:span text:style-name="T453">exts</text:span><text:span text:style-name="T91">. It has no return value.</text:span></text:p>
        <text:p text:style-name="P314"><text:span text:style-name="T210">void</text:span><text:span text:style-name="T77"> </text:span><text:span text:style-name="T434">EXTENSIONS_free</text:span><text:span text:style-name="T77">(</text:span><text:span text:style-name="T117">OPTIONAL</text:span><text:span text:style-name="T287"> X509_EXTENSIONS</text:span><text:span text:style-name="T77"> *</text:span><text:span text:style-name="T213">exts</text:span><text:span text:style-name="T77">);</text:span></text:p>
        <text:list text:continue-numbering="true" text:style-name="WWNum2">
          <text:list-item>
            <text:h text:style-name="P54" text:outline-level="1"><text:bookmark-start text:name="_Toc5814409"/><text:bookmark-start text:name="__RefHeading___Toc13213_3177186546"/>Appendix: C header file<text:bookmark-end text:name="_Toc5814409"/><text:bookmark-end text:name="__RefHeading___Toc13213_3177186546"/></text:h>
          </text:list-item>
        </text:list>
        <text:p text:style-name="P315">/*!*****************************************************************************</text:p>
        <text:p text:style-name="P315"><text:s/>* <text:span text:style-name="T22">@file</text:span> <text:s text:c="2"/><text:span text:style-name="T22">genericCMPclient.h</text:span></text:p>
        <text:p text:style-name="P315"><text:s/>* <text:span text:style-name="T22">@brief</text:span> <text:s/>generic CMP client library API</text:p>
        <text:p text:style-name="P316"><text:s/>*</text:p>
        <text:p text:style-name="P229"><text:span text:style-name="T462"><text:s/></text:span><text:a xlink:type="simple" xlink:href="mailto:David.von.Oheimb@siemens.com" text:style-name="ListLabel_20_549" text:visited-style-name="ListLabel_20_549"><text:span text:style-name="ListLabel_20_518"><text:span text:style-name="T462">* </text:span></text:span><text:span text:style-name="ListLabel_20_518"><text:span text:style-name="T446">@author</text:span></text:span><text:span text:style-name="ListLabel_20_518"><text:span text:style-name="T462"> David von Oheimb, Siemens AG</text:span></text:span></text:a></text:p>
        <text:p text:style-name="P316"><text:s/>*</text:p>
        <text:p text:style-name="P317"><text:s/>* Copyright (c) Siemens AG, 2018-20<text:span text:style-name="T463">2</text:span><text:span text:style-name="T177">5</text:span>.</text:p>
        <text:p text:style-name="P315"><text:s/>* Licensed under the Apache License, Version 2.0</text:p>
        <text:p text:style-name="P315"><text:s/>* SPDX-License-Identifier: Apache-2.0 ******************************************************************************/</text:p>
        <text:p text:style-name="P315"/>
        <text:p text:style-name="P318">#ifndef GENERIC_CMP_CLIENT_H</text:p>
        <text:p text:style-name="P318"># define GENERIC_CMP_CLIENT_H</text:p>
        <text:p text:style-name="P315"/>
        <text:p text:style-name="P229"><text:span text:style-name="T370">/* for low-level CMP API, in particular, type </text:span><text:span text:style-name="T210">CMP_CTX</text:span><text:span text:style-name="T370"> */</text:span></text:p>
        <text:p text:style-name="P319"># include &lt;openssl/cmp.h&gt;</text:p>
        <text:p text:style-name="P319"/>
        <text:p text:style-name="P319"># include &lt;secutils/credentials/credentials.h&gt;<text:line-break/># include &lt;secutils/credentials/<text:span text:style-name="T22">cert.h</text:span>&gt;</text:p>
        <text:p text:style-name="P320"><text:span text:style-name="T283"># include &lt;secutils/util/log.h&gt;<text:line-break/><text:line-break/></text:span><text:span text:style-name="T464">/* for abbreviation and backward compatibility: */</text:span></text:p>
        <text:p text:style-name="P229"><text:span text:style-name="T212">typedef</text:span><text:span text:style-name="T77"> </text:span><text:span text:style-name="T210">OSSL_CMP_CTX CMP_CTX</text:span><text:span text:style-name="T77">;</text:span><text:span text:style-name="T370"> <text:line-break/></text:span><text:span text:style-name="T212">typedef</text:span><text:span text:style-name="T77"> </text:span><text:span text:style-name="T210">OSSL_CMP_severity severity</text:span><text:span text:style-name="T77">;</text:span><text:span text:style-name="T370"> <text:line-break/></text:span></text:p>
        <text:p text:style-name="P229"><text:span text:style-name="T77"><text:line-break/></text:span><text:span text:style-name="T212">typedef</text:span><text:span text:style-name="T77"> </text:span><text:span text:style-name="T210">int</text:span><text:span text:style-name="T77"> </text:span><text:span text:style-name="T210">CMP_err</text:span><text:span text:style-name="T77">;</text:span></text:p>
        <text:p text:style-name="P318"># define CMP_OK 0</text:p>
        <text:p text:style-name="P318"># define CMP_R_OTHER_LIB_ERR 99</text:p>
        <text:p text:style-name="P318"># define CMP_R_LOAD_CERTS <text:s text:c="8"/>255</text:p>
        <text:p text:style-name="P318"># define CMP_R_LOAD_CREDS <text:s text:c="8"/>254</text:p>
        <text:p text:style-name="P318"># define CMP_R_GENERATE_KEY <text:s text:c="6"/>253</text:p>
        <text:p text:style-name="P318"># define CMP_R_STORE_CREDS <text:s/>______252</text:p>
        <text:p text:style-name="P318"># define CMP_R_RECIPIENT <text:s text:c="9"/>251</text:p>
        <text:p text:style-name="P318"># define CMP_R_INVALID_CONTEXT <text:s text:c="3"/>250<text:line-break/># define CMP_R_INVALID_PARAMETERS CMP_R_INVALID_<text:span text:style-name="T22">ARGS</text:span></text:p>
        <text:p text:style-name="P318"># define CMP_R_INVALID_PARAMETERS 249/* further error codes are defined in cmperr.h */</text:p>
        <text:p text:style-name="P318"/>
        <text:p text:style-name="P318"># define CMP_IR <text:s text:c="3"/>0</text:p>
        <text:p text:style-name="P318"># define CMP_CR <text:s text:c="3"/>2</text:p>
        <text:p text:style-name="P318"># define CMP_P10CR 4</text:p>
        <text:p text:style-name="P318"># define CMP_KUR <text:s text:c="2"/>7</text:p>
        <text:p text:style-name="P318"/>
        <text:p text:style-name="P318"># ifndef __cplusplus</text:p>
        <text:p text:style-name="P229"><text:span text:style-name="T212">typedef</text:span><text:span text:style-name="T465"> </text:span><text:span text:style-name="T212">enum</text:span><text:span text:style-name="T465"> { false = 0, true = 1 } </text:span><text:span text:style-name="T210">bool</text:span><text:span text:style-name="T465">;</text:span><text:span text:style-name="T370"> /* Boolean value */</text:span></text:p>
        <text:p text:style-name="P318"># endif</text:p>
        <text:p text:style-name="P278"/>
        <text:p text:style-name="P229"><text:span text:style-name="T465">#define OPTIONAL </text:span><text:span text:style-name="T370">/* marker for non-required parameter, i.e., NULL allowed */</text:span></text:p>
        <text:p text:style-name="P315"/>
        <text:p text:style-name="P278">/* private key and related certificate, plus optional chain */</text:p>
        <text:p text:style-name="P229"><text:span text:style-name="T212">typedef</text:span><text:span text:style-name="T77"> </text:span><text:span text:style-name="T212">struct</text:span><text:span text:style-name="T77"> </text:span><text:span text:style-name="T210">credentials</text:span><text:span text:style-name="T77"> {</text:span></text:p>
        <text:p text:style-name="P229"><text:span text:style-name="T77"><text:s text:c="4"/>OPTIONAL </text:span><text:span text:style-name="T210">EVP_PKEY</text:span><text:span text:style-name="T77"> *pkey; <text:s text:c="7"/></text:span><text:span text:style-name="T370">/* can refer to HW key store via </text:span><text:span text:style-name="T466">provider/</text:span><text:span text:style-name="T370">engine */</text:span></text:p>
        <text:p text:style-name="P229"><text:span text:style-name="T77"><text:s text:c="4"/>OPTIONAL </text:span><text:span text:style-name="T210">X509</text:span><text:span text:style-name="T77"> <text:s text:c="4"/>*cert; <text:s text:c="7"/></text:span><text:span text:style-name="T370">/* related certificate */</text:span></text:p>
        <text:p text:style-name="P229"><text:span text:style-name="T77"><text:s text:c="4"/>OPTIONAL </text:span><text:span text:style-name="T210">STACK_OF(X509)</text:span><text:span text:style-name="T77"> *chain; </text:span><text:span text:style-name="T370">/* intermediate/extra certs for cert */</text:span></text:p>
        <text:p text:style-name="P229"><text:span text:style-name="T77"><text:s text:c="4"/>OPTIONAL </text:span><text:span text:style-name="T212">const</text:span><text:span text:style-name="T77"> </text:span><text:span text:style-name="T210">char</text:span><text:span text:style-name="T77"> *pwd; <text:s text:c="6"/></text:span><text:span text:style-name="T370">/* alternative: password (shared secret) */</text:span></text:p>
        <text:p text:style-name="P229"><text:span text:style-name="T77"><text:s text:c="4"/>OPTIONAL </text:span><text:span text:style-name="T212">const</text:span><text:span text:style-name="T77"> </text:span><text:span text:style-name="T210">char</text:span><text:span text:style-name="T77"> *pwdref; <text:s text:c="3"/></text:span><text:span text:style-name="T370">/* reference identifying the password */</text:span><text:span text:style-name="T77"><text:line-break/>} </text:span><text:span text:style-name="T210">CREDENTIALS</text:span><text:span text:style-name="T77">;</text:span></text:p>
        <text:p text:style-name="P315"/>
        <text:p text:style-name="P229"><text:span text:style-name="T212">typedef </text:span><text:span text:style-name="T291">int</text:span><text:span text:style-name="T77"> </text:span><text:span text:style-name="T210">severity</text:span><text:span text:style-name="T77">;</text:span></text:p>
        <text:p text:style-name="P229"><text:span text:style-name="T465"># define LOG_EMERG <text:s text:c="2"/></text:span><text:span text:style-name="T298">0</text:span></text:p>
        <text:p text:style-name="P229"><text:span text:style-name="T465"># define LOG_ALERT <text:s text:c="2"/></text:span><text:span text:style-name="T298">1</text:span></text:p>
        <text:p text:style-name="P229"><text:span text:style-name="T465"># define LOG_CRIT <text:s text:c="3"/></text:span><text:span text:style-name="T298">2</text:span></text:p>
        <text:p text:style-name="P229"><text:span text:style-name="T465"># define LOG_ERR <text:s text:c="4"/></text:span><text:span text:style-name="T298">3</text:span></text:p>
        <text:p text:style-name="P229"><text:span text:style-name="T465"># define LOG_WARNING </text:span><text:span text:style-name="T298">4</text:span></text:p>
        <text:p text:style-name="P229"><text:span text:style-name="T465"># define LOG_NOTICE <text:s/></text:span><text:span text:style-name="T298">5</text:span></text:p>
        <text:p text:style-name="P229"><text:span text:style-name="T465"># define LOG_INFO <text:s text:c="3"/></text:span><text:span text:style-name="T298">6</text:span></text:p>
        <text:p text:style-name="P229"><text:span text:style-name="T465"># define LOG_DEBUG</text:span><text:span text:style-name="T77"> <text:s text:c="2"/>7</text:span></text:p>
        <text:p text:style-name="P229"><text:span text:style-name="T467"># define</text:span><text:span text:style-name="T277"> </text:span><text:span text:style-name="T468">LOG_TRACE</text:span><text:span text:style-name="T375"> <text:s text:c="2"/>8</text:span></text:p>
        <text:p text:style-name="P315"/>
        <text:p text:style-name="P229"><text:span text:style-name="T77">typedef </text:span><text:span text:style-name="T291">bool</text:span><text:span text:style-name="T77"> (*</text:span><text:span text:style-name="T210">LOG_cb_t</text:span><text:span text:style-name="T77">) (OPTIONAL </text:span><text:span text:style-name="T212">const</text:span><text:span text:style-name="T77"> </text:span><text:span text:style-name="T210">char</text:span><text:span text:style-name="T77"> *func,</text:span></text:p>
        <text:p text:style-name="P229"><text:span text:style-name="T77"><text:s text:c="26"/>OPTIONAL </text:span><text:span text:style-name="T212">const</text:span><text:span text:style-name="T77"> </text:span><text:span text:style-name="T210">char</text:span><text:span text:style-name="T77"> *file, </text:span><text:span text:style-name="T210">int</text:span><text:span text:style-name="T77"> lineno, </text:span></text:p>
        <text:p text:style-name="P229"><text:span text:style-name="T77"><text:s text:c="26"/></text:span><text:span text:style-name="T210">severity</text:span><text:span text:style-name="T77"> level, </text:span><text:span text:style-name="T212">const</text:span><text:span text:style-name="T77"> </text:span><text:span text:style-name="T210">char</text:span><text:span text:style-name="T77"> *msg);</text:span></text:p>
        <text:p text:style-name="P321">/* CMP client core functions */<text:line-break/>/* should be called once, as soon as the application starts */</text:p>
        <text:p text:style-name="P322"><text:span text:style-name="T79">CMP_err</text:span><text:span text:style-name="T77"> </text:span><text:span text:style-name="T74">CMPclient_init</text:span><text:span text:style-name="T77">(OPTIONAL </text:span><text:span text:style-name="T80">const</text:span><text:span text:style-name="T81"> </text:span><text:span text:style-name="T82">char</text:span><text:span text:style-name="T81"> *n</text:span><text:span text:style-name="T83">ame</text:span><text:span text:style-name="T77">, OPTIONAL </text:span><text:span text:style-name="T79">LOG_cb_t </text:span><text:span text:style-name="T77">log_fn);</text:span></text:p>
        <text:p text:style-name="P315"/>
        <text:p text:style-name="P278">/* must be called first */</text:p>
        <text:p text:style-name="P323"><text:span text:style-name="T79">CMP_err</text:span><text:span text:style-name="T88"> </text:span><text:span text:style-name="T74">CMPclient_prepare</text:span><text:span text:style-name="T88">(</text:span><text:span text:style-name="T79">CMP_CTX</text:span><text:span text:style-name="T88"> **pctx, <text:line-break/> <text:s text:c="25"/></text:span><text:span text:style-name="T469">OPTIONAL</text:span><text:span text:style-name="T88"> </text:span><text:span text:style-name="T372">OSSL_LIB_CTX</text:span><text:span text:style-name="T88"> *libctx, OPTIONAL </text:span><text:span text:style-name="T90">const</text:span><text:span text:style-name="T88"> </text:span><text:span text:style-name="T372">char</text:span><text:span text:style-name="T88"> *propq,</text:span></text:p>
        <text:p text:style-name="P324"><text:span text:style-name="T88"><text:s text:c="26"/></text:span><text:span text:style-name="T469">OPTIONAL</text:span><text:span text:style-name="T88"> </text:span><text:span text:style-name="T79">LOG_cb_t</text:span><text:span text:style-name="T88"> log_fn,</text:span></text:p>
        <text:p text:style-name="P229"><text:span text:style-name="T88"><text:s text:c="6"/></text:span><text:span text:style-name="T370"><text:s text:c="19"/></text:span><text:span text:style-name="T77"><text:s/>OPTIONAL </text:span><text:span text:style-name="T210">X509_STORE</text:span><text:span text:style-name="T77"> *cmp_truststore,</text:span></text:p>
        <text:p text:style-name="P229"><text:span text:style-name="T77"><text:s text:c="26"/>OPTIONAL </text:span><text:span text:style-name="T212">const</text:span><text:span text:style-name="T77"> </text:span><text:span text:style-name="T366">char</text:span><text:span text:style-name="T98"> *recipient</text:span><text:span text:style-name="T77">,</text:span></text:p>
        <text:p text:style-name="P229"><text:span text:style-name="T77"><text:s text:c="26"/>OPTIONAL </text:span><text:span text:style-name="T212">const</text:span><text:span text:style-name="T77"> </text:span><text:span text:style-name="T366">STACK_OF(X509)</text:span><text:span text:style-name="T98"> *</text:span><text:span text:style-name="T77">untrusted,</text:span></text:p>
        <text:p text:style-name="P229"><text:span text:style-name="T98"><text:s text:c="26"/></text:span><text:span text:style-name="T77">OPTIONAL </text:span><text:span text:style-name="T212">const</text:span><text:span text:style-name="T77"> </text:span><text:span text:style-name="T210">CREDENTIALS</text:span><text:span text:style-name="T77"> *creds,</text:span></text:p>
        <text:p text:style-name="P229"><text:span text:style-name="T77"><text:s text:c="26"/>OPTIONAL </text:span><text:span text:style-name="T210">X509_STORE</text:span><text:span text:style-name="T77"> *creds_truststore,</text:span></text:p>
        <text:p text:style-name="P229"><text:span text:style-name="T77"><text:s text:c="26"/>OPTIONAL </text:span><text:span text:style-name="T212">const</text:span><text:span text:style-name="T77"> </text:span><text:span text:style-name="T210">char</text:span><text:span text:style-name="T77"> *digest,</text:span></text:p>
        <text:p text:style-name="P229"><text:span text:style-name="T77"><text:s text:c="26"/>OPTIONAL </text:span><text:span text:style-name="T212">const</text:span><text:span text:style-name="T77"> </text:span><text:span text:style-name="T210">char</text:span><text:span text:style-name="T77"> *mac,</text:span></text:p>
        <text:p text:style-name="P229"><text:span text:style-name="T77"><text:s text:c="26"/>OPTIONAL </text:span><text:span text:style-name="T79">OSSL_CMP</text:span><text:span text:style-name="T210">_transfer_cb_t</text:span><text:span text:style-name="T77"> transfer_fn, </text:span><text:span text:style-name="T210">int</text:span><text:span text:style-name="T77"> total_timeout,</text:span></text:p>
        <text:p text:style-name="P229"><text:span text:style-name="T77"><text:s text:c="26"/>OPTIONAL </text:span><text:span text:style-name="T210">X509_STORE</text:span><text:span text:style-name="T77"> *new_cert_truststore, </text:span><text:span text:style-name="T210">bool</text:span><text:span text:style-name="T77"> implicit_confirm);</text:span></text:p>
        <text:p text:style-name="P325"><text:span text:style-name="T370">/* must be called next i</text:span><text:span text:style-name="T470">f</text:span><text:span text:style-name="T370"> the transfer_fn is NULL and no existing connection is used */</text:span></text:p>
        <text:p text:style-name="P326"><text:span text:style-name="T210">CMP_err</text:span><text:span text:style-name="T77"> </text:span><text:span text:style-name="T434">CMPclient_setup_HTTP</text:span><text:span text:style-name="T77">(</text:span><text:span text:style-name="T210">CMP_CTX</text:span><text:span text:style-name="T77"> *ctx, </text:span><text:span text:style-name="T212">const</text:span><text:span text:style-name="T77"> </text:span><text:span text:style-name="T210">char</text:span><text:span text:style-name="T77"> *server, </text:span><text:span text:style-name="T212">const</text:span><text:span text:style-name="T77"> </text:span><text:span text:style-name="T210">char</text:span><text:span text:style-name="T77"> *path,</text:span></text:p>
        <text:p text:style-name="P325"><text:span text:style-name="T77"><text:s text:c="29"/></text:span><text:span text:style-name="T210">int</text:span><text:span text:style-name="T77"> </text:span><text:span text:style-name="T471">keep_alive</text:span><text:span text:style-name="T77">, </text:span><text:span text:style-name="T210">int</text:span><text:span text:style-name="T77"> timeout, OPTIONAL</text:span><text:span text:style-name="T210"> SSL_CTX</text:span><text:span text:style-name="T77"> *tls,</text:span></text:p>
        <text:p text:style-name="P325"><text:span text:style-name="T77"><text:s text:c="28"/></text:span><text:span text:style-name="T210"><text:s/></text:span><text:span text:style-name="T77">OPTIONAL</text:span><text:span text:style-name="T210"> </text:span><text:span text:style-name="T212">const</text:span><text:span text:style-name="T77"> </text:span><text:span text:style-name="T210">char</text:span><text:span text:style-name="T77"> *proxy, OPTIONAL</text:span><text:span text:style-name="T210"> </text:span><text:span text:style-name="T212">const</text:span><text:span text:style-name="T77"> </text:span><text:span text:style-name="T210">char</text:span><text:span text:style-name="T77"> *no_proxy);</text:span></text:p>
        <text:p text:style-name="P327">/* must be called alternatively if transfer_fn is NULL and existing connection is used */</text:p>
        <text:p text:style-name="P328"><text:span text:style-name="T210">CMP_err</text:span><text:span text:style-name="T77"> </text:span><text:span text:style-name="T434">CMPclient_setup_</text:span><text:span text:style-name="T472">BIO</text:span><text:span text:style-name="T77">(</text:span><text:span text:style-name="T210">CMP_CTX</text:span><text:span text:style-name="T77"> *ctx, </text:span><text:span text:style-name="T473">BIO</text:span><text:span text:style-name="T77"> *</text:span><text:span text:style-name="T474">rw</text:span><text:span text:style-name="T77">, OPTIONAL </text:span><text:span text:style-name="T212">const</text:span><text:span text:style-name="T77"> </text:span><text:span text:style-name="T210">char</text:span><text:span text:style-name="T77"> *path,</text:span></text:p>
        <text:p text:style-name="P329"><text:span text:style-name="T77"><text:s text:c="28"/></text:span><text:span text:style-name="T210">int</text:span><text:span text:style-name="T77"> </text:span><text:span text:style-name="T471">keep_alive</text:span><text:span text:style-name="T77">, </text:span><text:span text:style-name="T210">int</text:span><text:span text:style-name="T77"> timeout);</text:span></text:p>
        <text:p text:style-name="P330"><text:line-break/><text:span text:style-name="T71">/* call optionally before requests; name may be UTF8-encoded string */</text:span></text:p>
        <text:p text:style-name="P331">/* This calls OSSL_CMP_CTX_reset_geninfo_ITAVs() if name == NULL */</text:p>
        <text:p text:style-name="P330"><text:span text:style-name="T239">CMP_err </text:span><text:span text:style-name="T475">CMPclient_add_certProfile</text:span>(<text:span text:style-name="T239">CMP_CTX</text:span> *ctx, OPTIONAL <text:span text:style-name="T254">const</text:span> <text:span text:style-name="T239">char *</text:span>name);</text:p>
        <text:p text:style-name="P330"/>
        <text:p text:style-name="P330">/* only one of the following activities can be called next */</text:p>
        <text:p text:style-name="P330"/>
        <text:p text:style-name="P278">/* the structure returned in *new_creds must be deallocated by the caller */</text:p>
        <text:p text:style-name="P229"><text:span text:style-name="T210">CMP_err</text:span><text:span text:style-name="T77"> </text:span><text:span text:style-name="T434">CMPclient_imprint</text:span><text:span text:style-name="T77">(</text:span><text:span text:style-name="T210">CMP_CTX</text:span><text:span text:style-name="T77"> *ctx, </text:span><text:span text:style-name="T210">CREDENTIALS</text:span><text:span text:style-name="T77"> **new_creds,</text:span></text:p>
        <text:p text:style-name="P229"><text:span text:style-name="T77"><text:s text:c="26"/></text:span><text:span text:style-name="T212">const</text:span><text:span text:style-name="T77"> </text:span><text:span text:style-name="T210">EVP_PKEY</text:span><text:span text:style-name="T77"> *newkey, </text:span><text:span text:style-name="T212">const</text:span><text:span text:style-name="T77"> </text:span><text:span text:style-name="T210">char</text:span><text:span text:style-name="T77"> *subject,</text:span></text:p>
        <text:p text:style-name="P229"><text:span text:style-name="T77"><text:s text:c="26"/></text:span><text:span text:style-name="T469">OPTIONAL</text:span><text:span text:style-name="T88"> </text:span><text:span text:style-name="T90">const</text:span><text:span text:style-name="T88"> </text:span><text:span text:style-name="T79">X509_EXTENSIONS</text:span><text:span text:style-name="T88"> *exts);</text:span></text:p>
        <text:p text:style-name="P229"><text:span text:style-name="T210">CMP_err</text:span><text:span text:style-name="T77"> </text:span><text:span text:style-name="T434">CMPclient_bootstrap</text:span><text:span text:style-name="T77">(</text:span><text:span text:style-name="T210">CMP_CTX</text:span><text:span text:style-name="T77"> *ctx, </text:span><text:span text:style-name="T210">CREDENTIALS</text:span><text:span text:style-name="T77"> **new_creds,</text:span></text:p>
        <text:p text:style-name="P229"><text:span text:style-name="T77"><text:s text:c="28"/></text:span><text:span text:style-name="T212">const</text:span><text:span text:style-name="T77"> </text:span><text:span text:style-name="T210">EVP_PKEY</text:span><text:span text:style-name="T77"> *newkey, </text:span><text:span text:style-name="T212">const</text:span><text:span text:style-name="T77"> </text:span><text:span text:style-name="T210">char</text:span><text:span text:style-name="T77"> *subject,</text:span></text:p>
        <text:p text:style-name="P229"><text:span text:style-name="T77"><text:s text:c="28"/></text:span><text:span text:style-name="T469">OPTIONAL</text:span><text:span text:style-name="T88"> </text:span><text:span text:style-name="T90">const</text:span><text:span text:style-name="T88"> </text:span><text:span text:style-name="T79">X509_EXTENSIONS</text:span><text:span text:style-name="T88"> *exts);</text:span></text:p>
        <text:p text:style-name="P229"><text:span text:style-name="T210">CMP_err</text:span><text:span text:style-name="T77"> </text:span><text:span text:style-name="T434">CMPclient_pkcs10</text:span><text:span text:style-name="T77">(</text:span><text:span text:style-name="T210">CMP_CTX</text:span><text:span text:style-name="T77"> *ctx, </text:span><text:span text:style-name="T210">CREDENTIALS</text:span><text:span text:style-name="T77"> **new_creds,</text:span></text:p>
        <text:p text:style-name="P229"><text:span text:style-name="T77"><text:s text:c="25"/></text:span><text:span text:style-name="T212">const</text:span><text:span text:style-name="T77"> </text:span><text:span text:style-name="T210">X509_REQ</text:span><text:span text:style-name="T77"> *p10csr</text:span><text:span text:style-name="T88">);</text:span></text:p>
        <text:p text:style-name="P229"><text:span text:style-name="T210">CMP_err</text:span><text:span text:style-name="T77"> </text:span><text:span text:style-name="T434">CMPclient_update</text:span><text:span text:style-name="T77">(</text:span><text:span text:style-name="T210">CMP_CTX</text:span><text:span text:style-name="T77"> *ctx, </text:span><text:span text:style-name="T210">CREDENTIALS</text:span><text:span text:style-name="T77"> **new_creds,</text:span></text:p>
        <text:p text:style-name="P332"><text:span text:style-name="T77"><text:s text:c="25"/></text:span><text:span text:style-name="T375">OPTIONAL </text:span><text:span text:style-name="T212">const</text:span><text:span text:style-name="T77"> </text:span><text:span text:style-name="T210">EVP_PKEY</text:span><text:span text:style-name="T77"> *newkey);</text:span></text:p>
        <text:p text:style-name="P333"><text:span text:style-name="T210">CMP_err</text:span><text:span text:style-name="T77"> </text:span><text:span text:style-name="T434">CMPclient_update_</text:span><text:span text:style-name="T476">anycert</text:span><text:span text:style-name="T77">(</text:span><text:span text:style-name="T210">CMP_CTX</text:span><text:span text:style-name="T77"> *ctx, </text:span><text:span text:style-name="T210">CREDENTIALS</text:span><text:span text:style-name="T77"> **new_creds,</text:span></text:p>
        <text:p text:style-name="P333"><text:span text:style-name="T88"><text:s text:c="33"/></text:span><text:span text:style-name="T477">O</text:span><text:span text:style-name="T469">PTIONAL</text:span><text:span text:style-name="T88"> </text:span><text:span text:style-name="T90">const</text:span><text:span text:style-name="T88"> </text:span><text:span text:style-name="T79">X509</text:span><text:span text:style-name="T88"> *</text:span><text:span text:style-name="T478">old_cert,</text:span></text:p>
        <text:p text:style-name="P334"><text:span text:style-name="T331"><text:s text:c="33"/></text:span><text:span text:style-name="T479">OPTIONAL </text:span><text:span text:style-name="T480">const</text:span><text:span text:style-name="T331"> </text:span><text:span text:style-name="T481">EVP_PKEY</text:span><text:span text:style-name="T331"> *newkey);</text:span></text:p>
        <text:p text:style-name="P335"><text:span text:style-name="T210">CMP_err</text:span><text:span text:style-name="T77"> </text:span><text:span text:style-name="T482">CMPclient_update_</text:span><text:span text:style-name="T483">with_exts</text:span><text:span text:style-name="T77">(</text:span><text:span text:style-name="T210">CMP_CTX</text:span><text:span text:style-name="T77"> *ctx, </text:span><text:span text:style-name="T210">CREDENTIALS</text:span><text:span text:style-name="T77"> **new_creds,</text:span></text:p>
        <text:p text:style-name="P335"><text:span text:style-name="T88"><text:s text:c="35"/></text:span><text:span text:style-name="T477">O</text:span><text:span text:style-name="T469">PTIONAL</text:span><text:span text:style-name="T88"> </text:span><text:span text:style-name="T90">const</text:span><text:span text:style-name="T88"> </text:span><text:span text:style-name="T79">X509</text:span><text:span text:style-name="T88"> *</text:span><text:span text:style-name="T478">old_cert,</text:span></text:p>
        <text:p text:style-name="P336"><text:span text:style-name="T331"><text:s text:c="35"/></text:span><text:span text:style-name="T479">OPTIONAL </text:span><text:span text:style-name="T480">const</text:span><text:span text:style-name="T331"> </text:span><text:span text:style-name="T481">EVP_PKEY</text:span><text:span text:style-name="T331"> *newkey,</text:span></text:p>
        <text:p text:style-name="P337"><text:s text:c="35"/><text:span text:style-name="T484">OPTIONAL</text:span><text:span text:style-name="T485"> </text:span><text:span text:style-name="T486">const</text:span><text:span text:style-name="T485"> </text:span><text:span text:style-name="T487">X509_EXTENSIONS</text:span><text:span text:style-name="T485"> *exts</text:span>);</text:p>
        <text:p text:style-name="P337"/>
        <text:p text:style-name="P338">/* reason codes are defined in openssl/x509v3.h */</text:p>
        <text:p text:style-name="P229"><text:span text:style-name="T210">CMP_err</text:span><text:span text:style-name="T77"> </text:span><text:span text:style-name="T434">CMPclient_revoke</text:span><text:span text:style-name="T77">(</text:span><text:span text:style-name="T210">CMP_CTX</text:span><text:span text:style-name="T77"> *ctx, </text:span><text:span text:style-name="T212">const</text:span><text:span text:style-name="T77"> </text:span><text:span text:style-name="T210">X509</text:span><text:span text:style-name="T77"> *cert, </text:span><text:span text:style-name="T210">int</text:span><text:span text:style-name="T77"> reason);</text:span></text:p>
        <text:p text:style-name="P315"/>
        <text:p text:style-name="P339">/* get CA certs, discard duplicates, and verify they are non-expired CA certs */</text:p>
        <text:p text:style-name="P315"><text:span text:style-name="T239">CMP_err</text:span> <text:span text:style-name="T475">CMPclient_caCerts</text:span>(<text:span text:style-name="T239">CMP_CTX</text:span> *ctx, <text:span text:style-name="T239">STACK_OF</text:span>(<text:span text:style-name="T239">X509</text:span>) **out);</text:p>
        <text:p text:style-name="P315"/>
        <text:p text:style-name="P339">/* get certificate request template and related key specifications */</text:p>
        <text:p text:style-name="P315"><text:span text:style-name="T239">CMP_err</text:span> <text:span text:style-name="T475">CMPclient_certReqTemplate</text:span>(<text:span text:style-name="T239">CMP_CTX</text:span> *ctx,</text:p>
        <text:p text:style-name="P340"><text:s text:c="34"/><text:span text:style-name="T488">OPTIONAL </text:span><text:span text:style-name="T239">OSSL_CRMF_CERTTEMPLATE</text:span> **certTemplate,</text:p>
        <text:p text:style-name="P315"><text:s text:c="34"/><text:span text:style-name="T239">OSSL_CMP_ATAVS</text:span> **keySpec);</text:p>
        <text:p text:style-name="P315"/>
        <text:p text:style-name="P341">/* get <text:span text:style-name="T252">any </text:span>root CA key update and verify it <text:span text:style-name="T252">as far as possible</text:span> */</text:p>
        <text:p text:style-name="P315"><text:span text:style-name="T239">CMP_err</text:span> <text:span text:style-name="T475">CMPclient_rootCaCert</text:span>(<text:span text:style-name="T239">CMP_CTX</text:span> *ctx,</text:p>
        <text:p text:style-name="P342"><text:s text:c="29"/><text:span text:style-name="T254">const </text:span><text:span text:style-name="T239">X509</text:span> *oldWithOld, <text:span text:style-name="T239">X509</text:span> **newWithNew,</text:p>
        <text:p text:style-name="P340"><text:s text:c="29"/><text:span text:style-name="T488">OPTIONAL </text:span><text:span text:style-name="T239">X509</text:span> **newWithOld, <text:span text:style-name="T488">OPTIONAL </text:span><text:span text:style-name="T239">X509</text:span> **oldWithNew);</text:p>
        <text:p text:style-name="P315"/>
        <text:p text:style-name="P343">/* <text:span text:style-name="T264">get </text:span>latest CRL according to cert DPN/issuer <text:span text:style-name="T262">or </text:span>get <text:span text:style-name="T489">a</text:span><text:span text:style-name="T262">ny</text:span><text:span text:style-name="T489"> update on </text:span><text:span text:style-name="T264">given</text:span><text:span text:style-name="T489"> C</text:span><text:span text:style-name="T490">R</text:span><text:span text:style-name="T489">L</text:span> */</text:p>
        <text:p text:style-name="P344"><text:span text:style-name="T239">CMP_err</text:span> <text:span text:style-name="T475">CMPclient_crlUpdate</text:span>(<text:span text:style-name="T239">CMP_CTX</text:span> *ctx, <text:span text:style-name="T488">OPTIONAL </text:span><text:span text:style-name="T254">const</text:span>, <text:span text:style-name="T239">X509</text:span> *cert,</text:p>
        <text:p text:style-name="P344"><text:s text:c="28"/><text:span text:style-name="T488">OPTIONAL </text:span><text:span text:style-name="T254">const</text:span> <text:span text:style-name="T239">X509_CRL</text:span> *last_crl, <text:span text:style-name="T239">X509_CRL</text:span> **crl);</text:p>
        <text:p text:style-name="P345"/>
        <text:p text:style-name="P345">/* get error information sent by the server */</text:p>
        <text:p text:style-name="P346"><text:span text:style-name="T491">char</text:span> *<text:span text:style-name="T492">CMPclient_snprint_PKIStatus</text:span>(<text:span text:style-name="T480">const</text:span> <text:span text:style-name="T491">OSSL_CMP_CTX</text:span> *ctx, <text:span text:style-name="T491">char</text:span> *buf, <text:span text:style-name="T491">size_t</text:span> bufsize);</text:p>
        <text:p text:style-name="P347"/>
        <text:p text:style-name="P348"><text:span text:style-name="T370">/* must be called </text:span><text:span text:style-name="T493">between any</text:span><text:span text:style-name="T370"> of the above </text:span><text:span text:style-name="T494">certificate management </text:span><text:span text:style-name="T370">activities */</text:span></text:p>
        <text:p text:style-name="P349"><text:span text:style-name="T372">CMP_err</text:span><text:span text:style-name="T77"> </text:span><text:span text:style-name="T434">CMPclient_</text:span><text:span text:style-name="T495">reinit</text:span><text:span text:style-name="T77">(</text:span><text:span text:style-name="T210">CMP_CTX</text:span><text:span text:style-name="T77"> *ctx);</text:span></text:p>
        <text:p text:style-name="P350"/>
        <text:p text:style-name="P351"><text:span text:style-name="T370">/* </text:span><text:span text:style-name="T493">should</text:span><text:span text:style-name="T370"> be called </text:span><text:span text:style-name="T493">on application termination</text:span><text:span text:style-name="T370"> */</text:span></text:p>
        <text:p text:style-name="P351"><text:span text:style-name="T210">void</text:span><text:span text:style-name="T77"> </text:span><text:span text:style-name="T434">CMPclient_finish</text:span><text:span text:style-name="T77">(OPTIONAL </text:span><text:span text:style-name="T210">CMP_CTX</text:span><text:span text:style-name="T77"> *ctx);</text:span></text:p>
        <text:p text:style-name="P278"><text:soft-page-break/></text:p>
        <text:p text:style-name="P278">/* CREDENTIALS helpers */</text:p>
        <text:p text:style-name="P229"><text:span text:style-name="T210">CREDENTIALS</text:span><text:span text:style-name="T77"> *</text:span><text:span text:style-name="T434">CREDENTIALS_new</text:span><text:span text:style-name="T77">(OPTIONAL </text:span><text:span text:style-name="T212">const</text:span><text:span text:style-name="T77"> </text:span><text:span text:style-name="T210">EVP_PKEY</text:span><text:span text:style-name="T77"> *pkey,</text:span></text:p>
        <text:p text:style-name="P229"><text:span text:style-name="T77"><text:s text:c="29"/>OPTIONAL </text:span><text:span text:style-name="T212">const</text:span><text:span text:style-name="T77"> </text:span><text:span text:style-name="T210">X509</text:span><text:span text:style-name="T77"> *cert, </text:span></text:p>
        <text:p text:style-name="P229"><text:span text:style-name="T77"><text:s text:c="29"/>OPTIONAL </text:span><text:span text:style-name="T212">const</text:span><text:span text:style-name="T77"> </text:span><text:span text:style-name="T210">STACK_OF(X509)</text:span><text:span text:style-name="T77"> *chain,</text:span></text:p>
        <text:p text:style-name="P229"><text:span text:style-name="T77"><text:s text:c="29"/>OPTIONAL </text:span><text:span text:style-name="T212">const</text:span><text:span text:style-name="T77"> </text:span><text:span text:style-name="T372">char</text:span><text:span text:style-name="T77"> *pwd,</text:span></text:p>
        <text:p text:style-name="P229"><text:span text:style-name="T77"><text:s text:c="29"/>OPTIONAL </text:span><text:span text:style-name="T212">const</text:span><text:span text:style-name="T77"> </text:span><text:span text:style-name="T372">char</text:span><text:span text:style-name="T77"> *pwdref);</text:span></text:p>
        <text:p text:style-name="P229"><text:span text:style-name="T210">void</text:span><text:span text:style-name="T77"> </text:span><text:span text:style-name="T434">CREDENTIALS_free</text:span><text:span text:style-name="T77">(OPTIONAL </text:span><text:span text:style-name="T210">CREDENTIALS</text:span><text:span text:style-name="T77"> *creds);</text:span></text:p>
        <text:p text:style-name="P315"/>
        <text:p text:style-name="P352"><text:span text:style-name="T323">X509</text:span><text:span text:style-name="T328"> *</text:span><text:span text:style-name="T329">CREDENTIALS_get_cert</text:span><text:span text:style-name="T328">(</text:span><text:span text:style-name="T330">const</text:span><text:span text:style-name="T328"> </text:span><text:span text:style-name="T323">CREDENTIALS</text:span><text:span text:style-name="T328"> *creds);<text:line-break/></text:span><text:span text:style-name="T323">STACK_OF(X509)</text:span><text:span text:style-name="T298"> *</text:span><text:span text:style-name="T329">CREDENTIALS_get_chain</text:span><text:span text:style-name="T298">(</text:span><text:span text:style-name="T330">const</text:span><text:span text:style-name="T298"> </text:span><text:span text:style-name="T323">CREDENTIALS</text:span><text:span text:style-name="T298"> *creds);</text:span></text:p>
        <text:p text:style-name="P353"/>
        <text:p text:style-name="P278">/* certs is name of a file in PKCS#12 format; primary cert is of client */</text:p>
        <text:p text:style-name="P278">/* source for private key may be "[pass:&lt;pwd&gt;]" or <text:span text:style-name="T315">legacy </text:span>"engine:&lt;id&gt;" */</text:p>
        <text:p text:style-name="P229"><text:span text:style-name="T210">CREDENTIALS</text:span><text:span text:style-name="T77"> *</text:span><text:span text:style-name="T434">CREDENTIALS_load</text:span><text:span text:style-name="T77">(</text:span><text:span text:style-name="T341">OPTIONAL </text:span><text:span text:style-name="T212">const</text:span><text:span text:style-name="T77"> </text:span><text:span text:style-name="T210">char</text:span><text:span text:style-name="T77"> *certs,</text:span></text:p>
        <text:p text:style-name="P229"><text:span text:style-name="T77"><text:s text:c="30"/></text:span><text:span text:style-name="T341">OPTIONAL </text:span><text:span text:style-name="T212">const</text:span><text:span text:style-name="T77"> </text:span><text:span text:style-name="T210">char</text:span><text:span text:style-name="T77"> *key,</text:span></text:p>
        <text:p text:style-name="P229"><text:span text:style-name="T77"><text:s text:c="30"/>OPTIONAL </text:span><text:span text:style-name="T212">const</text:span><text:span text:style-name="T77"> </text:span><text:span text:style-name="T210">char</text:span><text:span text:style-name="T77"> *source,</text:span></text:p>
        <text:p text:style-name="P229"><text:span text:style-name="T77"><text:s text:c="30"/>OPTIONAL </text:span><text:span text:style-name="T212">const</text:span><text:span text:style-name="T77"> </text:span><text:span text:style-name="T210">char</text:span><text:span text:style-name="T77"> *desc </text:span><text:span text:style-name="T370">/* for diagnostics */</text:span><text:span text:style-name="T77">);</text:span></text:p>
        <text:p text:style-name="P229"><text:span text:style-name="T210">bool</text:span><text:span text:style-name="T77"> </text:span><text:span text:style-name="T434">CREDENTIALS_save</text:span><text:span text:style-name="T77">(</text:span><text:span text:style-name="T212">const</text:span><text:span text:style-name="T77"> </text:span><text:span text:style-name="T210">CREDENTIALS</text:span><text:span text:style-name="T77"> *creds, <text:line-break/> <text:s text:c="21"/></text:span><text:span text:style-name="T341">OPTIONAL </text:span><text:span text:style-name="T212">const</text:span><text:span text:style-name="T77"> </text:span><text:span text:style-name="T210">char</text:span><text:span text:style-name="T77"> *certs,</text:span><text:span text:style-name="T98"> </text:span><text:span text:style-name="T341">OPTIONAL </text:span><text:span text:style-name="T124">const</text:span><text:span text:style-name="T98"> </text:span><text:span text:style-name="T366">char</text:span><text:span text:style-name="T98"> *key,</text:span></text:p>
        <text:p text:style-name="P229"><text:span text:style-name="T77"><text:s text:c="22"/>OPTIONAL </text:span><text:span text:style-name="T212">const</text:span><text:span text:style-name="T77"> </text:span><text:span text:style-name="T210">char</text:span><text:span text:style-name="T77"> *source, OPTIONAL </text:span><text:span text:style-name="T212">const</text:span><text:span text:style-name="T77"> </text:span><text:span text:style-name="T210">char</text:span><text:span text:style-name="T77"> *desc);</text:span></text:p>
        <text:p text:style-name="P354"/>
        <text:p text:style-name="P229"><text:span text:style-name="T351">X509 </text:span><text:span text:style-name="T352">*</text:span><text:span text:style-name="T300">CERT_load</text:span><text:span text:style-name="T352">(</text:span><text:span text:style-name="T135">const</text:span><text:span text:style-name="T352"> </text:span><text:span text:style-name="T351">char </text:span><text:span text:style-name="T352">*file, OPTIONAL </text:span><text:span text:style-name="T135">const</text:span><text:span text:style-name="T352"> </text:span><text:span text:style-name="T351">char </text:span><text:span text:style-name="T352">*pass, OPTIONAL </text:span><text:span text:style-name="T135">const</text:span><text:span text:style-name="T352"> </text:span><text:span text:style-name="T351">char </text:span><text:span text:style-name="T352">*desc);</text:span></text:p>
        <text:p text:style-name="HTML_20_Preformatted"><text:span text:style-name="T351">bool</text:span><text:span text:style-name="T352"> </text:span><text:span text:style-name="T300">CERT_save</text:span><text:span text:style-name="T352">(</text:span><text:span text:style-name="T135">const</text:span><text:span text:style-name="T352"> </text:span><text:span text:style-name="T351">X509 </text:span><text:span text:style-name="T352">*cert, </text:span><text:span text:style-name="T135">const</text:span><text:span text:style-name="T352"> </text:span><text:span text:style-name="T351">char </text:span><text:span text:style-name="T352">*file, OPTIONAL </text:span><text:span text:style-name="T135">const</text:span><text:span text:style-name="T352"> </text:span><text:span text:style-name="T351">char </text:span><text:span text:style-name="T352">*desc);</text:span></text:p>
        <text:p text:style-name="P355"><text:span text:style-name="T496"><text:line-break/></text:span><text:span text:style-name="T291">X509_REQ</text:span><text:span text:style-name="T354"> *</text:span><text:span text:style-name="T300">CSR_load</text:span><text:span text:style-name="T354">(</text:span><text:span text:style-name="T135">const</text:span><text:span text:style-name="T354"> </text:span><text:span text:style-name="T356">char</text:span><text:span text:style-name="T354"> *file, OPTIONAL </text:span><text:span text:style-name="T135">const</text:span><text:span text:style-name="T354"> </text:span><text:span text:style-name="T356">char</text:span><text:span text:style-name="T354"> *desc);</text:span></text:p>
        <text:p text:style-name="P356"/>
        <text:p text:style-name="P357"><text:span text:style-name="T291">X509_</text:span><text:span text:style-name="T353">CRL</text:span><text:span text:style-name="T354"> *</text:span><text:span text:style-name="T355">CRL_</text:span><text:span text:style-name="T300">load</text:span><text:span text:style-name="T354">(</text:span><text:span text:style-name="T135">const</text:span><text:span text:style-name="T354"> </text:span><text:span text:style-name="T356">char</text:span><text:span text:style-name="T354"> *file, </text:span><text:span text:style-name="T357">int</text:span><text:span text:style-name="T354"> total_timeout, OPTIONAL </text:span><text:span text:style-name="T135">const</text:span><text:span text:style-name="T354"> </text:span><text:span text:style-name="T356">char</text:span><text:span text:style-name="T354"> *desc);</text:span></text:p>
        <text:p text:style-name="P358">/* LOG helpers */</text:p>
        <text:p text:style-name="P352"><text:span text:style-name="T291">bool</text:span><text:span text:style-name="T289"> </text:span><text:span text:style-name="T292">LOG</text:span><text:span text:style-name="T289">(OPTIONAL </text:span><text:span text:style-name="T293">const</text:span><text:span text:style-name="T289"> </text:span><text:span text:style-name="T291">char</text:span><text:span text:style-name="T289"> *func, OPTIONAL </text:span><text:span text:style-name="T293">const</text:span><text:span text:style-name="T289"> </text:span><text:span text:style-name="T291">char</text:span><text:span text:style-name="T289"> *file, </text:span><text:span text:style-name="T291">int</text:span><text:span text:style-name="T289"> lineno,<text:line-break/> <text:s text:c="8"/></text:span><text:span text:style-name="T291">severity</text:span><text:span text:style-name="T289"> level, </text:span><text:span text:style-name="T293">const</text:span><text:span text:style-name="T289"> </text:span><text:span text:style-name="T291">char</text:span><text:span text:style-name="T289"> *fmt, ...);</text:span></text:p>
        <text:p text:style-name="HTML_20_Preformatted"><text:span text:style-name="T291">bool</text:span><text:span text:style-name="T289"> </text:span><text:span text:style-name="T292">LOG_default</text:span><text:span text:style-name="T289">(OPTIONAL </text:span><text:span text:style-name="T293">const</text:span><text:span text:style-name="T289"> </text:span><text:span text:style-name="T291">char</text:span><text:span text:style-name="T289"> *func, OPTIONAL </text:span><text:span text:style-name="T293">const</text:span><text:span text:style-name="T289"> </text:span><text:span text:style-name="T291">char</text:span><text:span text:style-name="T289"> *file, </text:span><text:span text:style-name="T291">int</text:span><text:span text:style-name="T289"> lineno, </text:span></text:p>
        <text:p text:style-name="HTML_20_Preformatted"><text:span text:style-name="T290"><text:s text:c="17"/></text:span><text:span text:style-name="T291">severity</text:span><text:span text:style-name="T497"> level, </text:span><text:span text:style-name="T293">const</text:span><text:span text:style-name="T497"> </text:span><text:span text:style-name="T291">char</text:span><text:span text:style-name="T497"> *msg);<text:line-break/></text:span><text:span text:style-name="T291">void</text:span><text:span text:style-name="T289"> </text:span><text:span text:style-name="T292">LOG_set_verbosity</text:span><text:span text:style-name="T289">(</text:span><text:span text:style-name="T291">severity</text:span><text:span text:style-name="T289"> level);</text:span></text:p>
        <text:p text:style-name="P229"><text:span text:style-name="T291">void</text:span><text:span text:style-name="T290"> </text:span><text:span text:style-name="T498">LOG_set_name</text:span><text:span text:style-name="T499">(OPTIONAL</text:span><text:span text:style-name="T290"> </text:span><text:span text:style-name="T293">const</text:span><text:span text:style-name="T290"> </text:span><text:span text:style-name="T291">char</text:span><text:span text:style-name="T499"> *name);</text:span></text:p>
        <text:p text:style-name="P229"><text:span text:style-name="T210">void</text:span><text:span text:style-name="T77"> </text:span><text:span text:style-name="T434">LOG_close</text:span><text:span text:style-name="T77">(</text:span><text:span text:style-name="T210">void</text:span><text:span text:style-name="T77">);</text:span></text:p>
        <text:p text:style-name="P315"/>
        <text:p text:style-name="P278">/* X509_STORE helpers */</text:p>
        <text:p text:style-name="P359"><text:span text:style-name="T287">STACK_OF(X509)</text:span><text:span text:style-name="T370"> *</text:span><text:span text:style-name="T500">CERTS_load</text:span><text:span text:style-name="T370">(</text:span><text:span text:style-name="T212">const</text:span><text:span text:style-name="T77"> </text:span><text:span text:style-name="T210">char</text:span><text:span text:style-name="T77"> </text:span><text:span text:style-name="T370">*files, OPTIONAL </text:span><text:span text:style-name="T212">const</text:span><text:span text:style-name="T77"> </text:span><text:span text:style-name="T210">char</text:span><text:span text:style-name="T77"> </text:span><text:span text:style-name="T370">*desc,</text:span></text:p>
        <text:p text:style-name="P359"><text:span text:style-name="T370"><text:s text:c="27"/></text:span><text:span text:style-name="T372">int</text:span><text:span text:style-name="T370"> type_CA, OPTIONAL </text:span><text:span text:style-name="T363">const</text:span><text:span text:style-name="T370"> </text:span><text:span text:style-name="T372">X509_VERIFY_PARAM</text:span><text:span text:style-name="T370"> *</text:span><text:span text:style-name="T501">s</text:span><text:span text:style-name="T370">);</text:span></text:p>
        <text:p text:style-name="P308"><text:span text:style-name="T291">int</text:span><text:span text:style-name="T375"> </text:span><text:span text:style-name="T300">CERTS_save</text:span><text:span text:style-name="T375">(</text:span><text:span text:style-name="T135">const</text:span><text:span text:style-name="T375"> </text:span><text:span text:style-name="T291">STACK_OF(X509)</text:span><text:span text:style-name="T375"> *certs, </text:span><text:span text:style-name="T135">const</text:span><text:span text:style-name="T375"> </text:span><text:span text:style-name="T291">char</text:span><text:span text:style-name="T371"> *file, OPTIONAL</text:span><text:span text:style-name="T375"> </text:span><text:span text:style-name="T135">const</text:span><text:span text:style-name="T375"> </text:span><text:span text:style-name="T291">char</text:span><text:span text:style-name="T375"> *desc);</text:span></text:p>
        <text:p text:style-name="P308"><text:span text:style-name="T85">void</text:span><text:span text:style-name="T86"> </text:span><text:span text:style-name="T340">CERTS_free</text:span><text:span text:style-name="T86">(</text:span><text:span text:style-name="T341">OPTIONAL</text:span><text:span text:style-name="T85"> </text:span><text:span text:style-name="T366">STACK_OF(X509)</text:span><text:span text:style-name="T86"> *certs);</text:span></text:p>
        <text:p text:style-name="P229"><text:span text:style-name="T366">STACK_OF(X509_CRL)</text:span><text:span text:style-name="T370"> *</text:span><text:span text:style-name="T500">CRLs_load</text:span><text:span text:style-name="T370">(</text:span><text:span text:style-name="T212">const</text:span><text:span text:style-name="T77"> </text:span><text:span text:style-name="T210">char</text:span><text:span text:style-name="T77"> </text:span><text:span text:style-name="T370">*file, </text:span><text:span text:style-name="T210">int </text:span><text:span text:style-name="T370">timeout, OPTIONAL </text:span><text:span text:style-name="T212">const</text:span><text:span text:style-name="T77"> </text:span><text:span text:style-name="T210">char</text:span><text:span text:style-name="T77"> </text:span><text:span text:style-name="T370">*desc);</text:span></text:p>
        <text:p text:style-name="P308"><text:span text:style-name="T85">void</text:span><text:span text:style-name="T86"> </text:span><text:span text:style-name="T340">CRLs_free</text:span><text:span text:style-name="T86">(</text:span><text:span text:style-name="T341">OPTIONAL</text:span><text:span text:style-name="T85"> </text:span><text:span text:style-name="T366">STACK_OF(X509_CRL)</text:span><text:span text:style-name="T86"> *crls);</text:span></text:p>
        <text:p text:style-name="P229"><text:span text:style-name="T210">X509_STORE</text:span><text:span text:style-name="T77"> *</text:span><text:span text:style-name="T434">STORE_load</text:span><text:span text:style-name="T77">(</text:span><text:span text:style-name="T212">const</text:span><text:span text:style-name="T77"> </text:span><text:span text:style-name="T210">char</text:span><text:span text:style-name="T77"> *trusted_certs, OPTIONAL </text:span><text:span text:style-name="T212">const</text:span><text:span text:style-name="T77"> </text:span><text:span text:style-name="T210">char</text:span><text:span text:style-name="T77"> *desc,<text:line-break/> <text:s text:c="22"/>OPTIONAL </text:span><text:span text:style-name="T363">X509_VERIFY_PARAM</text:span><text:span text:style-name="T77"> *vpm);</text:span></text:p>
        <text:p text:style-name="P229"><text:span text:style-name="T210">bool</text:span><text:span text:style-name="T77"> </text:span><text:span text:style-name="T482">STORE_add_crls</text:span><text:span text:style-name="T77">(</text:span><text:span text:style-name="T210">X509_STORE</text:span><text:span text:style-name="T77"> *truststore, OPTIONAL </text:span><text:span text:style-name="T212">const</text:span><text:span text:style-name="T77"> </text:span><text:span text:style-name="T366">STACK_OF(X509_CRL)</text:span><text:span text:style-name="T77"> *crls);</text:span></text:p>
        <text:p text:style-name="P278">/* also sets certificate verification callback: */</text:p>
        <text:p text:style-name="P229"><text:span text:style-name="T210">bool</text:span><text:span text:style-name="T77"> </text:span><text:span text:style-name="T434">STORE_set_parameters</text:span><text:span text:style-name="T77">(</text:span><text:span text:style-name="T210">X509_STORE</text:span><text:span text:style-name="T77"> *truststore,</text:span></text:p>
        <text:p text:style-name="P229"><text:span text:style-name="T77"><text:s text:c="26"/>OPTIONAL </text:span><text:span text:style-name="T212">const</text:span><text:span text:style-name="T77"> </text:span><text:span text:style-name="T210">X509_VERIFY_PARAM</text:span><text:span text:style-name="T77"> *vpm,</text:span></text:p>
        <text:p text:style-name="P229"><text:span text:style-name="T98"><text:s text:c="26"/></text:span><text:span text:style-name="T62">bool</text:span><text:span text:style-name="T98"> full_chain,</text:span><text:span text:style-name="T62"> bool</text:span><text:span text:style-name="T98"> try_stapling,</text:span></text:p>
        <text:p text:style-name="P229"><text:span text:style-name="T77"><text:s text:c="26"/>OPTIONAL </text:span><text:span text:style-name="T212">const</text:span><text:span text:style-name="T77"> </text:span><text:span text:style-name="T366">STACK_OF(X509_CRL)</text:span><text:span text:style-name="T77"> *crls,</text:span></text:p>
        <text:p text:style-name="P229"><text:span text:style-name="T77"><text:s text:c="26"/></text:span><text:span text:style-name="T210">bool</text:span><text:span text:style-name="T77"> use_CDP, OPTIONAL </text:span><text:span text:style-name="T212">const</text:span><text:span text:style-name="T77"> </text:span><text:span text:style-name="T210">char</text:span><text:span text:style-name="T77"> *cdps</text:span><text:span text:style-name="T370">, </text:span><text:span text:style-name="T210">int </text:span><text:span text:style-name="T370">crls_timeout</text:span><text:span text:style-name="T77">,</text:span></text:p>
        <text:p text:style-name="P229"><text:span text:style-name="T77"><text:s text:c="26"/></text:span><text:span text:style-name="T210">bool</text:span><text:span text:style-name="T77"> use_AIA, OPTIONAL </text:span><text:span text:style-name="T212">const</text:span><text:span text:style-name="T77"> </text:span><text:span text:style-name="T210">char</text:span><text:span text:style-name="T77"> *ocsp</text:span><text:span text:style-name="T370">, </text:span><text:span text:style-name="T210">int </text:span><text:span text:style-name="T370">ocsp_timeout</text:span><text:span text:style-name="T77">);</text:span></text:p>
        <text:p text:style-name="HTML_20_Preformatted"><text:span text:style-name="T293">typedef</text:span><text:span text:style-name="T296"> </text:span><text:span text:style-name="T356">X509_CRL</text:span><text:span text:style-name="T296"> *(*</text:span><text:span text:style-name="T356">CONN_load_crl_cb_t</text:span><text:span text:style-name="T296">)(</text:span><text:span text:style-name="T354">OPTIONAL</text:span><text:span text:style-name="T296"> </text:span><text:span text:style-name="T356">void</text:span><text:span text:style-name="T296"> *arg,</text:span></text:p>
        <text:p text:style-name="HTML_20_Preformatted"><text:span text:style-name="T296"><text:s text:c="40"/></text:span><text:span text:style-name="T354">OPTIONAL </text:span><text:span text:style-name="T385">const</text:span><text:span text:style-name="T296"> </text:span><text:span text:style-name="T356">char</text:span><text:span text:style-name="T296"> *url, </text:span><text:span text:style-name="T356">int</text:span><text:span text:style-name="T296"> timeout,</text:span></text:p>
        <text:p text:style-name="HTML_20_Preformatted"><text:span text:style-name="T296"><text:s text:c="40"/></text:span><text:span text:style-name="T385">const</text:span><text:span text:style-name="T296"> </text:span><text:span text:style-name="T356">X509</text:span><text:span text:style-name="T296"> *cert, </text:span><text:span text:style-name="T354">OPTIONAL</text:span><text:span text:style-name="T296"> </text:span><text:span text:style-name="T385">const</text:span><text:span text:style-name="T296"> </text:span><text:span text:style-name="T356">char </text:span><text:span text:style-name="T296">*desc);</text:span></text:p>
        <text:p text:style-name="HTML_20_Preformatted"><text:span text:style-name="T356">bool</text:span><text:span text:style-name="T296"> </text:span><text:span text:style-name="T300">STORE_set_crl_callback</text:span><text:span text:style-name="T296">(</text:span><text:span text:style-name="T356">X509_STORE</text:span><text:span text:style-name="T296"> *store,</text:span></text:p>
        <text:p text:style-name="HTML_20_Preformatted"><text:span text:style-name="T356"><text:s text:c="28"/></text:span><text:span text:style-name="T354">OPTIONAL</text:span><text:span text:style-name="T296"> </text:span><text:span text:style-name="T356">CONN_load_crl_cb_t</text:span><text:span text:style-name="T296"> </text:span><text:change-start text:change-id="ct36034583104"/><text:span text:style-name="T301">crl_cb</text:span><text:change-end text:change-id="ct36034583104"/><text:span text:style-name="T296">,</text:span></text:p>
        <text:p text:style-name="P229"><text:span text:style-name="T502"><text:s text:c="28"/></text:span><text:span text:style-name="T503">OPTIONAL</text:span><text:span text:style-name="T502"> </text:span><text:span text:style-name="T323">void </text:span><text:span text:style-name="T504">*crl_cb_arg);</text:span></text:p>
        <text:p text:style-name="P360"><text:span text:style-name="T323">bool</text:span><text:span text:style-name="T505"> </text:span><text:span text:style-name="T300">STORE_set1_host_ip</text:span><text:span text:style-name="T503">(</text:span><text:span text:style-name="T323">X509_STORE</text:span><text:span text:style-name="T505"> </text:span><text:span text:style-name="T503">*store,</text:span><text:span text:style-name="T505"> </text:span></text:p>
        <text:p text:style-name="P360"><text:span text:style-name="T505"><text:s text:c="24"/></text:span><text:span text:style-name="T77">OPTIONAL</text:span><text:span text:style-name="T505"> </text:span><text:span text:style-name="T385">const</text:span><text:span text:style-name="T505"> </text:span><text:span text:style-name="T323">char</text:span><text:span text:style-name="T505"> </text:span><text:span text:style-name="T503">*host,</text:span><text:span text:style-name="T505"> </text:span><text:span text:style-name="T77">OPTIONAL</text:span><text:span text:style-name="T505"> </text:span><text:span text:style-name="T385">const</text:span><text:span text:style-name="T505"> </text:span><text:span text:style-name="T323">char</text:span><text:span text:style-name="T503"> *ip);</text:span></text:p>
        <text:p text:style-name="P229"><text:span text:style-name="T210">void</text:span><text:span text:style-name="T433"> </text:span><text:span text:style-name="T434">STORE_free</text:span><text:span text:style-name="T506">(OPTIONAL</text:span><text:span text:style-name="T433"> </text:span><text:span text:style-name="T210">X509_STORE</text:span><text:span text:style-name="T506"> *truststore);</text:span></text:p>
        <text:p text:style-name="P315"/>
        <text:p text:style-name="P278">/* EVP_PKEY helpers */</text:p>
        <text:p text:style-name="P361"><text:span text:style-name="T210">EVP_PKEY</text:span><text:span text:style-name="T77"> *</text:span><text:span text:style-name="T434">KEY_new</text:span><text:span text:style-name="T77">(</text:span><text:span text:style-name="T212">const</text:span><text:span text:style-name="T77"> </text:span><text:span text:style-name="T210">char</text:span><text:span text:style-name="T77"> *spec); </text:span><text:span text:style-name="T370">/* </text:span><text:change text:change-id="ct36172427456"/><text:span text:style-name="T370">may be "RSA:&lt;length&gt;"</text:span><text:change-start text:change-id="ct36172424256"/><text:span text:style-name="T370">,</text:span><text:change-end text:change-id="ct36172424256"/><text:change text:change-id="ct36172429376"/><text:change text:change-id="ct36172428096"/><text:span text:style-name="T370">"EC:&lt;curve&gt;"</text:span><text:change-start text:change-id="ct36172425856"/><text:span text:style-name="T370">,</text:span><text:span text:style-name="T507">"</text:span><text:span text:style-name="T508">ML-D</text:span><text:span text:style-name="T507">SA-&lt;le</text:span><text:span text:style-name="T508">vel</text:span><text:span text:style-name="T507">&gt;"</text:span><text:change-end text:change-id="ct36172425856"/><text:span text:style-name="T370"> */</text:span><text:change-start text:change-id="ct36172416896"/><text:span text:style-name="T370"><text:line-break/></text:span><text:span text:style-name="T210">EVP_PKEY</text:span><text:span text:style-name="T77"> *</text:span><text:span text:style-name="T434">KEY_new</text:span><text:span text:style-name="T435">_ex</text:span><text:span text:style-name="T77">(</text:span><text:span text:style-name="T212">const</text:span><text:span text:style-name="T77"> </text:span><text:span text:style-name="T210">char</text:span><text:span text:style-name="T77"> *spec, </text:span></text:p>
        <text:p text:style-name="P362"><text:span text:style-name="T77"><text:s text:c="21"/></text:span><text:span text:style-name="T77">OPTIONAL </text:span><text:span text:style-name="T509">OSSL_LIB_CTX</text:span><text:span text:style-name="T77"> *</text:span><text:span text:style-name="T213">libct</text:span><text:span text:style-name="T510">x</text:span><text:span text:style-name="T511">, </text:span><text:span text:style-name="T77">OPTIONAL </text:span><text:span text:style-name="T212">const</text:span><text:span text:style-name="T77"> </text:span><text:span text:style-name="T512">char</text:span><text:span text:style-name="T77"> *</text:span><text:span text:style-name="T513">propq</text:span><text:span text:style-name="T77">); </text:span><text:change-end text:change-id="ct36172416896"/></text:p>
        <text:p text:style-name="P229"><text:span text:style-name="T351">EVP_PKEY</text:span><text:span text:style-name="T352"> *</text:span><text:span text:style-name="T300">KEY_load</text:span><text:span text:style-name="T352">(OPTIONAL </text:span><text:span text:style-name="T135">const</text:span><text:span text:style-name="T352"> </text:span><text:span text:style-name="T351">char</text:span><text:span text:style-name="T352"> *file, OPTIONAL </text:span><text:span text:style-name="T135">const</text:span><text:span text:style-name="T352"> </text:span><text:span text:style-name="T351">char</text:span><text:span text:style-name="T352"> *pass,<text:line-break/> <text:s text:c="18"/>OPTIONAL </text:span><text:span text:style-name="T135">const</text:span><text:span text:style-name="T352"> </text:span><text:span text:style-name="T351">char</text:span><text:span text:style-name="T352"> *engine, OPTIONAL </text:span><text:span text:style-name="T135">const</text:span><text:span text:style-name="T352"> </text:span><text:span text:style-name="T351">char</text:span><text:span text:style-name="T352"> *desc);</text:span></text:p>
        <text:p text:style-name="P229"><text:span text:style-name="T210">void</text:span><text:span text:style-name="T77"> </text:span><text:span text:style-name="T434">KEY_free</text:span><text:span text:style-name="T77">(OPTIONAL </text:span><text:span text:style-name="T210">EVP_PKEY</text:span><text:span text:style-name="T77"> *pkey);</text:span></text:p>
        <text:p text:style-name="P278"/>
        <text:p text:style-name="P278">/* SSL_CTX helpers for HTTPS */</text:p>
        <text:p text:style-name="P229"><text:span text:style-name="T210">SSL_CTX</text:span><text:span text:style-name="T77"> *</text:span><text:span text:style-name="T434">TLS_new</text:span><text:span text:style-name="T77">(OPTIONAL </text:span><text:span text:style-name="T210">X509_STORE</text:span><text:span text:style-name="T77"> *truststore,<text:line-break/></text:span><text:span text:style-name="T98"> <text:s text:c="16"/>OPTIONAL </text:span><text:span text:style-name="T95">const</text:span><text:span text:style-name="T105"> </text:span><text:span text:style-name="T366">STACK_OF(X509)</text:span><text:span text:style-name="T98"> *</text:span><text:span text:style-name="T332">untrusted</text:span><text:span text:style-name="T514">,</text:span></text:p>
        <text:p text:style-name="P229"><text:span text:style-name="T77"><text:s text:c="17"/>OPTIONAL </text:span><text:span text:style-name="T212">const</text:span><text:span text:style-name="T77"> </text:span><text:span text:style-name="T210">CREDENTIALS</text:span><text:span text:style-name="T77"> *</text:span><text:change-start text:change-id="ct36172456704"/><text:span text:style-name="T213">creds</text:span><text:change-end text:change-id="ct36172456704"/><text:span text:style-name="T77">,<text:line-break/> <text:s text:c="16"/>OPTIONAL </text:span><text:span text:style-name="T212">const</text:span><text:span text:style-name="T77"> char *ciphers</text:span><text:span text:style-name="T98">, </text:span><text:span text:style-name="T210">int</text:span><text:span text:style-name="T98"> security_level</text:span><text:span text:style-name="T77">);</text:span></text:p>
        <text:p text:style-name="P229"><text:span text:style-name="T210">void</text:span><text:span text:style-name="T77"> </text:span><text:span text:style-name="T434">TLS_free</text:span><text:span text:style-name="T77">(OPTIONAL </text:span><text:span text:style-name="T210">SSL_CTX</text:span><text:span text:style-name="T77"> *tls);</text:span></text:p>
        <text:p text:style-name="P315"/>
        <text:p text:style-name="P278">/* X509_EXTENSIONS helpers */</text:p>
        <text:p text:style-name="P229"><text:span text:style-name="T210">X509_EXTENSIONS</text:span><text:span text:style-name="T77"> *</text:span><text:span text:style-name="T434">EXTENSIONS_new</text:span><text:span text:style-name="T77">(</text:span><text:span text:style-name="T210">void</text:span><text:span text:style-name="T77">);</text:span></text:p>
        <text:p text:style-name="P278">/* add optionally critical Subject Alternative Names (SAN) to exts */</text:p>
        <text:p text:style-name="P229"><text:span text:style-name="T210">bool</text:span><text:span text:style-name="T77"> </text:span><text:span text:style-name="T434">EXTENSIONS_add_SANs</text:span><text:span text:style-name="T77">(</text:span><text:span text:style-name="T210">X509_EXTENSIONS</text:span><text:span text:style-name="T77"> *</text:span><text:change-start text:change-id="ct36172457024"/><text:span text:style-name="T213">exts</text:span><text:change-end text:change-id="ct36172457024"/><text:span text:style-name="T77">, </text:span><text:span text:style-name="T212">const</text:span><text:span text:style-name="T77"> </text:span><text:span text:style-name="T210">char</text:span><text:span text:style-name="T77"> *spec);</text:span></text:p>
        <text:p text:style-name="P278">/* add extension such as (extended) key usages, basic constraints, policies */</text:p>
        <text:p text:style-name="P229"><text:span text:style-name="T210">bool</text:span><text:span text:style-name="T77"> </text:span><text:span text:style-name="T434">EXTENSIONS_add_ext</text:span><text:span text:style-name="T77">(</text:span><text:span text:style-name="T210">X509_EXTENSIONS</text:span><text:span text:style-name="T77"> *</text:span><text:change-start text:change-id="ct36034582784"/><text:span text:style-name="T213">exts</text:span><text:change-end text:change-id="ct36034582784"/><text:span text:style-name="T77">, </text:span><text:span text:style-name="T212">const</text:span><text:span text:style-name="T77"> </text:span><text:span text:style-name="T210">char</text:span><text:span text:style-name="T77"> *name,</text:span><text:span text:style-name="T212"> </text:span></text:p>
        <text:p text:style-name="P229"><text:span text:style-name="T212"><text:s text:c="24"/>const</text:span><text:span text:style-name="T77"> </text:span><text:span text:style-name="T210">char</text:span><text:span text:style-name="T77"> *spec,</text:span><text:span text:style-name="T212"> </text:span><text:span text:style-name="T77">OPTIONAL </text:span><text:span text:style-name="T210">BIO</text:span><text:span text:style-name="T77"> *sections);</text:span></text:p>
        <text:p text:style-name="P229"><text:span text:style-name="T210">void</text:span><text:span text:style-name="T77"> </text:span><text:span text:style-name="T434">EXTENSIONS_free</text:span><text:span text:style-name="T77">(OPTIONAL </text:span><text:span text:style-name="T210">X509_EXTENSIONS</text:span><text:span text:style-name="T77"> *</text:span><text:change-start text:change-id="ct36172455104"/><text:span text:style-name="T213">exts</text:span><text:change-end text:change-id="ct36172455104"/><text:span text:style-name="T77">);</text:span></text:p>
        <text:p text:style-name="P315"/>
        <text:p text:style-name="P363"><text:span text:style-name="T465">#endif </text:span><text:span text:style-name="T370">/* GENERIC</text:span><text:span text:style-name="T465">_CMP_CLIENT</text:span><text:span text:style-name="T370">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chapter">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line-height="9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1"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1"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hyphenation-keep="auto" loext:hyphenation-keep-type="column" loext:hyphenation-keep-line="false"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style:font-name-complex="Wingdings" style:font-family-complex="Wingdings"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Wingdings" style:font-family-complex="Wingdings"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Wingdings"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Wingdings" style:font-family-complex="Wingdings"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Wingdings" style:font-family-complex="Wingdings"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Wingdings"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Wingdings" style:font-family-complex="Wingdings"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Wingdings" style:font-family-complex="Wingdings"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Wingdings"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Wingdings" style:font-family-complex="Wingdings"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Courier New1" style:font-family-complex="'Courier New'" style:font-family-generic-complex="system" style:font-pitch-complex="variable"/>
    </style:style>
    <style:style style:name="ListLabel_20_356" style:display-name="ListLabel 356" style:family="text">
      <style:text-properties style:font-name-complex="Wingdings" style:font-family-complex="Wingdings"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Courier New1" style:font-family-complex="'Courier New'" style:font-family-generic-complex="system" style:font-pitch-complex="variable"/>
    </style:style>
    <style:style style:name="ListLabel_20_359" style:display-name="ListLabel 359" style:family="text">
      <style:text-properties style:font-name-complex="Wingdings"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Courier New1" style:font-family-complex="'Courier New'" style:font-family-generic-complex="system" style:font-pitch-complex="variable"/>
    </style:style>
    <style:style style:name="ListLabel_20_383" style:display-name="ListLabel 383" style:family="text">
      <style:text-properties style:font-name-complex="Wingdings" style:font-family-complex="Wingdings"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Courier New1" style:font-family-complex="'Courier New'" style:font-family-generic-complex="system" style:font-pitch-complex="variable"/>
    </style:style>
    <style:style style:name="ListLabel_20_386" style:display-name="ListLabel 386" style:family="text">
      <style:text-properties style:font-name-complex="Wingdings" style:font-family-complex="Wingdings"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Courier New1" style:font-family-complex="'Courier New'" style:font-family-generic-complex="system" style:font-pitch-complex="variable"/>
    </style:style>
    <style:style style:name="ListLabel_20_389" style:display-name="ListLabel 389" style:family="text">
      <style:text-properties style:font-name-complex="Wingdings"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text-properties style:font-name-complex="Wingdings" style:font-family-complex="Wingdings"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text-properties style:font-name-complex="Wingdings" style:font-family-complex="Wingdings"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text-properties style:font-name-complex="Wingdings"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Courier New1" style:font-family-complex="'Courier New'"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Courier New1" style:font-family-complex="'Courier New'" style:font-family-generic-complex="system" style:font-pitch-complex="variable"/>
    </style:style>
    <style:style style:name="ListLabel_20_449" style:display-name="ListLabel 449" style:family="text">
      <style:text-properties style:font-name-complex="Wingdings" style:font-family-complex="Wingdings"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Courier New1" style:font-family-complex="'Courier New'" style:font-family-generic-complex="system" style:font-pitch-complex="variable"/>
    </style:style>
    <style:style style:name="ListLabel_20_452" style:display-name="ListLabel 452" style:family="text">
      <style:text-properties style:font-name-complex="Wingdings"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 style:font-family-complex="Wingdings"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 style:font-family-complex="Wingdings"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Courier New1" style:font-family-complex="'Courier New'" style:font-family-generic-complex="system" style:font-pitch-complex="variable"/>
    </style:style>
    <style:style style:name="ListLabel_20_508" style:display-name="ListLabel 508" style:family="text">
      <style:text-properties style:font-name-complex="Wingdings" style:font-family-complex="Wingdings"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Courier New1" style:font-family-complex="'Courier New'" style:font-family-generic-complex="system" style:font-pitch-complex="variable"/>
    </style:style>
    <style:style style:name="ListLabel_20_511" style:display-name="ListLabel 511" style:family="text">
      <style:text-properties style:font-name-complex="Wingdings" style:font-family-complex="Wingdings"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Courier New1" style:font-family-complex="'Courier New'" style:font-family-generic-complex="system" style:font-pitch-complex="variable"/>
    </style:style>
    <style:style style:name="ListLabel_20_514" style:display-name="ListLabel 514" style:family="text">
      <style:text-properties style:font-name-complex="Wingdings"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Courier New1" style:font-family-complex="'Courier New'" style:font-family-generic-complex="system" style:font-pitch-complex="variable"/>
    </style:style>
    <style:style style:name="ListLabel_20_539" style:display-name="ListLabel 539" style:family="text">
      <style:text-properties style:font-name-complex="Wingdings" style:font-family-complex="Wingdings"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Courier New1" style:font-family-complex="'Courier New'" style:font-family-generic-complex="system" style:font-pitch-complex="variable"/>
    </style:style>
    <style:style style:name="ListLabel_20_542" style:display-name="ListLabel 542" style:family="text">
      <style:text-properties style:font-name-complex="Wingdings" style:font-family-complex="Wingdings"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Courier New1" style:font-family-complex="'Courier New'" style:font-family-generic-complex="system" style:font-pitch-complex="variable"/>
    </style:style>
    <style:style style:name="ListLabel_20_545" style:display-name="ListLabel 545" style:family="text">
      <style:text-properties style:font-name-complex="Wingdings"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style:contextual-spacing="false"/>
      <style:text-properties fo:font-size="1pt" style:font-size-asian="1pt" style:font-size-complex="1pt"/>
    </style:style>
    <style:style style:name="MP5"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e693d9"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span text:style-name="page_20_number"><text:span text:style-name="MT4">6</text:span></text:span><text:span text:style-name="page_20_number"><text:span text:style-name="MT1"><text:tab/></text:span></text:span><text:span text:style-name="page_20_number"><text:span text:style-name="MT1"><text:page-number text:select-page="current">27</text:page-number></text:span></text:span><text:span text:style-name="page_20_number"><text:span text:style-name="MT1"> / </text:span></text:span><text:span text:style-name="page_20_number"><text:span text:style-name="MT1"><text:page-count>29</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4-11T11:33:00</meta:creation-date>
    <meta:initial-creator>Dr. David von Oheimb</meta:initial-creator>
    <meta:keyword>PKI</meta:keyword>
    <meta:keyword>enrollment</meta:keyword>
    <meta:keyword>certifikate</meta:keyword>
    <meta:keyword>CMP</meta:keyword>
    <dc:language>en-US</dc:language>
    <meta:print-date>2026-05-16T00:12:17.700487000</meta:print-date>
    <dc:date>2026-06-09T13:56:09.943956000</dc:date>
    <meta:editing-cycles>144</meta:editing-cycles>
    <dc:subject>Product PKI</dc:subject>
    <dc:title>Generic CMP client library API specification</dc:title>
    <meta:editing-duration>P12DT3H18M27S</meta:editing-duration>
    <meta:generator>LibreOffice/25.8.2.2$MacOSX_AARCH64 LibreOffice_project/d401f2107ccab8f924a8e2df40f573aab7605b6f</meta:generator>
    <meta:printed-by>PDF files: DvO</meta:printed-by>
    <dc:creator>DvO</dc:creator>
    <meta:document-statistic meta:table-count="22" meta:image-count="1" meta:object-count="0" meta:page-count="29" meta:paragraph-count="961" meta:word-count="10372" meta:character-count="74831" meta:non-whitespace-character-count="61526"/>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